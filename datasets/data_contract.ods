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1.2409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数据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X1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1误差</text:p>
          </table:table-cell>
          <table:table-cell office:value-type="string" calcext:value-type="string">
            <text:p>Y1误差</text:p>
          </table:table-cell>
          <table:table-cell office:value-type="string" calcext:value-type="string">
            <text:p>X2R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2误差</text:p>
          </table:table-cell>
          <table:table-cell office:value-type="string" calcext:value-type="string">
            <text:p>Y2误差</text:p>
          </table:table-cell>
          <table:table-cell office:value-type="string" calcext:value-type="string">
            <text:p>X3R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3误差</text:p>
          </table:table-cell>
          <table:table-cell office:value-type="string" calcext:value-type="string">
            <text:p>Y3误差</text:p>
          </table:table-cell>
          <table:table-cell office:value-type="string" calcext:value-type="string">
            <text:p>X4R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X4误差</text:p>
          </table:table-cell>
          <table:table-cell office:value-type="string" calcext:value-type="string">
            <text:p>Y4误差</text:p>
          </table:table-cell>
          <table:table-cell office:value-type="string" calcext:value-type="string">
            <text:p>X5R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X5误差</text:p>
          </table:table-cell>
          <table:table-cell office:value-type="string" calcext:value-type="string">
            <text:p>Y5误差</text:p>
          </table:table-cell>
          <table:table-cell office:value-type="string" calcext:value-type="string">
            <text:p>X6R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X6误差</text:p>
          </table:table-cell>
          <table:table-cell office:value-type="string" calcext:value-type="string">
            <text:p>Y6误差</text:p>
          </table:table-cell>
        </table:table-row>
        <table:table-row table:style-name="ro2">
          <table:table-cell office:value-type="float" office:value="-24.8" calcext:value-type="float">
            <text:p>-24.8</text:p>
          </table:table-cell>
          <table:table-cell office:value-type="float" office:value="-6.72" calcext:value-type="float">
            <text:p>-6.72</text:p>
          </table:table-cell>
          <table:table-cell office:value-type="float" office:value="-8" calcext:value-type="float">
            <text:p>-8</text:p>
          </table:table-cell>
          <table:table-cell office:value-type="float" office:value="-27" calcext:value-type="float">
            <text:p>-27</text:p>
          </table:table-cell>
          <table:table-cell office:value-type="float" office:value="-1.28" calcext:value-type="float">
            <text:p>-1.28</text:p>
          </table:table-cell>
          <table:table-cell office:value-type="float" office:value="-2.2" calcext:value-type="float">
            <text:p>-2.2</text:p>
          </table:table-cell>
          <table:table-cell office:value-type="float" office:value="-13" calcext:value-type="float">
            <text:p>-13</text:p>
          </table:table-cell>
          <table:table-cell office:value-type="float" office:value="-13.5" calcext:value-type="float">
            <text:p>-13.5</text:p>
          </table:table-cell>
          <table:table-cell office:value-type="float" office:value="-26.25" calcext:value-type="float">
            <text:p>-26.25</text:p>
          </table:table-cell>
          <table:table-cell office:value-type="float" office:value="-0.5" calcext:value-type="float">
            <text:p>-0.5</text:p>
          </table:table-cell>
          <table:table-cell office:value-type="float" office:value="-1.45" calcext:value-type="float">
            <text:p>-1.45</text:p>
          </table:table-cell>
          <table:table-cell office:value-type="float" office:value="-19.5" calcext:value-type="float">
            <text:p>-19.5</text:p>
          </table:table-cell>
          <table:table-cell office:value-type="float" office:value="-21.5" calcext:value-type="float">
            <text:p>-21.5</text:p>
          </table:table-cell>
          <table:table-cell office:value-type="float" office:value="-26.5" calcext:value-type="float">
            <text:p>-26.5</text:p>
          </table:table-cell>
          <table:table-cell office:value-type="float" office:value="-2" calcext:value-type="float">
            <text:p>-2</text:p>
          </table:table-cell>
          <table:table-cell office:value-type="float" office:value="-1.7" calcext:value-type="float">
            <text:p>-1.7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-26.25" calcext:value-type="float">
            <text:p>-26.25</text:p>
          </table:table-cell>
          <table:table-cell office:value-type="float" office:value="-1.5" calcext:value-type="float">
            <text:p>-1.5</text:p>
          </table:table-cell>
          <table:table-cell office:value-type="float" office:value="-1.45" calcext:value-type="float">
            <text:p>-1.45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-26.5" calcext:value-type="float">
            <text:p>-26.5</text:p>
          </table:table-cell>
          <table:table-cell office:value-type="float" office:value="-2.5" calcext:value-type="float">
            <text:p>-2.5</text:p>
          </table:table-cell>
          <table:table-cell office:value-type="float" office:value="-1.7" calcext:value-type="float">
            <text:p>-1.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-26.5" calcext:value-type="float">
            <text:p>-26.5</text:p>
          </table:table-cell>
          <table:table-cell office:value-type="float" office:value="-4" calcext:value-type="float">
            <text:p>-4</text:p>
          </table:table-cell>
          <table:table-cell office:value-type="float" office:value="-1.7" calcext:value-type="float">
            <text:p>-1.7</text:p>
          </table:table-cell>
        </table:table-row>
        <table:table-row table:style-name="ro2">
          <table:table-cell table:number-columns-repeated="4"/>
          <table:table-cell table:formula="of:=IF(OR([.C3]=&quot;&quot;;[.B3]=&quot;&quot;);&quot;&quot;;[.C3]-[.B3])">
            <text:p/>
          </table:table-cell>
          <table:table-cell table:formula="of:=IF(OR([.D3]=&quot;&quot;;[.A3]=&quot;&quot;);&quot;&quot;;[.D3]-[.A3])">
            <text:p/>
          </table:table-cell>
          <table:table-cell table:number-columns-repeated="3"/>
          <table:table-cell table:formula="of:=IF(OR([.H3]=&quot;&quot;;[.G3]=&quot;&quot;);&quot;&quot;;[.H3]-[.G3])">
            <text:p/>
          </table:table-cell>
          <table:table-cell table:formula="of:=IF(OR([.I3]=&quot;&quot;;[.A3]=&quot;&quot;);&quot;&quot;;[.I3]-[.A3])">
            <text:p/>
          </table:table-cell>
          <table:table-cell table:number-columns-repeated="3"/>
          <table:table-cell table:formula="of:=IF(OR([.M3]=&quot;&quot;;[.L3]=&quot;&quot;);&quot;&quot;;[.M3]-[.L3])">
            <text:p/>
          </table:table-cell>
          <table:table-cell table:formula="of:=IF(OR([.N3]=&quot;&quot;;[.A3]=&quot;&quot;);&quot;&quot;;[.N3]-[.A3])">
            <text:p/>
          </table:table-cell>
          <table:table-cell table:number-columns-repeated="3"/>
          <table:table-cell table:formula="of:=IF(OR([.R3]=&quot;&quot;;[.Q3]=&quot;&quot;);&quot;&quot;;[.R3]-[.Q3])">
            <text:p/>
          </table:table-cell>
          <table:table-cell table:formula="of:=IF(OR([.S3]=&quot;&quot;;[.A3]=&quot;&quot;);&quot;&quot;;[.S3]-[.A3])">
            <text:p/>
          </table:table-cell>
          <table:table-cell table:number-columns-repeated="3"/>
          <table:table-cell table:formula="of:=IF(OR([.W3]=&quot;&quot;;[.V3]=&quot;&quot;);&quot;&quot;;[.W3]-[.V3])">
            <text:p/>
          </table:table-cell>
          <table:table-cell table:formula="of:=IF(OR([.X3]=&quot;&quot;;[.A3]=&quot;&quot;);&quot;&quot;;[.X3]-[.A3])">
            <text:p/>
          </table:table-cell>
          <table:table-cell table:number-columns-repeated="3"/>
          <table:table-cell table:formula="of:=IF(OR([.AB3]=&quot;&quot;;[.AA3]=&quot;&quot;);&quot;&quot;;[.AB3]-[.AA3])">
            <text:p/>
          </table:table-cell>
          <table:table-cell table:formula="of:=IF(OR([.AC3]=&quot;&quot;;[.A3]=&quot;&quot;);&quot;&quot;;[.AC3]-[.A3])">
            <text:p/>
          </table:table-cell>
        </table:table-row>
        <table:table-row table:style-name="ro2">
          <table:table-cell office:value-type="float" office:value="-12.93" calcext:value-type="float">
            <text:p>-12.93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table:formula="of:=IF(OR([.C4]=&quot;&quot;;[.B4]=&quot;&quot;);&quot;&quot;;[.C4]-[.B4])">
            <text:p/>
          </table:table-cell>
          <table:table-cell table:formula="of:=IF(OR([.D4]=&quot;&quot;;[.A4]=&quot;&quot;);&quot;&quot;;[.D4]-[.A4])">
            <text:p/>
          </table:table-cell>
          <table:table-cell table:number-columns-repeated="3"/>
          <table:table-cell table:formula="of:=IF(OR([.H4]=&quot;&quot;;[.G4]=&quot;&quot;);&quot;&quot;;[.H4]-[.G4])">
            <text:p/>
          </table:table-cell>
          <table:table-cell table:formula="of:=IF(OR([.I4]=&quot;&quot;;[.A4]=&quot;&quot;);&quot;&quot;;[.I4]-[.A4])">
            <text:p/>
          </table:table-cell>
          <table:table-cell table:number-columns-repeated="3"/>
          <table:table-cell table:formula="of:=IF(OR([.M4]=&quot;&quot;;[.L4]=&quot;&quot;);&quot;&quot;;[.M4]-[.L4])">
            <text:p/>
          </table:table-cell>
          <table:table-cell table:formula="of:=IF(OR([.N4]=&quot;&quot;;[.A4]=&quot;&quot;);&quot;&quot;;[.N4]-[.A4])">
            <text:p/>
          </table:table-cell>
          <table:table-cell table:number-columns-repeated="3"/>
          <table:table-cell table:formula="of:=IF(OR([.R4]=&quot;&quot;;[.Q4]=&quot;&quot;);&quot;&quot;;[.R4]-[.Q4])">
            <text:p/>
          </table:table-cell>
          <table:table-cell table:formula="of:=IF(OR([.S4]=&quot;&quot;;[.A4]=&quot;&quot;);&quot;&quot;;[.S4]-[.A4])">
            <text:p/>
          </table:table-cell>
          <table:table-cell table:number-columns-repeated="3"/>
          <table:table-cell table:formula="of:=IF(OR([.W4]=&quot;&quot;;[.V4]=&quot;&quot;);&quot;&quot;;[.W4]-[.V4])">
            <text:p/>
          </table:table-cell>
          <table:table-cell table:formula="of:=IF(OR([.X4]=&quot;&quot;;[.A4]=&quot;&quot;);&quot;&quot;;[.X4]-[.A4])">
            <text:p/>
          </table:table-cell>
          <table:table-cell table:number-columns-repeated="3"/>
          <table:table-cell table:formula="of:=IF(OR([.AB4]=&quot;&quot;;[.AA4]=&quot;&quot;);&quot;&quot;;[.AB4]-[.AA4])">
            <text:p/>
          </table:table-cell>
          <table:table-cell table:formula="of:=IF(OR([.AC4]=&quot;&quot;;[.A4]=&quot;&quot;);&quot;&quot;;[.AC4]-[.A4])">
            <text:p/>
          </table:table-cell>
        </table:table-row>
        <table:table-row table:style-name="ro2">
          <table:table-cell table:number-columns-repeated="4"/>
          <table:table-cell table:formula="of:=IF(OR([.C5]=&quot;&quot;;[.B5]=&quot;&quot;);&quot;&quot;;[.C5]-[.B5])">
            <text:p/>
          </table:table-cell>
          <table:table-cell table:formula="of:=IF(OR([.D5]=&quot;&quot;;[.A5]=&quot;&quot;);&quot;&quot;;[.D5]-[.A5])">
            <text:p/>
          </table:table-cell>
          <table:table-cell office:value-type="float" office:value="-13.35" calcext:value-type="float">
            <text:p>-13.35</text:p>
          </table:table-cell>
          <table:table-cell table:number-columns-repeated="2"/>
          <table:table-cell table:formula="of:=IF(OR([.H5]=&quot;&quot;;[.G5]=&quot;&quot;);&quot;&quot;;[.H5]-[.G5])">
            <text:p/>
          </table:table-cell>
          <table:table-cell table:formula="of:=IF(OR([.I5]=&quot;&quot;;[.A5]=&quot;&quot;);&quot;&quot;;[.I5]-[.A5])">
            <text:p/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formula="of:=IF(OR([.M5]=&quot;&quot;;[.L5]=&quot;&quot;);&quot;&quot;;[.M5]-[.L5])">
            <text:p/>
          </table:table-cell>
          <table:table-cell table:formula="of:=IF(OR([.N5]=&quot;&quot;;[.A5]=&quot;&quot;);&quot;&quot;;[.N5]-[.A5])">
            <text:p/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OR([.R5]=&quot;&quot;;[.Q5]=&quot;&quot;);&quot;&quot;;[.R5]-[.Q5])">
            <text:p/>
          </table:table-cell>
          <table:table-cell table:formula="of:=IF(OR([.S5]=&quot;&quot;;[.A5]=&quot;&quot;);&quot;&quot;;[.S5]-[.A5]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IF(OR([.W5]=&quot;&quot;;[.V5]=&quot;&quot;);&quot;&quot;;[.W5]-[.V5])">
            <text:p/>
          </table:table-cell>
          <table:table-cell table:formula="of:=IF(OR([.X5]=&quot;&quot;;[.A5]=&quot;&quot;);&quot;&quot;;[.X5]-[.A5]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IF(OR([.AB5]=&quot;&quot;;[.AA5]=&quot;&quot;);&quot;&quot;;[.AB5]-[.AA5])">
            <text:p/>
          </table:table-cell>
          <table:table-cell table:formula="of:=IF(OR([.AC5]=&quot;&quot;;[.A5]=&quot;&quot;);&quot;&quot;;[.AC5]-[.A5])">
            <text:p/>
          </table:table-cell>
        </table:table-row>
        <table:table-row table:style-name="ro2">
          <table:table-cell table:number-columns-repeated="4"/>
          <table:table-cell table:formula="of:=IF(OR([.C6]=&quot;&quot;;[.B6]=&quot;&quot;);&quot;&quot;;[.C6]-[.B6])">
            <text:p/>
          </table:table-cell>
          <table:table-cell table:formula="of:=IF(OR([.D6]=&quot;&quot;;[.A6]=&quot;&quot;);&quot;&quot;;[.D6]-[.A6])">
            <text:p/>
          </table:table-cell>
          <table:table-cell table:number-columns-repeated="3"/>
          <table:table-cell table:formula="of:=IF(OR([.H6]=&quot;&quot;;[.G6]=&quot;&quot;);&quot;&quot;;[.H6]-[.G6])">
            <text:p/>
          </table:table-cell>
          <table:table-cell table:formula="of:=IF(OR([.I6]=&quot;&quot;;[.A6]=&quot;&quot;);&quot;&quot;;[.I6]-[.A6])">
            <text:p/>
          </table:table-cell>
          <table:table-cell table:number-columns-repeated="3"/>
          <table:table-cell table:formula="of:=IF(OR([.M6]=&quot;&quot;;[.L6]=&quot;&quot;);&quot;&quot;;[.M6]-[.L6])">
            <text:p/>
          </table:table-cell>
          <table:table-cell table:formula="of:=IF(OR([.N6]=&quot;&quot;;[.A6]=&quot;&quot;);&quot;&quot;;[.N6]-[.A6])">
            <text:p/>
          </table:table-cell>
          <table:table-cell table:number-columns-repeated="3"/>
          <table:table-cell table:formula="of:=IF(OR([.R6]=&quot;&quot;;[.Q6]=&quot;&quot;);&quot;&quot;;[.R6]-[.Q6])">
            <text:p/>
          </table:table-cell>
          <table:table-cell table:formula="of:=IF(OR([.S6]=&quot;&quot;;[.A6]=&quot;&quot;);&quot;&quot;;[.S6]-[.A6])">
            <text:p/>
          </table:table-cell>
          <table:table-cell table:number-columns-repeated="3"/>
          <table:table-cell table:formula="of:=IF(OR([.W6]=&quot;&quot;;[.V6]=&quot;&quot;);&quot;&quot;;[.W6]-[.V6])">
            <text:p/>
          </table:table-cell>
          <table:table-cell table:formula="of:=IF(OR([.X6]=&quot;&quot;;[.A6]=&quot;&quot;);&quot;&quot;;[.X6]-[.A6])">
            <text:p/>
          </table:table-cell>
          <table:table-cell table:number-columns-repeated="3"/>
          <table:table-cell table:formula="of:=IF(OR([.AB6]=&quot;&quot;;[.AA6]=&quot;&quot;);&quot;&quot;;[.AB6]-[.AA6])">
            <text:p/>
          </table:table-cell>
          <table:table-cell table:formula="of:=IF(OR([.AC6]=&quot;&quot;;[.A6]=&quot;&quot;);&quot;&quot;;[.AC6]-[.A6])">
            <text:p/>
          </table:table-cell>
        </table:table-row>
        <table:table-row table:style-name="ro2">
          <table:table-cell table:number-columns-repeated="4"/>
          <table:table-cell table:formula="of:=IF(OR([.C7]=&quot;&quot;;[.B7]=&quot;&quot;);&quot;&quot;;[.C7]-[.B7])">
            <text:p/>
          </table:table-cell>
          <table:table-cell table:formula="of:=IF(OR([.D7]=&quot;&quot;;[.A7]=&quot;&quot;);&quot;&quot;;[.D7]-[.A7])">
            <text:p/>
          </table:table-cell>
          <table:table-cell table:number-columns-repeated="3"/>
          <table:table-cell table:formula="of:=IF(OR([.H7]=&quot;&quot;;[.G7]=&quot;&quot;);&quot;&quot;;[.H7]-[.G7])">
            <text:p/>
          </table:table-cell>
          <table:table-cell table:formula="of:=IF(OR([.I7]=&quot;&quot;;[.A7]=&quot;&quot;);&quot;&quot;;[.I7]-[.A7])">
            <text:p/>
          </table:table-cell>
          <table:table-cell table:number-columns-repeated="3"/>
          <table:table-cell table:formula="of:=IF(OR([.M7]=&quot;&quot;;[.L7]=&quot;&quot;);&quot;&quot;;[.M7]-[.L7])">
            <text:p/>
          </table:table-cell>
          <table:table-cell table:formula="of:=IF(OR([.N7]=&quot;&quot;;[.A7]=&quot;&quot;);&quot;&quot;;[.N7]-[.A7])">
            <text:p/>
          </table:table-cell>
          <table:table-cell table:number-columns-repeated="3"/>
          <table:table-cell table:formula="of:=IF(OR([.R7]=&quot;&quot;;[.Q7]=&quot;&quot;);&quot;&quot;;[.R7]-[.Q7])">
            <text:p/>
          </table:table-cell>
          <table:table-cell table:formula="of:=IF(OR([.S7]=&quot;&quot;;[.A7]=&quot;&quot;);&quot;&quot;;[.S7]-[.A7])">
            <text:p/>
          </table:table-cell>
          <table:table-cell table:number-columns-repeated="3"/>
          <table:table-cell table:formula="of:=IF(OR([.W7]=&quot;&quot;;[.V7]=&quot;&quot;);&quot;&quot;;[.W7]-[.V7])">
            <text:p/>
          </table:table-cell>
          <table:table-cell table:formula="of:=IF(OR([.X7]=&quot;&quot;;[.A7]=&quot;&quot;);&quot;&quot;;[.X7]-[.A7])">
            <text:p/>
          </table:table-cell>
          <table:table-cell table:number-columns-repeated="3"/>
          <table:table-cell table:formula="of:=IF(OR([.AB7]=&quot;&quot;;[.AA7]=&quot;&quot;);&quot;&quot;;[.AB7]-[.AA7])">
            <text:p/>
          </table:table-cell>
          <table:table-cell table:formula="of:=IF(OR([.AC7]=&quot;&quot;;[.A7]=&quot;&quot;);&quot;&quot;;[.AC7]-[.A7])">
            <text:p/>
          </table:table-cell>
        </table:table-row>
        <table:table-row table:style-name="ro2">
          <table:table-cell office:value-type="float" office:value="-5.7" calcext:value-type="float">
            <text:p>-5.7</text:p>
          </table:table-cell>
          <table:table-cell office:value-type="float" office:value="-5.65" calcext:value-type="float">
            <text:p>-5.65</text:p>
          </table:table-cell>
          <table:table-cell table:number-columns-repeated="2"/>
          <table:table-cell table:formula="of:=IF(OR([.C8]=&quot;&quot;;[.B8]=&quot;&quot;);&quot;&quot;;[.C8]-[.B8])">
            <text:p/>
          </table:table-cell>
          <table:table-cell table:formula="of:=IF(OR([.D8]=&quot;&quot;;[.A8]=&quot;&quot;);&quot;&quot;;[.D8]-[.A8])">
            <text:p/>
          </table:table-cell>
          <table:table-cell office:value-type="float" office:value="-14.76" calcext:value-type="float">
            <text:p>-14.76</text:p>
          </table:table-cell>
          <table:table-cell table:number-columns-repeated="2"/>
          <table:table-cell table:formula="of:=IF(OR([.H8]=&quot;&quot;;[.G8]=&quot;&quot;);&quot;&quot;;[.H8]-[.G8])">
            <text:p/>
          </table:table-cell>
          <table:table-cell table:formula="of:=IF(OR([.I8]=&quot;&quot;;[.A8]=&quot;&quot;);&quot;&quot;;[.I8]-[.A8])">
            <text:p/>
          </table:table-cell>
          <table:table-cell office:value-type="float" office:value="-24.76" calcext:value-type="float">
            <text:p>-24.76</text:p>
          </table:table-cell>
          <table:table-cell table:number-columns-repeated="2"/>
          <table:table-cell table:formula="of:=IF(OR([.M8]=&quot;&quot;;[.L8]=&quot;&quot;);&quot;&quot;;[.M8]-[.L8])">
            <text:p/>
          </table:table-cell>
          <table:table-cell table:formula="of:=IF(OR([.N8]=&quot;&quot;;[.A8]=&quot;&quot;);&quot;&quot;;[.N8]-[.A8])">
            <text:p/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formula="of:=IF(OR([.R8]=&quot;&quot;;[.Q8]=&quot;&quot;);&quot;&quot;;[.R8]-[.Q8])">
            <text:p/>
          </table:table-cell>
          <table:table-cell table:formula="of:=IF(OR([.S8]=&quot;&quot;;[.A8]=&quot;&quot;);&quot;&quot;;[.S8]-[.A8]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IF(OR([.W8]=&quot;&quot;;[.V8]=&quot;&quot;);&quot;&quot;;[.W8]-[.V8])">
            <text:p/>
          </table:table-cell>
          <table:table-cell table:formula="of:=IF(OR([.X8]=&quot;&quot;;[.A8]=&quot;&quot;);&quot;&quot;;[.X8]-[.A8]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IF(OR([.AB8]=&quot;&quot;;[.AA8]=&quot;&quot;);&quot;&quot;;[.AB8]-[.AA8])">
            <text:p/>
          </table:table-cell>
          <table:table-cell table:formula="of:=IF(OR([.AC8]=&quot;&quot;;[.A8]=&quot;&quot;);&quot;&quot;;[.AC8]-[.A8])">
            <text:p/>
          </table:table-cell>
        </table:table-row>
        <table:table-row table:style-name="ro2">
          <table:table-cell table:number-columns-repeated="4"/>
          <table:table-cell table:formula="of:=IF(OR([.C9]=&quot;&quot;;[.B9]=&quot;&quot;);&quot;&quot;;[.C9]-[.B9])">
            <text:p/>
          </table:table-cell>
          <table:table-cell table:formula="of:=IF(OR([.D9]=&quot;&quot;;[.A9]=&quot;&quot;);&quot;&quot;;[.D9]-[.A9])">
            <text:p/>
          </table:table-cell>
          <table:table-cell table:number-columns-repeated="3"/>
          <table:table-cell table:formula="of:=IF(OR([.H9]=&quot;&quot;;[.G9]=&quot;&quot;);&quot;&quot;;[.H9]-[.G9])">
            <text:p/>
          </table:table-cell>
          <table:table-cell table:formula="of:=IF(OR([.I9]=&quot;&quot;;[.A9]=&quot;&quot;);&quot;&quot;;[.I9]-[.A9])">
            <text:p/>
          </table:table-cell>
          <table:table-cell table:number-columns-repeated="3"/>
          <table:table-cell table:formula="of:=IF(OR([.M9]=&quot;&quot;;[.L9]=&quot;&quot;);&quot;&quot;;[.M9]-[.L9])">
            <text:p/>
          </table:table-cell>
          <table:table-cell table:formula="of:=IF(OR([.N9]=&quot;&quot;;[.A9]=&quot;&quot;);&quot;&quot;;[.N9]-[.A9])">
            <text:p/>
          </table:table-cell>
          <table:table-cell table:number-columns-repeated="3"/>
          <table:table-cell table:formula="of:=IF(OR([.R9]=&quot;&quot;;[.Q9]=&quot;&quot;);&quot;&quot;;[.R9]-[.Q9])">
            <text:p/>
          </table:table-cell>
          <table:table-cell table:formula="of:=IF(OR([.S9]=&quot;&quot;;[.A9]=&quot;&quot;);&quot;&quot;;[.S9]-[.A9])">
            <text:p/>
          </table:table-cell>
          <table:table-cell table:number-columns-repeated="3"/>
          <table:table-cell table:formula="of:=IF(OR([.W9]=&quot;&quot;;[.V9]=&quot;&quot;);&quot;&quot;;[.W9]-[.V9])">
            <text:p/>
          </table:table-cell>
          <table:table-cell table:formula="of:=IF(OR([.X9]=&quot;&quot;;[.A9]=&quot;&quot;);&quot;&quot;;[.X9]-[.A9])">
            <text:p/>
          </table:table-cell>
          <table:table-cell table:number-columns-repeated="3"/>
          <table:table-cell table:formula="of:=IF(OR([.AB9]=&quot;&quot;;[.AA9]=&quot;&quot;);&quot;&quot;;[.AB9]-[.AA9])">
            <text:p/>
          </table:table-cell>
          <table:table-cell table:formula="of:=IF(OR([.AC9]=&quot;&quot;;[.A9]=&quot;&quot;);&quot;&quot;;[.AC9]-[.A9])">
            <text:p/>
          </table:table-cell>
        </table:table-row>
        <table:table-row table:style-name="ro2">
          <table:table-cell table:number-columns-repeated="4"/>
          <table:table-cell table:formula="of:=IF(OR([.C10]=&quot;&quot;;[.B10]=&quot;&quot;);&quot;&quot;;[.C10]-[.B10])">
            <text:p/>
          </table:table-cell>
          <table:table-cell table:formula="of:=IF(OR([.D10]=&quot;&quot;;[.A10]=&quot;&quot;);&quot;&quot;;[.D10]-[.A10])">
            <text:p/>
          </table:table-cell>
          <table:table-cell table:number-columns-repeated="3"/>
          <table:table-cell table:formula="of:=IF(OR([.H10]=&quot;&quot;;[.G10]=&quot;&quot;);&quot;&quot;;[.H10]-[.G10])">
            <text:p/>
          </table:table-cell>
          <table:table-cell table:formula="of:=IF(OR([.I10]=&quot;&quot;;[.A10]=&quot;&quot;);&quot;&quot;;[.I10]-[.A10])">
            <text:p/>
          </table:table-cell>
          <table:table-cell table:number-columns-repeated="3"/>
          <table:table-cell table:formula="of:=IF(OR([.M10]=&quot;&quot;;[.L10]=&quot;&quot;);&quot;&quot;;[.M10]-[.L10])">
            <text:p/>
          </table:table-cell>
          <table:table-cell table:formula="of:=IF(OR([.N10]=&quot;&quot;;[.A10]=&quot;&quot;);&quot;&quot;;[.N10]-[.A10])">
            <text:p/>
          </table:table-cell>
          <table:table-cell table:number-columns-repeated="3"/>
          <table:table-cell table:formula="of:=IF(OR([.R10]=&quot;&quot;;[.Q10]=&quot;&quot;);&quot;&quot;;[.R10]-[.Q10])">
            <text:p/>
          </table:table-cell>
          <table:table-cell table:formula="of:=IF(OR([.S10]=&quot;&quot;;[.A10]=&quot;&quot;);&quot;&quot;;[.S10]-[.A10])">
            <text:p/>
          </table:table-cell>
          <table:table-cell table:number-columns-repeated="3"/>
          <table:table-cell table:formula="of:=IF(OR([.W10]=&quot;&quot;;[.V10]=&quot;&quot;);&quot;&quot;;[.W10]-[.V10])">
            <text:p/>
          </table:table-cell>
          <table:table-cell table:formula="of:=IF(OR([.X10]=&quot;&quot;;[.A10]=&quot;&quot;);&quot;&quot;;[.X10]-[.A10])">
            <text:p/>
          </table:table-cell>
          <table:table-cell table:number-columns-repeated="3"/>
          <table:table-cell table:formula="of:=IF(OR([.AB10]=&quot;&quot;;[.AA10]=&quot;&quot;);&quot;&quot;;[.AB10]-[.AA10])">
            <text:p/>
          </table:table-cell>
          <table:table-cell table:formula="of:=IF(OR([.AC10]=&quot;&quot;;[.A10]=&quot;&quot;);&quot;&quot;;[.AC10]-[.A10])">
            <text:p/>
          </table:table-cell>
        </table:table-row>
        <table:table-row table:style-name="ro2">
          <table:table-cell table:number-columns-repeated="4"/>
          <table:table-cell table:formula="of:=IF(OR([.C11]=&quot;&quot;;[.B11]=&quot;&quot;);&quot;&quot;;[.C11]-[.B11])">
            <text:p/>
          </table:table-cell>
          <table:table-cell table:formula="of:=IF(OR([.D11]=&quot;&quot;;[.A11]=&quot;&quot;);&quot;&quot;;[.D11]-[.A11])">
            <text:p/>
          </table:table-cell>
          <table:table-cell table:number-columns-repeated="3"/>
          <table:table-cell table:formula="of:=IF(OR([.H11]=&quot;&quot;;[.G11]=&quot;&quot;);&quot;&quot;;[.H11]-[.G11])">
            <text:p/>
          </table:table-cell>
          <table:table-cell table:formula="of:=IF(OR([.I11]=&quot;&quot;;[.A11]=&quot;&quot;);&quot;&quot;;[.I11]-[.A11])">
            <text:p/>
          </table:table-cell>
          <table:table-cell table:number-columns-repeated="3"/>
          <table:table-cell table:formula="of:=IF(OR([.M11]=&quot;&quot;;[.L11]=&quot;&quot;);&quot;&quot;;[.M11]-[.L11])">
            <text:p/>
          </table:table-cell>
          <table:table-cell table:formula="of:=IF(OR([.N11]=&quot;&quot;;[.A11]=&quot;&quot;);&quot;&quot;;[.N11]-[.A11])">
            <text:p/>
          </table:table-cell>
          <table:table-cell table:number-columns-repeated="3"/>
          <table:table-cell table:formula="of:=IF(OR([.R11]=&quot;&quot;;[.Q11]=&quot;&quot;);&quot;&quot;;[.R11]-[.Q11])">
            <text:p/>
          </table:table-cell>
          <table:table-cell table:formula="of:=IF(OR([.S11]=&quot;&quot;;[.A11]=&quot;&quot;);&quot;&quot;;[.S11]-[.A11])">
            <text:p/>
          </table:table-cell>
          <table:table-cell table:number-columns-repeated="3"/>
          <table:table-cell table:formula="of:=IF(OR([.W11]=&quot;&quot;;[.V11]=&quot;&quot;);&quot;&quot;;[.W11]-[.V11])">
            <text:p/>
          </table:table-cell>
          <table:table-cell table:formula="of:=IF(OR([.X11]=&quot;&quot;;[.A11]=&quot;&quot;);&quot;&quot;;[.X11]-[.A11])">
            <text:p/>
          </table:table-cell>
          <table:table-cell table:number-columns-repeated="3"/>
          <table:table-cell table:formula="of:=IF(OR([.AB11]=&quot;&quot;;[.AA11]=&quot;&quot;);&quot;&quot;;[.AB11]-[.AA11])">
            <text:p/>
          </table:table-cell>
          <table:table-cell table:formula="of:=IF(OR([.AC11]=&quot;&quot;;[.A11]=&quot;&quot;);&quot;&quot;;[.AC11]-[.A11])">
            <text:p/>
          </table:table-cell>
        </table:table-row>
        <table:table-row table:style-name="ro2">
          <table:table-cell office:value-type="float" office:value="-8.2" calcext:value-type="float">
            <text:p>-8.2</text:p>
          </table:table-cell>
          <table:table-cell office:value-type="float" office:value="-4.5" calcext:value-type="float">
            <text:p>-4.5</text:p>
          </table:table-cell>
          <table:table-cell table:number-columns-repeated="2"/>
          <table:table-cell table:formula="of:=IF(OR([.C12]=&quot;&quot;;[.B12]=&quot;&quot;);&quot;&quot;;[.C12]-[.B12])">
            <text:p/>
          </table:table-cell>
          <table:table-cell table:formula="of:=IF(OR([.D12]=&quot;&quot;;[.A12]=&quot;&quot;);&quot;&quot;;[.D12]-[.A12])">
            <text:p/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table:formula="of:=IF(OR([.H12]=&quot;&quot;;[.G12]=&quot;&quot;);&quot;&quot;;[.H12]-[.G12])">
            <text:p/>
          </table:table-cell>
          <table:table-cell table:formula="of:=IF(OR([.I12]=&quot;&quot;;[.A12]=&quot;&quot;);&quot;&quot;;[.I12]-[.A12])">
            <text:p/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table:formula="of:=IF(OR([.M12]=&quot;&quot;;[.L12]=&quot;&quot;);&quot;&quot;;[.M12]-[.L12])">
            <text:p/>
          </table:table-cell>
          <table:table-cell table:formula="of:=IF(OR([.N12]=&quot;&quot;;[.A12]=&quot;&quot;);&quot;&quot;;[.N12]-[.A12])">
            <text:p/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IF(OR([.R12]=&quot;&quot;;[.Q12]=&quot;&quot;);&quot;&quot;;[.R12]-[.Q12])">
            <text:p/>
          </table:table-cell>
          <table:table-cell table:formula="of:=IF(OR([.S12]=&quot;&quot;;[.A12]=&quot;&quot;);&quot;&quot;;[.S12]-[.A12]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(OR([.W12]=&quot;&quot;;[.V12]=&quot;&quot;);&quot;&quot;;[.W12]-[.V12])">
            <text:p/>
          </table:table-cell>
          <table:table-cell table:formula="of:=IF(OR([.X12]=&quot;&quot;;[.A12]=&quot;&quot;);&quot;&quot;;[.X12]-[.A12]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IF(OR([.AB12]=&quot;&quot;;[.AA12]=&quot;&quot;);&quot;&quot;;[.AB12]-[.AA12])">
            <text:p/>
          </table:table-cell>
          <table:table-cell table:formula="of:=IF(OR([.AC12]=&quot;&quot;;[.A12]=&quot;&quot;);&quot;&quot;;[.AC12]-[.A12])">
            <text:p/>
          </table:table-cell>
        </table:table-row>
        <table:table-row table:style-name="ro2">
          <table:table-cell table:number-columns-repeated="4"/>
          <table:table-cell table:formula="of:=IF(OR([.C13]=&quot;&quot;;[.B13]=&quot;&quot;);&quot;&quot;;[.C13]-[.B13])">
            <text:p/>
          </table:table-cell>
          <table:table-cell table:formula="of:=IF(OR([.D13]=&quot;&quot;;[.A13]=&quot;&quot;);&quot;&quot;;[.D13]-[.A13])">
            <text:p/>
          </table:table-cell>
          <table:table-cell table:number-columns-repeated="3"/>
          <table:table-cell table:formula="of:=IF(OR([.H13]=&quot;&quot;;[.G13]=&quot;&quot;);&quot;&quot;;[.H13]-[.G13])">
            <text:p/>
          </table:table-cell>
          <table:table-cell table:formula="of:=IF(OR([.I13]=&quot;&quot;;[.A13]=&quot;&quot;);&quot;&quot;;[.I13]-[.A13])">
            <text:p/>
          </table:table-cell>
          <table:table-cell table:number-columns-repeated="3"/>
          <table:table-cell table:formula="of:=IF(OR([.M13]=&quot;&quot;;[.L13]=&quot;&quot;);&quot;&quot;;[.M13]-[.L13])">
            <text:p/>
          </table:table-cell>
          <table:table-cell table:formula="of:=IF(OR([.N13]=&quot;&quot;;[.A13]=&quot;&quot;);&quot;&quot;;[.N13]-[.A13])">
            <text:p/>
          </table:table-cell>
          <table:table-cell table:number-columns-repeated="3"/>
          <table:table-cell table:formula="of:=IF(OR([.R13]=&quot;&quot;;[.Q13]=&quot;&quot;);&quot;&quot;;[.R13]-[.Q13])">
            <text:p/>
          </table:table-cell>
          <table:table-cell table:formula="of:=IF(OR([.S13]=&quot;&quot;;[.A13]=&quot;&quot;);&quot;&quot;;[.S13]-[.A13])">
            <text:p/>
          </table:table-cell>
          <table:table-cell table:number-columns-repeated="3"/>
          <table:table-cell table:formula="of:=IF(OR([.W13]=&quot;&quot;;[.V13]=&quot;&quot;);&quot;&quot;;[.W13]-[.V13])">
            <text:p/>
          </table:table-cell>
          <table:table-cell table:formula="of:=IF(OR([.X13]=&quot;&quot;;[.A13]=&quot;&quot;);&quot;&quot;;[.X13]-[.A13])">
            <text:p/>
          </table:table-cell>
          <table:table-cell table:number-columns-repeated="3"/>
          <table:table-cell table:formula="of:=IF(OR([.AB13]=&quot;&quot;;[.AA13]=&quot;&quot;);&quot;&quot;;[.AB13]-[.AA13])">
            <text:p/>
          </table:table-cell>
          <table:table-cell table:formula="of:=IF(OR([.AC13]=&quot;&quot;;[.A13]=&quot;&quot;);&quot;&quot;;[.AC13]-[.A13])">
            <text:p/>
          </table:table-cell>
        </table:table-row>
        <table:table-row table:style-name="ro2">
          <table:table-cell table:number-columns-repeated="4"/>
          <table:table-cell table:formula="of:=IF(OR([.C14]=&quot;&quot;;[.B14]=&quot;&quot;);&quot;&quot;;[.C14]-[.B14])">
            <text:p/>
          </table:table-cell>
          <table:table-cell table:formula="of:=IF(OR([.D14]=&quot;&quot;;[.A14]=&quot;&quot;);&quot;&quot;;[.D14]-[.A14])">
            <text:p/>
          </table:table-cell>
          <table:table-cell table:number-columns-repeated="3"/>
          <table:table-cell table:formula="of:=IF(OR([.H14]=&quot;&quot;;[.G14]=&quot;&quot;);&quot;&quot;;[.H14]-[.G14])">
            <text:p/>
          </table:table-cell>
          <table:table-cell table:formula="of:=IF(OR([.I14]=&quot;&quot;;[.A14]=&quot;&quot;);&quot;&quot;;[.I14]-[.A14])">
            <text:p/>
          </table:table-cell>
          <table:table-cell table:number-columns-repeated="3"/>
          <table:table-cell table:formula="of:=IF(OR([.M14]=&quot;&quot;;[.L14]=&quot;&quot;);&quot;&quot;;[.M14]-[.L14])">
            <text:p/>
          </table:table-cell>
          <table:table-cell table:formula="of:=IF(OR([.N14]=&quot;&quot;;[.A14]=&quot;&quot;);&quot;&quot;;[.N14]-[.A14])">
            <text:p/>
          </table:table-cell>
          <table:table-cell table:number-columns-repeated="3"/>
          <table:table-cell table:formula="of:=IF(OR([.R14]=&quot;&quot;;[.Q14]=&quot;&quot;);&quot;&quot;;[.R14]-[.Q14])">
            <text:p/>
          </table:table-cell>
          <table:table-cell table:formula="of:=IF(OR([.S14]=&quot;&quot;;[.A14]=&quot;&quot;);&quot;&quot;;[.S14]-[.A14])">
            <text:p/>
          </table:table-cell>
          <table:table-cell table:number-columns-repeated="3"/>
          <table:table-cell table:formula="of:=IF(OR([.W14]=&quot;&quot;;[.V14]=&quot;&quot;);&quot;&quot;;[.W14]-[.V14])">
            <text:p/>
          </table:table-cell>
          <table:table-cell table:formula="of:=IF(OR([.X14]=&quot;&quot;;[.A14]=&quot;&quot;);&quot;&quot;;[.X14]-[.A14])">
            <text:p/>
          </table:table-cell>
          <table:table-cell table:number-columns-repeated="3"/>
          <table:table-cell table:formula="of:=IF(OR([.AB14]=&quot;&quot;;[.AA14]=&quot;&quot;);&quot;&quot;;[.AB14]-[.AA14])">
            <text:p/>
          </table:table-cell>
          <table:table-cell table:formula="of:=IF(OR([.AC14]=&quot;&quot;;[.A14]=&quot;&quot;);&quot;&quot;;[.AC14]-[.A14])">
            <text:p/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table:formula="of:=IF(OR([.C15]=&quot;&quot;;[.B15]=&quot;&quot;);&quot;&quot;;[.C15]-[.B15])">
            <text:p/>
          </table:table-cell>
          <table:table-cell table:formula="of:=IF(OR([.D15]=&quot;&quot;;[.A15]=&quot;&quot;);&quot;&quot;;[.D15]-[.A15])">
            <text:p/>
          </table:table-cell>
          <table:table-cell office:value-type="float" office:value="-15.95" calcext:value-type="float">
            <text:p>-15.95</text:p>
          </table:table-cell>
          <table:table-cell table:number-columns-repeated="2"/>
          <table:table-cell table:formula="of:=IF(OR([.H15]=&quot;&quot;;[.G15]=&quot;&quot;);&quot;&quot;;[.H15]-[.G15])">
            <text:p/>
          </table:table-cell>
          <table:table-cell table:formula="of:=IF(OR([.I15]=&quot;&quot;;[.A15]=&quot;&quot;);&quot;&quot;;[.I15]-[.A15])">
            <text:p/>
          </table:table-cell>
          <table:table-cell office:value-type="float" office:value="-24.95" calcext:value-type="float">
            <text:p>-24.95</text:p>
          </table:table-cell>
          <table:table-cell table:number-columns-repeated="2"/>
          <table:table-cell table:formula="of:=IF(OR([.M15]=&quot;&quot;;[.L15]=&quot;&quot;);&quot;&quot;;[.M15]-[.L15])">
            <text:p/>
          </table:table-cell>
          <table:table-cell table:formula="of:=IF(OR([.N15]=&quot;&quot;;[.A15]=&quot;&quot;);&quot;&quot;;[.N15]-[.A15])"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OR([.R15]=&quot;&quot;;[.Q15]=&quot;&quot;);&quot;&quot;;[.R15]-[.Q15])">
            <text:p/>
          </table:table-cell>
          <table:table-cell table:formula="of:=IF(OR([.S15]=&quot;&quot;;[.A15]=&quot;&quot;);&quot;&quot;;[.S15]-[.A15]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IF(OR([.W15]=&quot;&quot;;[.V15]=&quot;&quot;);&quot;&quot;;[.W15]-[.V15])">
            <text:p/>
          </table:table-cell>
          <table:table-cell table:formula="of:=IF(OR([.X15]=&quot;&quot;;[.A15]=&quot;&quot;);&quot;&quot;;[.X15]-[.A15]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IF(OR([.AB15]=&quot;&quot;;[.AA15]=&quot;&quot;);&quot;&quot;;[.AB15]-[.AA15])">
            <text:p/>
          </table:table-cell>
          <table:table-cell table:formula="of:=IF(OR([.AC15]=&quot;&quot;;[.A15]=&quot;&quot;);&quot;&quot;;[.AC15]-[.A15])">
            <text:p/>
          </table:table-cell>
        </table:table-row>
        <table:table-row table:style-name="ro2">
          <table:table-cell table:number-columns-repeated="4"/>
          <table:table-cell table:formula="of:=IF(OR([.C16]=&quot;&quot;;[.B16]=&quot;&quot;);&quot;&quot;;[.C16]-[.B16])">
            <text:p/>
          </table:table-cell>
          <table:table-cell table:formula="of:=IF(OR([.D16]=&quot;&quot;;[.A16]=&quot;&quot;);&quot;&quot;;[.D16]-[.A16])">
            <text:p/>
          </table:table-cell>
          <table:table-cell table:number-columns-repeated="3"/>
          <table:table-cell table:formula="of:=IF(OR([.H16]=&quot;&quot;;[.G16]=&quot;&quot;);&quot;&quot;;[.H16]-[.G16])">
            <text:p/>
          </table:table-cell>
          <table:table-cell table:formula="of:=IF(OR([.I16]=&quot;&quot;;[.A16]=&quot;&quot;);&quot;&quot;;[.I16]-[.A16])">
            <text:p/>
          </table:table-cell>
          <table:table-cell table:number-columns-repeated="3"/>
          <table:table-cell table:formula="of:=IF(OR([.M16]=&quot;&quot;;[.L16]=&quot;&quot;);&quot;&quot;;[.M16]-[.L16])">
            <text:p/>
          </table:table-cell>
          <table:table-cell table:formula="of:=IF(OR([.N16]=&quot;&quot;;[.A16]=&quot;&quot;);&quot;&quot;;[.N16]-[.A16])">
            <text:p/>
          </table:table-cell>
          <table:table-cell table:number-columns-repeated="3"/>
          <table:table-cell table:formula="of:=IF(OR([.R16]=&quot;&quot;;[.Q16]=&quot;&quot;);&quot;&quot;;[.R16]-[.Q16])">
            <text:p/>
          </table:table-cell>
          <table:table-cell table:formula="of:=IF(OR([.S16]=&quot;&quot;;[.A16]=&quot;&quot;);&quot;&quot;;[.S16]-[.A16])">
            <text:p/>
          </table:table-cell>
          <table:table-cell table:number-columns-repeated="3"/>
          <table:table-cell table:formula="of:=IF(OR([.W16]=&quot;&quot;;[.V16]=&quot;&quot;);&quot;&quot;;[.W16]-[.V16])">
            <text:p/>
          </table:table-cell>
          <table:table-cell table:formula="of:=IF(OR([.X16]=&quot;&quot;;[.A16]=&quot;&quot;);&quot;&quot;;[.X16]-[.A16])">
            <text:p/>
          </table:table-cell>
          <table:table-cell table:number-columns-repeated="3"/>
          <table:table-cell table:formula="of:=IF(OR([.AB16]=&quot;&quot;;[.AA16]=&quot;&quot;);&quot;&quot;;[.AB16]-[.AA16])">
            <text:p/>
          </table:table-cell>
          <table:table-cell table:formula="of:=IF(OR([.AC16]=&quot;&quot;;[.A16]=&quot;&quot;);&quot;&quot;;[.AC16]-[.A16])">
            <text:p/>
          </table:table-cell>
        </table:table-row>
        <table:table-row table:style-name="ro2">
          <table:table-cell table:number-columns-repeated="4"/>
          <table:table-cell table:formula="of:=IF(OR([.C17]=&quot;&quot;;[.B17]=&quot;&quot;);&quot;&quot;;[.C17]-[.B17])">
            <text:p/>
          </table:table-cell>
          <table:table-cell table:formula="of:=IF(OR([.D17]=&quot;&quot;;[.A17]=&quot;&quot;);&quot;&quot;;[.D17]-[.A17])">
            <text:p/>
          </table:table-cell>
          <table:table-cell table:number-columns-repeated="3"/>
          <table:table-cell table:formula="of:=IF(OR([.H17]=&quot;&quot;;[.G17]=&quot;&quot;);&quot;&quot;;[.H17]-[.G17])">
            <text:p/>
          </table:table-cell>
          <table:table-cell table:formula="of:=IF(OR([.I17]=&quot;&quot;;[.A17]=&quot;&quot;);&quot;&quot;;[.I17]-[.A17])">
            <text:p/>
          </table:table-cell>
          <table:table-cell table:number-columns-repeated="3"/>
          <table:table-cell table:formula="of:=IF(OR([.M17]=&quot;&quot;;[.L17]=&quot;&quot;);&quot;&quot;;[.M17]-[.L17])">
            <text:p/>
          </table:table-cell>
          <table:table-cell table:formula="of:=IF(OR([.N17]=&quot;&quot;;[.A17]=&quot;&quot;);&quot;&quot;;[.N17]-[.A17])">
            <text:p/>
          </table:table-cell>
          <table:table-cell table:number-columns-repeated="3"/>
          <table:table-cell table:formula="of:=IF(OR([.R17]=&quot;&quot;;[.Q17]=&quot;&quot;);&quot;&quot;;[.R17]-[.Q17])">
            <text:p/>
          </table:table-cell>
          <table:table-cell table:formula="of:=IF(OR([.S17]=&quot;&quot;;[.A17]=&quot;&quot;);&quot;&quot;;[.S17]-[.A17])">
            <text:p/>
          </table:table-cell>
          <table:table-cell table:number-columns-repeated="3"/>
          <table:table-cell table:formula="of:=IF(OR([.W17]=&quot;&quot;;[.V17]=&quot;&quot;);&quot;&quot;;[.W17]-[.V17])">
            <text:p/>
          </table:table-cell>
          <table:table-cell table:formula="of:=IF(OR([.X17]=&quot;&quot;;[.A17]=&quot;&quot;);&quot;&quot;;[.X17]-[.A17])">
            <text:p/>
          </table:table-cell>
          <table:table-cell table:number-columns-repeated="3"/>
          <table:table-cell table:formula="of:=IF(OR([.AB17]=&quot;&quot;;[.AA17]=&quot;&quot;);&quot;&quot;;[.AB17]-[.AA17])">
            <text:p/>
          </table:table-cell>
          <table:table-cell table:formula="of:=IF(OR([.AC17]=&quot;&quot;;[.A17]=&quot;&quot;);&quot;&quot;;[.AC17]-[.A17])">
            <text:p/>
          </table:table-cell>
        </table:table-row>
        <table:table-row table:style-name="ro2">
          <table:table-cell table:number-columns-repeated="4"/>
          <table:table-cell table:formula="of:=IF(OR([.C18]=&quot;&quot;;[.B18]=&quot;&quot;);&quot;&quot;;[.C18]-[.B18])">
            <text:p/>
          </table:table-cell>
          <table:table-cell table:formula="of:=IF(OR([.D18]=&quot;&quot;;[.A18]=&quot;&quot;);&quot;&quot;;[.D18]-[.A18])">
            <text:p/>
          </table:table-cell>
          <table:table-cell table:number-columns-repeated="3"/>
          <table:table-cell table:formula="of:=IF(OR([.H18]=&quot;&quot;;[.G18]=&quot;&quot;);&quot;&quot;;[.H18]-[.G18])">
            <text:p/>
          </table:table-cell>
          <table:table-cell table:formula="of:=IF(OR([.I18]=&quot;&quot;;[.A18]=&quot;&quot;);&quot;&quot;;[.I18]-[.A18])">
            <text:p/>
          </table:table-cell>
          <table:table-cell table:number-columns-repeated="3"/>
          <table:table-cell table:formula="of:=IF(OR([.M18]=&quot;&quot;;[.L18]=&quot;&quot;);&quot;&quot;;[.M18]-[.L18])">
            <text:p/>
          </table:table-cell>
          <table:table-cell table:formula="of:=IF(OR([.N18]=&quot;&quot;;[.A18]=&quot;&quot;);&quot;&quot;;[.N18]-[.A18])">
            <text:p/>
          </table:table-cell>
          <table:table-cell table:number-columns-repeated="3"/>
          <table:table-cell table:formula="of:=IF(OR([.R18]=&quot;&quot;;[.Q18]=&quot;&quot;);&quot;&quot;;[.R18]-[.Q18])">
            <text:p/>
          </table:table-cell>
          <table:table-cell table:formula="of:=IF(OR([.S18]=&quot;&quot;;[.A18]=&quot;&quot;);&quot;&quot;;[.S18]-[.A18])">
            <text:p/>
          </table:table-cell>
          <table:table-cell table:number-columns-repeated="3"/>
          <table:table-cell table:formula="of:=IF(OR([.W18]=&quot;&quot;;[.V18]=&quot;&quot;);&quot;&quot;;[.W18]-[.V18])">
            <text:p/>
          </table:table-cell>
          <table:table-cell table:formula="of:=IF(OR([.X18]=&quot;&quot;;[.A18]=&quot;&quot;);&quot;&quot;;[.X18]-[.A18])">
            <text:p/>
          </table:table-cell>
          <table:table-cell table:number-columns-repeated="3"/>
          <table:table-cell table:formula="of:=IF(OR([.AB18]=&quot;&quot;;[.AA18]=&quot;&quot;);&quot;&quot;;[.AB18]-[.AA18])">
            <text:p/>
          </table:table-cell>
          <table:table-cell table:formula="of:=IF(OR([.AC18]=&quot;&quot;;[.A18]=&quot;&quot;);&quot;&quot;;[.AC18]-[.A18])">
            <text:p/>
          </table:table-cell>
        </table:table-row>
        <table:table-row table:style-name="ro2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table:formula="of:=IF(OR([.C19]=&quot;&quot;;[.B19]=&quot;&quot;);&quot;&quot;;[.C19]-[.B19])">
            <text:p/>
          </table:table-cell>
          <table:table-cell table:formula="of:=IF(OR([.D19]=&quot;&quot;;[.A19]=&quot;&quot;);&quot;&quot;;[.D19]-[.A19])">
            <text:p/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table:formula="of:=IF(OR([.H19]=&quot;&quot;;[.G19]=&quot;&quot;);&quot;&quot;;[.H19]-[.G19])">
            <text:p/>
          </table:table-cell>
          <table:table-cell table:formula="of:=IF(OR([.I19]=&quot;&quot;;[.A19]=&quot;&quot;);&quot;&quot;;[.I19]-[.A19])">
            <text:p/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table:formula="of:=IF(OR([.M19]=&quot;&quot;;[.L19]=&quot;&quot;);&quot;&quot;;[.M19]-[.L19])">
            <text:p/>
          </table:table-cell>
          <table:table-cell table:formula="of:=IF(OR([.N19]=&quot;&quot;;[.A19]=&quot;&quot;);&quot;&quot;;[.N19]-[.A19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OR([.R19]=&quot;&quot;;[.Q19]=&quot;&quot;);&quot;&quot;;[.R19]-[.Q19])">
            <text:p/>
          </table:table-cell>
          <table:table-cell table:formula="of:=IF(OR([.S19]=&quot;&quot;;[.A19]=&quot;&quot;);&quot;&quot;;[.S19]-[.A19]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(OR([.W19]=&quot;&quot;;[.V19]=&quot;&quot;);&quot;&quot;;[.W19]-[.V19])">
            <text:p/>
          </table:table-cell>
          <table:table-cell table:formula="of:=IF(OR([.X19]=&quot;&quot;;[.A19]=&quot;&quot;);&quot;&quot;;[.X19]-[.A19])">
            <text:p/>
          </table:table-cell>
          <table:table-cell table:number-columns-repeated="3"/>
          <table:table-cell table:formula="of:=IF(OR([.AB19]=&quot;&quot;;[.AA19]=&quot;&quot;);&quot;&quot;;[.AB19]-[.AA19])">
            <text:p/>
          </table:table-cell>
          <table:table-cell table:formula="of:=IF(OR([.AC19]=&quot;&quot;;[.A19]=&quot;&quot;);&quot;&quot;;[.AC19]-[.A19])">
            <text:p/>
          </table:table-cell>
        </table:table-row>
        <table:table-row table:style-name="ro2">
          <table:table-cell table:number-columns-repeated="4"/>
          <table:table-cell table:formula="of:=IF(OR([.C20]=&quot;&quot;;[.B20]=&quot;&quot;);&quot;&quot;;[.C20]-[.B20])">
            <text:p/>
          </table:table-cell>
          <table:table-cell table:formula="of:=IF(OR([.D20]=&quot;&quot;;[.A20]=&quot;&quot;);&quot;&quot;;[.D20]-[.A20])">
            <text:p/>
          </table:table-cell>
          <table:table-cell table:number-columns-repeated="3"/>
          <table:table-cell table:formula="of:=IF(OR([.H20]=&quot;&quot;;[.G20]=&quot;&quot;);&quot;&quot;;[.H20]-[.G20])">
            <text:p/>
          </table:table-cell>
          <table:table-cell table:formula="of:=IF(OR([.I20]=&quot;&quot;;[.A20]=&quot;&quot;);&quot;&quot;;[.I20]-[.A20])">
            <text:p/>
          </table:table-cell>
          <table:table-cell table:number-columns-repeated="3"/>
          <table:table-cell table:formula="of:=IF(OR([.M20]=&quot;&quot;;[.L20]=&quot;&quot;);&quot;&quot;;[.M20]-[.L20])">
            <text:p/>
          </table:table-cell>
          <table:table-cell table:formula="of:=IF(OR([.N20]=&quot;&quot;;[.A20]=&quot;&quot;);&quot;&quot;;[.N20]-[.A20])">
            <text:p/>
          </table:table-cell>
          <table:table-cell table:number-columns-repeated="3"/>
          <table:table-cell table:formula="of:=IF(OR([.R20]=&quot;&quot;;[.Q20]=&quot;&quot;);&quot;&quot;;[.R20]-[.Q20])">
            <text:p/>
          </table:table-cell>
          <table:table-cell table:formula="of:=IF(OR([.S20]=&quot;&quot;;[.A20]=&quot;&quot;);&quot;&quot;;[.S20]-[.A20])">
            <text:p/>
          </table:table-cell>
          <table:table-cell table:number-columns-repeated="3"/>
          <table:table-cell table:formula="of:=IF(OR([.W20]=&quot;&quot;;[.V20]=&quot;&quot;);&quot;&quot;;[.W20]-[.V20])">
            <text:p/>
          </table:table-cell>
          <table:table-cell table:formula="of:=IF(OR([.X20]=&quot;&quot;;[.A20]=&quot;&quot;);&quot;&quot;;[.X20]-[.A20])">
            <text:p/>
          </table:table-cell>
          <table:table-cell table:number-columns-repeated="3"/>
          <table:table-cell table:formula="of:=IF(OR([.AB20]=&quot;&quot;;[.AA20]=&quot;&quot;);&quot;&quot;;[.AB20]-[.AA20])">
            <text:p/>
          </table:table-cell>
          <table:table-cell table:formula="of:=IF(OR([.AC20]=&quot;&quot;;[.A20]=&quot;&quot;);&quot;&quot;;[.AC20]-[.A20])">
            <text:p/>
          </table:table-cell>
        </table:table-row>
        <table:table-row table:style-name="ro2">
          <table:table-cell table:number-columns-repeated="4"/>
          <table:table-cell table:formula="of:=IF(OR([.C21]=&quot;&quot;;[.B21]=&quot;&quot;);&quot;&quot;;[.C21]-[.B21])">
            <text:p/>
          </table:table-cell>
          <table:table-cell table:formula="of:=IF(OR([.D21]=&quot;&quot;;[.A21]=&quot;&quot;);&quot;&quot;;[.D21]-[.A21])">
            <text:p/>
          </table:table-cell>
          <table:table-cell table:number-columns-repeated="3"/>
          <table:table-cell table:formula="of:=IF(OR([.H21]=&quot;&quot;;[.G21]=&quot;&quot;);&quot;&quot;;[.H21]-[.G21])">
            <text:p/>
          </table:table-cell>
          <table:table-cell table:formula="of:=IF(OR([.I21]=&quot;&quot;;[.A21]=&quot;&quot;);&quot;&quot;;[.I21]-[.A21])">
            <text:p/>
          </table:table-cell>
          <table:table-cell table:number-columns-repeated="3"/>
          <table:table-cell table:formula="of:=IF(OR([.M21]=&quot;&quot;;[.L21]=&quot;&quot;);&quot;&quot;;[.M21]-[.L21])">
            <text:p/>
          </table:table-cell>
          <table:table-cell table:formula="of:=IF(OR([.N21]=&quot;&quot;;[.A21]=&quot;&quot;);&quot;&quot;;[.N21]-[.A21])">
            <text:p/>
          </table:table-cell>
          <table:table-cell table:number-columns-repeated="3"/>
          <table:table-cell table:formula="of:=IF(OR([.R21]=&quot;&quot;;[.Q21]=&quot;&quot;);&quot;&quot;;[.R21]-[.Q21])">
            <text:p/>
          </table:table-cell>
          <table:table-cell table:formula="of:=IF(OR([.S21]=&quot;&quot;;[.A21]=&quot;&quot;);&quot;&quot;;[.S21]-[.A21])">
            <text:p/>
          </table:table-cell>
          <table:table-cell table:number-columns-repeated="3"/>
          <table:table-cell table:formula="of:=IF(OR([.W21]=&quot;&quot;;[.V21]=&quot;&quot;);&quot;&quot;;[.W21]-[.V21])">
            <text:p/>
          </table:table-cell>
          <table:table-cell table:formula="of:=IF(OR([.X21]=&quot;&quot;;[.A21]=&quot;&quot;);&quot;&quot;;[.X21]-[.A21])">
            <text:p/>
          </table:table-cell>
          <table:table-cell table:number-columns-repeated="3"/>
          <table:table-cell table:formula="of:=IF(OR([.AB21]=&quot;&quot;;[.AA21]=&quot;&quot;);&quot;&quot;;[.AB21]-[.AA21])">
            <text:p/>
          </table:table-cell>
          <table:table-cell table:formula="of:=IF(OR([.AC21]=&quot;&quot;;[.A21]=&quot;&quot;);&quot;&quot;;[.AC21]-[.A21])">
            <text:p/>
          </table:table-cell>
        </table:table-row>
        <table:table-row table:style-name="ro2">
          <table:table-cell table:number-columns-repeated="4"/>
          <table:table-cell table:formula="of:=IF(OR([.C22]=&quot;&quot;;[.B22]=&quot;&quot;);&quot;&quot;;[.C22]-[.B22])">
            <text:p/>
          </table:table-cell>
          <table:table-cell table:formula="of:=IF(OR([.D22]=&quot;&quot;;[.A22]=&quot;&quot;);&quot;&quot;;[.D22]-[.A22])">
            <text:p/>
          </table:table-cell>
          <table:table-cell table:number-columns-repeated="3"/>
          <table:table-cell table:formula="of:=IF(OR([.H22]=&quot;&quot;;[.G22]=&quot;&quot;);&quot;&quot;;[.H22]-[.G22])">
            <text:p/>
          </table:table-cell>
          <table:table-cell table:formula="of:=IF(OR([.I22]=&quot;&quot;;[.A22]=&quot;&quot;);&quot;&quot;;[.I22]-[.A22])">
            <text:p/>
          </table:table-cell>
          <table:table-cell table:number-columns-repeated="3"/>
          <table:table-cell table:formula="of:=IF(OR([.M22]=&quot;&quot;;[.L22]=&quot;&quot;);&quot;&quot;;[.M22]-[.L22])">
            <text:p/>
          </table:table-cell>
          <table:table-cell table:formula="of:=IF(OR([.N22]=&quot;&quot;;[.A22]=&quot;&quot;);&quot;&quot;;[.N22]-[.A22])">
            <text:p/>
          </table:table-cell>
          <table:table-cell table:number-columns-repeated="3"/>
          <table:table-cell table:formula="of:=IF(OR([.R22]=&quot;&quot;;[.Q22]=&quot;&quot;);&quot;&quot;;[.R22]-[.Q22])">
            <text:p/>
          </table:table-cell>
          <table:table-cell table:formula="of:=IF(OR([.S22]=&quot;&quot;;[.A22]=&quot;&quot;);&quot;&quot;;[.S22]-[.A22])">
            <text:p/>
          </table:table-cell>
          <table:table-cell table:number-columns-repeated="3"/>
          <table:table-cell table:formula="of:=IF(OR([.W22]=&quot;&quot;;[.V22]=&quot;&quot;);&quot;&quot;;[.W22]-[.V22])">
            <text:p/>
          </table:table-cell>
          <table:table-cell table:formula="of:=IF(OR([.X22]=&quot;&quot;;[.A22]=&quot;&quot;);&quot;&quot;;[.X22]-[.A22])">
            <text:p/>
          </table:table-cell>
          <table:table-cell table:number-columns-repeated="3"/>
          <table:table-cell table:formula="of:=IF(OR([.AB22]=&quot;&quot;;[.AA22]=&quot;&quot;);&quot;&quot;;[.AB22]-[.AA22])">
            <text:p/>
          </table:table-cell>
          <table:table-cell table:formula="of:=IF(OR([.AC22]=&quot;&quot;;[.A22]=&quot;&quot;);&quot;&quot;;[.AC22]-[.A22])">
            <text:p/>
          </table:table-cell>
        </table:table-row>
        <table:table-row table:style-name="ro2">
          <table:table-cell table:number-columns-repeated="4"/>
          <table:table-cell table:formula="of:=IF(OR([.C23]=&quot;&quot;;[.B23]=&quot;&quot;);&quot;&quot;;[.C23]-[.B23])">
            <text:p/>
          </table:table-cell>
          <table:table-cell table:formula="of:=IF(OR([.D23]=&quot;&quot;;[.A23]=&quot;&quot;);&quot;&quot;;[.D23]-[.A23])">
            <text:p/>
          </table:table-cell>
          <table:table-cell table:number-columns-repeated="3"/>
          <table:table-cell table:formula="of:=IF(OR([.H23]=&quot;&quot;;[.G23]=&quot;&quot;);&quot;&quot;;[.H23]-[.G23])">
            <text:p/>
          </table:table-cell>
          <table:table-cell table:formula="of:=IF(OR([.I23]=&quot;&quot;;[.A23]=&quot;&quot;);&quot;&quot;;[.I23]-[.A23])">
            <text:p/>
          </table:table-cell>
          <table:table-cell table:number-columns-repeated="3"/>
          <table:table-cell table:formula="of:=IF(OR([.M23]=&quot;&quot;;[.L23]=&quot;&quot;);&quot;&quot;;[.M23]-[.L23])">
            <text:p/>
          </table:table-cell>
          <table:table-cell table:formula="of:=IF(OR([.N23]=&quot;&quot;;[.A23]=&quot;&quot;);&quot;&quot;;[.N23]-[.A23])">
            <text:p/>
          </table:table-cell>
          <table:table-cell table:number-columns-repeated="3"/>
          <table:table-cell table:formula="of:=IF(OR([.R23]=&quot;&quot;;[.Q23]=&quot;&quot;);&quot;&quot;;[.R23]-[.Q23])">
            <text:p/>
          </table:table-cell>
          <table:table-cell table:formula="of:=IF(OR([.S23]=&quot;&quot;;[.A23]=&quot;&quot;);&quot;&quot;;[.S23]-[.A23])">
            <text:p/>
          </table:table-cell>
          <table:table-cell table:number-columns-repeated="3"/>
          <table:table-cell table:formula="of:=IF(OR([.W23]=&quot;&quot;;[.V23]=&quot;&quot;);&quot;&quot;;[.W23]-[.V23])">
            <text:p/>
          </table:table-cell>
          <table:table-cell table:formula="of:=IF(OR([.X23]=&quot;&quot;;[.A23]=&quot;&quot;);&quot;&quot;;[.X23]-[.A23])">
            <text:p/>
          </table:table-cell>
          <table:table-cell table:number-columns-repeated="3"/>
          <table:table-cell table:formula="of:=IF(OR([.AB23]=&quot;&quot;;[.AA23]=&quot;&quot;);&quot;&quot;;[.AB23]-[.AA23])">
            <text:p/>
          </table:table-cell>
          <table:table-cell table:formula="of:=IF(OR([.AC23]=&quot;&quot;;[.A23]=&quot;&quot;);&quot;&quot;;[.AC23]-[.A23])">
            <text:p/>
          </table:table-cell>
        </table:table-row>
        <table:table-row table:style-name="ro2">
          <table:table-cell table:number-columns-repeated="4"/>
          <table:table-cell table:formula="of:=IF(OR([.C24]=&quot;&quot;;[.B24]=&quot;&quot;);&quot;&quot;;[.C24]-[.B24])">
            <text:p/>
          </table:table-cell>
          <table:table-cell table:formula="of:=IF(OR([.D24]=&quot;&quot;;[.A24]=&quot;&quot;);&quot;&quot;;[.D24]-[.A24])">
            <text:p/>
          </table:table-cell>
          <table:table-cell table:number-columns-repeated="3"/>
          <table:table-cell table:formula="of:=IF(OR([.H24]=&quot;&quot;;[.G24]=&quot;&quot;);&quot;&quot;;[.H24]-[.G24])">
            <text:p/>
          </table:table-cell>
          <table:table-cell table:formula="of:=IF(OR([.I24]=&quot;&quot;;[.A24]=&quot;&quot;);&quot;&quot;;[.I24]-[.A24])">
            <text:p/>
          </table:table-cell>
          <table:table-cell table:number-columns-repeated="3"/>
          <table:table-cell table:formula="of:=IF(OR([.M24]=&quot;&quot;;[.L24]=&quot;&quot;);&quot;&quot;;[.M24]-[.L24])">
            <text:p/>
          </table:table-cell>
          <table:table-cell table:formula="of:=IF(OR([.N24]=&quot;&quot;;[.A24]=&quot;&quot;);&quot;&quot;;[.N24]-[.A24])">
            <text:p/>
          </table:table-cell>
          <table:table-cell table:number-columns-repeated="3"/>
          <table:table-cell table:formula="of:=IF(OR([.R24]=&quot;&quot;;[.Q24]=&quot;&quot;);&quot;&quot;;[.R24]-[.Q24])">
            <text:p/>
          </table:table-cell>
          <table:table-cell table:formula="of:=IF(OR([.S24]=&quot;&quot;;[.A24]=&quot;&quot;);&quot;&quot;;[.S24]-[.A24])">
            <text:p/>
          </table:table-cell>
          <table:table-cell table:number-columns-repeated="3"/>
          <table:table-cell table:formula="of:=IF(OR([.W24]=&quot;&quot;;[.V24]=&quot;&quot;);&quot;&quot;;[.W24]-[.V24])">
            <text:p/>
          </table:table-cell>
          <table:table-cell table:formula="of:=IF(OR([.X24]=&quot;&quot;;[.A24]=&quot;&quot;);&quot;&quot;;[.X24]-[.A24])">
            <text:p/>
          </table:table-cell>
          <table:table-cell table:number-columns-repeated="3"/>
          <table:table-cell table:formula="of:=IF(OR([.AB24]=&quot;&quot;;[.AA24]=&quot;&quot;);&quot;&quot;;[.AB24]-[.AA24])">
            <text:p/>
          </table:table-cell>
          <table:table-cell table:formula="of:=IF(OR([.AC24]=&quot;&quot;;[.A24]=&quot;&quot;);&quot;&quot;;[.AC24]-[.A24])">
            <text:p/>
          </table:table-cell>
        </table:table-row>
        <table:table-row table:style-name="ro2">
          <table:table-cell table:number-columns-repeated="4"/>
          <table:table-cell table:formula="of:=IF(OR([.C25]=&quot;&quot;;[.B25]=&quot;&quot;);&quot;&quot;;[.C25]-[.B25])">
            <text:p/>
          </table:table-cell>
          <table:table-cell table:formula="of:=IF(OR([.D25]=&quot;&quot;;[.A25]=&quot;&quot;);&quot;&quot;;[.D25]-[.A25])">
            <text:p/>
          </table:table-cell>
          <table:table-cell table:number-columns-repeated="3"/>
          <table:table-cell table:formula="of:=IF(OR([.H25]=&quot;&quot;;[.G25]=&quot;&quot;);&quot;&quot;;[.H25]-[.G25])">
            <text:p/>
          </table:table-cell>
          <table:table-cell table:formula="of:=IF(OR([.I25]=&quot;&quot;;[.A25]=&quot;&quot;);&quot;&quot;;[.I25]-[.A25])">
            <text:p/>
          </table:table-cell>
          <table:table-cell table:number-columns-repeated="3"/>
          <table:table-cell table:formula="of:=IF(OR([.M25]=&quot;&quot;;[.L25]=&quot;&quot;);&quot;&quot;;[.M25]-[.L25])">
            <text:p/>
          </table:table-cell>
          <table:table-cell table:formula="of:=IF(OR([.N25]=&quot;&quot;;[.A25]=&quot;&quot;);&quot;&quot;;[.N25]-[.A25])">
            <text:p/>
          </table:table-cell>
          <table:table-cell table:number-columns-repeated="3"/>
          <table:table-cell table:formula="of:=IF(OR([.R25]=&quot;&quot;;[.Q25]=&quot;&quot;);&quot;&quot;;[.R25]-[.Q25])">
            <text:p/>
          </table:table-cell>
          <table:table-cell table:formula="of:=IF(OR([.S25]=&quot;&quot;;[.A25]=&quot;&quot;);&quot;&quot;;[.S25]-[.A25])">
            <text:p/>
          </table:table-cell>
          <table:table-cell table:number-columns-repeated="3"/>
          <table:table-cell table:formula="of:=IF(OR([.W25]=&quot;&quot;;[.V25]=&quot;&quot;);&quot;&quot;;[.W25]-[.V25])">
            <text:p/>
          </table:table-cell>
          <table:table-cell table:formula="of:=IF(OR([.X25]=&quot;&quot;;[.A25]=&quot;&quot;);&quot;&quot;;[.X25]-[.A25])">
            <text:p/>
          </table:table-cell>
          <table:table-cell table:number-columns-repeated="3"/>
          <table:table-cell table:formula="of:=IF(OR([.AB25]=&quot;&quot;;[.AA25]=&quot;&quot;);&quot;&quot;;[.AB25]-[.AA25])">
            <text:p/>
          </table:table-cell>
          <table:table-cell table:formula="of:=IF(OR([.AC25]=&quot;&quot;;[.A25]=&quot;&quot;);&quot;&quot;;[.AC25]-[.A25])">
            <text:p/>
          </table:table-cell>
        </table:table-row>
        <table:table-row table:style-name="ro2">
          <table:table-cell table:number-columns-repeated="4"/>
          <table:table-cell table:formula="of:=IF(OR([.C26]=&quot;&quot;;[.B26]=&quot;&quot;);&quot;&quot;;[.C26]-[.B26])">
            <text:p/>
          </table:table-cell>
          <table:table-cell table:formula="of:=IF(OR([.D26]=&quot;&quot;;[.A26]=&quot;&quot;);&quot;&quot;;[.D26]-[.A26])">
            <text:p/>
          </table:table-cell>
          <table:table-cell table:number-columns-repeated="3"/>
          <table:table-cell table:formula="of:=IF(OR([.H26]=&quot;&quot;;[.G26]=&quot;&quot;);&quot;&quot;;[.H26]-[.G26])">
            <text:p/>
          </table:table-cell>
          <table:table-cell table:formula="of:=IF(OR([.I26]=&quot;&quot;;[.A26]=&quot;&quot;);&quot;&quot;;[.I26]-[.A26])">
            <text:p/>
          </table:table-cell>
          <table:table-cell table:number-columns-repeated="3"/>
          <table:table-cell table:formula="of:=IF(OR([.M26]=&quot;&quot;;[.L26]=&quot;&quot;);&quot;&quot;;[.M26]-[.L26])">
            <text:p/>
          </table:table-cell>
          <table:table-cell table:formula="of:=IF(OR([.N26]=&quot;&quot;;[.A26]=&quot;&quot;);&quot;&quot;;[.N26]-[.A26])">
            <text:p/>
          </table:table-cell>
          <table:table-cell table:number-columns-repeated="3"/>
          <table:table-cell table:formula="of:=IF(OR([.R26]=&quot;&quot;;[.Q26]=&quot;&quot;);&quot;&quot;;[.R26]-[.Q26])">
            <text:p/>
          </table:table-cell>
          <table:table-cell table:formula="of:=IF(OR([.S26]=&quot;&quot;;[.A26]=&quot;&quot;);&quot;&quot;;[.S26]-[.A26])">
            <text:p/>
          </table:table-cell>
          <table:table-cell table:number-columns-repeated="3"/>
          <table:table-cell table:formula="of:=IF(OR([.W26]=&quot;&quot;;[.V26]=&quot;&quot;);&quot;&quot;;[.W26]-[.V26])">
            <text:p/>
          </table:table-cell>
          <table:table-cell table:formula="of:=IF(OR([.X26]=&quot;&quot;;[.A26]=&quot;&quot;);&quot;&quot;;[.X26]-[.A26])">
            <text:p/>
          </table:table-cell>
          <table:table-cell table:number-columns-repeated="3"/>
          <table:table-cell table:formula="of:=IF(OR([.AB26]=&quot;&quot;;[.AA26]=&quot;&quot;);&quot;&quot;;[.AB26]-[.AA26])">
            <text:p/>
          </table:table-cell>
          <table:table-cell table:formula="of:=IF(OR([.AC26]=&quot;&quot;;[.A26]=&quot;&quot;);&quot;&quot;;[.AC26]-[.A26])">
            <text:p/>
          </table:table-cell>
        </table:table-row>
        <table:table-row table:style-name="ro2">
          <table:table-cell table:number-columns-repeated="4"/>
          <table:table-cell table:formula="of:=IF(OR([.C27]=&quot;&quot;;[.B27]=&quot;&quot;);&quot;&quot;;[.C27]-[.B27])">
            <text:p/>
          </table:table-cell>
          <table:table-cell table:formula="of:=IF(OR([.D27]=&quot;&quot;;[.A27]=&quot;&quot;);&quot;&quot;;[.D27]-[.A27])">
            <text:p/>
          </table:table-cell>
          <table:table-cell table:number-columns-repeated="3"/>
          <table:table-cell table:formula="of:=IF(OR([.H27]=&quot;&quot;;[.G27]=&quot;&quot;);&quot;&quot;;[.H27]-[.G27])">
            <text:p/>
          </table:table-cell>
          <table:table-cell table:formula="of:=IF(OR([.I27]=&quot;&quot;;[.A27]=&quot;&quot;);&quot;&quot;;[.I27]-[.A27])">
            <text:p/>
          </table:table-cell>
          <table:table-cell table:number-columns-repeated="3"/>
          <table:table-cell table:formula="of:=IF(OR([.M27]=&quot;&quot;;[.L27]=&quot;&quot;);&quot;&quot;;[.M27]-[.L27])">
            <text:p/>
          </table:table-cell>
          <table:table-cell table:formula="of:=IF(OR([.N27]=&quot;&quot;;[.A27]=&quot;&quot;);&quot;&quot;;[.N27]-[.A27])">
            <text:p/>
          </table:table-cell>
          <table:table-cell table:number-columns-repeated="3"/>
          <table:table-cell table:formula="of:=IF(OR([.R27]=&quot;&quot;;[.Q27]=&quot;&quot;);&quot;&quot;;[.R27]-[.Q27])">
            <text:p/>
          </table:table-cell>
          <table:table-cell table:formula="of:=IF(OR([.S27]=&quot;&quot;;[.A27]=&quot;&quot;);&quot;&quot;;[.S27]-[.A27])">
            <text:p/>
          </table:table-cell>
          <table:table-cell table:number-columns-repeated="3"/>
          <table:table-cell table:formula="of:=IF(OR([.W27]=&quot;&quot;;[.V27]=&quot;&quot;);&quot;&quot;;[.W27]-[.V27])">
            <text:p/>
          </table:table-cell>
          <table:table-cell table:formula="of:=IF(OR([.X27]=&quot;&quot;;[.A27]=&quot;&quot;);&quot;&quot;;[.X27]-[.A27])">
            <text:p/>
          </table:table-cell>
          <table:table-cell table:number-columns-repeated="3"/>
          <table:table-cell table:formula="of:=IF(OR([.AB27]=&quot;&quot;;[.AA27]=&quot;&quot;);&quot;&quot;;[.AB27]-[.AA27])">
            <text:p/>
          </table:table-cell>
          <table:table-cell table:formula="of:=IF(OR([.AC27]=&quot;&quot;;[.A27]=&quot;&quot;);&quot;&quot;;[.AC27]-[.A27])">
            <text:p/>
          </table:table-cell>
        </table:table-row>
        <table:table-row table:style-name="ro2">
          <table:table-cell table:number-columns-repeated="4"/>
          <table:table-cell table:formula="of:=IF(OR([.C28]=&quot;&quot;;[.B28]=&quot;&quot;);&quot;&quot;;[.C28]-[.B28])">
            <text:p/>
          </table:table-cell>
          <table:table-cell table:formula="of:=IF(OR([.D28]=&quot;&quot;;[.A28]=&quot;&quot;);&quot;&quot;;[.D28]-[.A28])">
            <text:p/>
          </table:table-cell>
          <table:table-cell table:number-columns-repeated="3"/>
          <table:table-cell table:formula="of:=IF(OR([.H28]=&quot;&quot;;[.G28]=&quot;&quot;);&quot;&quot;;[.H28]-[.G28])">
            <text:p/>
          </table:table-cell>
          <table:table-cell table:formula="of:=IF(OR([.I28]=&quot;&quot;;[.A28]=&quot;&quot;);&quot;&quot;;[.I28]-[.A28])">
            <text:p/>
          </table:table-cell>
          <table:table-cell table:number-columns-repeated="3"/>
          <table:table-cell table:formula="of:=IF(OR([.M28]=&quot;&quot;;[.L28]=&quot;&quot;);&quot;&quot;;[.M28]-[.L28])">
            <text:p/>
          </table:table-cell>
          <table:table-cell table:formula="of:=IF(OR([.N28]=&quot;&quot;;[.A28]=&quot;&quot;);&quot;&quot;;[.N28]-[.A28])">
            <text:p/>
          </table:table-cell>
          <table:table-cell table:number-columns-repeated="3"/>
          <table:table-cell table:formula="of:=IF(OR([.R28]=&quot;&quot;;[.Q28]=&quot;&quot;);&quot;&quot;;[.R28]-[.Q28])">
            <text:p/>
          </table:table-cell>
          <table:table-cell table:formula="of:=IF(OR([.S28]=&quot;&quot;;[.A28]=&quot;&quot;);&quot;&quot;;[.S28]-[.A28])">
            <text:p/>
          </table:table-cell>
          <table:table-cell table:number-columns-repeated="3"/>
          <table:table-cell table:formula="of:=IF(OR([.W28]=&quot;&quot;;[.V28]=&quot;&quot;);&quot;&quot;;[.W28]-[.V28])">
            <text:p/>
          </table:table-cell>
          <table:table-cell table:formula="of:=IF(OR([.X28]=&quot;&quot;;[.A28]=&quot;&quot;);&quot;&quot;;[.X28]-[.A28])">
            <text:p/>
          </table:table-cell>
          <table:table-cell table:number-columns-repeated="3"/>
          <table:table-cell table:formula="of:=IF(OR([.AB28]=&quot;&quot;;[.AA28]=&quot;&quot;);&quot;&quot;;[.AB28]-[.AA28])">
            <text:p/>
          </table:table-cell>
          <table:table-cell table:formula="of:=IF(OR([.AC28]=&quot;&quot;;[.A28]=&quot;&quot;);&quot;&quot;;[.AC28]-[.A28])">
            <text:p/>
          </table:table-cell>
        </table:table-row>
        <table:table-row table:style-name="ro2">
          <table:table-cell table:number-columns-repeated="4"/>
          <table:table-cell table:formula="of:=IF(OR([.C29]=&quot;&quot;;[.B29]=&quot;&quot;);&quot;&quot;;[.C29]-[.B29])">
            <text:p/>
          </table:table-cell>
          <table:table-cell table:formula="of:=IF(OR([.D29]=&quot;&quot;;[.A29]=&quot;&quot;);&quot;&quot;;[.D29]-[.A29])">
            <text:p/>
          </table:table-cell>
          <table:table-cell table:number-columns-repeated="3"/>
          <table:table-cell table:formula="of:=IF(OR([.H29]=&quot;&quot;;[.G29]=&quot;&quot;);&quot;&quot;;[.H29]-[.G29])">
            <text:p/>
          </table:table-cell>
          <table:table-cell table:formula="of:=IF(OR([.I29]=&quot;&quot;;[.A29]=&quot;&quot;);&quot;&quot;;[.I29]-[.A29])">
            <text:p/>
          </table:table-cell>
          <table:table-cell table:number-columns-repeated="3"/>
          <table:table-cell table:formula="of:=IF(OR([.M29]=&quot;&quot;;[.L29]=&quot;&quot;);&quot;&quot;;[.M29]-[.L29])">
            <text:p/>
          </table:table-cell>
          <table:table-cell table:formula="of:=IF(OR([.N29]=&quot;&quot;;[.A29]=&quot;&quot;);&quot;&quot;;[.N29]-[.A29])">
            <text:p/>
          </table:table-cell>
          <table:table-cell table:number-columns-repeated="3"/>
          <table:table-cell table:formula="of:=IF(OR([.R29]=&quot;&quot;;[.Q29]=&quot;&quot;);&quot;&quot;;[.R29]-[.Q29])">
            <text:p/>
          </table:table-cell>
          <table:table-cell table:formula="of:=IF(OR([.S29]=&quot;&quot;;[.A29]=&quot;&quot;);&quot;&quot;;[.S29]-[.A29])">
            <text:p/>
          </table:table-cell>
          <table:table-cell table:number-columns-repeated="3"/>
          <table:table-cell table:formula="of:=IF(OR([.W29]=&quot;&quot;;[.V29]=&quot;&quot;);&quot;&quot;;[.W29]-[.V29])">
            <text:p/>
          </table:table-cell>
          <table:table-cell table:formula="of:=IF(OR([.X29]=&quot;&quot;;[.A29]=&quot;&quot;);&quot;&quot;;[.X29]-[.A29])">
            <text:p/>
          </table:table-cell>
          <table:table-cell table:number-columns-repeated="3"/>
          <table:table-cell table:formula="of:=IF(OR([.AB29]=&quot;&quot;;[.AA29]=&quot;&quot;);&quot;&quot;;[.AB29]-[.AA29])">
            <text:p/>
          </table:table-cell>
          <table:table-cell table:formula="of:=IF(OR([.AC29]=&quot;&quot;;[.A29]=&quot;&quot;);&quot;&quot;;[.AC29]-[.A29])">
            <text:p/>
          </table:table-cell>
        </table:table-row>
        <table:table-row table:style-name="ro2">
          <table:table-cell table:number-columns-repeated="4"/>
          <table:table-cell table:formula="of:=IF(OR([.C30]=&quot;&quot;;[.B30]=&quot;&quot;);&quot;&quot;;[.C30]-[.B30])">
            <text:p/>
          </table:table-cell>
          <table:table-cell table:formula="of:=IF(OR([.D30]=&quot;&quot;;[.A30]=&quot;&quot;);&quot;&quot;;[.D30]-[.A30])">
            <text:p/>
          </table:table-cell>
          <table:table-cell table:number-columns-repeated="3"/>
          <table:table-cell table:formula="of:=IF(OR([.H30]=&quot;&quot;;[.G30]=&quot;&quot;);&quot;&quot;;[.H30]-[.G30])">
            <text:p/>
          </table:table-cell>
          <table:table-cell table:formula="of:=IF(OR([.I30]=&quot;&quot;;[.A30]=&quot;&quot;);&quot;&quot;;[.I30]-[.A30])">
            <text:p/>
          </table:table-cell>
          <table:table-cell table:number-columns-repeated="3"/>
          <table:table-cell table:formula="of:=IF(OR([.M30]=&quot;&quot;;[.L30]=&quot;&quot;);&quot;&quot;;[.M30]-[.L30])">
            <text:p/>
          </table:table-cell>
          <table:table-cell table:formula="of:=IF(OR([.N30]=&quot;&quot;;[.A30]=&quot;&quot;);&quot;&quot;;[.N30]-[.A30])">
            <text:p/>
          </table:table-cell>
          <table:table-cell table:number-columns-repeated="3"/>
          <table:table-cell table:formula="of:=IF(OR([.R30]=&quot;&quot;;[.Q30]=&quot;&quot;);&quot;&quot;;[.R30]-[.Q30])">
            <text:p/>
          </table:table-cell>
          <table:table-cell table:formula="of:=IF(OR([.S30]=&quot;&quot;;[.A30]=&quot;&quot;);&quot;&quot;;[.S30]-[.A30])">
            <text:p/>
          </table:table-cell>
          <table:table-cell table:number-columns-repeated="3"/>
          <table:table-cell table:formula="of:=IF(OR([.W30]=&quot;&quot;;[.V30]=&quot;&quot;);&quot;&quot;;[.W30]-[.V30])">
            <text:p/>
          </table:table-cell>
          <table:table-cell table:formula="of:=IF(OR([.X30]=&quot;&quot;;[.A30]=&quot;&quot;);&quot;&quot;;[.X30]-[.A30])">
            <text:p/>
          </table:table-cell>
          <table:table-cell table:number-columns-repeated="3"/>
          <table:table-cell table:formula="of:=IF(OR([.AB30]=&quot;&quot;;[.AA30]=&quot;&quot;);&quot;&quot;;[.AB30]-[.AA30])">
            <text:p/>
          </table:table-cell>
          <table:table-cell table:formula="of:=IF(OR([.AC30]=&quot;&quot;;[.A30]=&quot;&quot;);&quot;&quot;;[.AC30]-[.A30])">
            <text:p/>
          </table:table-cell>
        </table:table-row>
        <table:table-row table:style-name="ro2">
          <table:table-cell table:number-columns-repeated="4"/>
          <table:table-cell table:formula="of:=IF(OR([.C31]=&quot;&quot;;[.B31]=&quot;&quot;);&quot;&quot;;[.C31]-[.B31])">
            <text:p/>
          </table:table-cell>
          <table:table-cell table:formula="of:=IF(OR([.D31]=&quot;&quot;;[.A31]=&quot;&quot;);&quot;&quot;;[.D31]-[.A31])">
            <text:p/>
          </table:table-cell>
          <table:table-cell table:number-columns-repeated="3"/>
          <table:table-cell table:formula="of:=IF(OR([.H31]=&quot;&quot;;[.G31]=&quot;&quot;);&quot;&quot;;[.H31]-[.G31])">
            <text:p/>
          </table:table-cell>
          <table:table-cell table:formula="of:=IF(OR([.I31]=&quot;&quot;;[.A31]=&quot;&quot;);&quot;&quot;;[.I31]-[.A31])">
            <text:p/>
          </table:table-cell>
          <table:table-cell table:number-columns-repeated="3"/>
          <table:table-cell table:formula="of:=IF(OR([.M31]=&quot;&quot;;[.L31]=&quot;&quot;);&quot;&quot;;[.M31]-[.L31])">
            <text:p/>
          </table:table-cell>
          <table:table-cell table:formula="of:=IF(OR([.N31]=&quot;&quot;;[.A31]=&quot;&quot;);&quot;&quot;;[.N31]-[.A31])">
            <text:p/>
          </table:table-cell>
          <table:table-cell table:number-columns-repeated="3"/>
          <table:table-cell table:formula="of:=IF(OR([.R31]=&quot;&quot;;[.Q31]=&quot;&quot;);&quot;&quot;;[.R31]-[.Q31])">
            <text:p/>
          </table:table-cell>
          <table:table-cell table:formula="of:=IF(OR([.S31]=&quot;&quot;;[.A31]=&quot;&quot;);&quot;&quot;;[.S31]-[.A31])">
            <text:p/>
          </table:table-cell>
          <table:table-cell table:number-columns-repeated="3"/>
          <table:table-cell table:formula="of:=IF(OR([.W31]=&quot;&quot;;[.V31]=&quot;&quot;);&quot;&quot;;[.W31]-[.V31])">
            <text:p/>
          </table:table-cell>
          <table:table-cell table:formula="of:=IF(OR([.X31]=&quot;&quot;;[.A31]=&quot;&quot;);&quot;&quot;;[.X31]-[.A31])">
            <text:p/>
          </table:table-cell>
          <table:table-cell table:number-columns-repeated="3"/>
          <table:table-cell table:formula="of:=IF(OR([.AB31]=&quot;&quot;;[.AA31]=&quot;&quot;);&quot;&quot;;[.AB31]-[.AA31])">
            <text:p/>
          </table:table-cell>
          <table:table-cell table:formula="of:=IF(OR([.AC31]=&quot;&quot;;[.A31]=&quot;&quot;);&quot;&quot;;[.AC31]-[.A31])">
            <text:p/>
          </table:table-cell>
        </table:table-row>
        <table:table-row table:style-name="ro2">
          <table:table-cell table:number-columns-repeated="4"/>
          <table:table-cell table:formula="of:=IF(OR([.C32]=&quot;&quot;;[.B32]=&quot;&quot;);&quot;&quot;;[.C32]-[.B32])">
            <text:p/>
          </table:table-cell>
          <table:table-cell table:formula="of:=IF(OR([.D32]=&quot;&quot;;[.A32]=&quot;&quot;);&quot;&quot;;[.D32]-[.A32])">
            <text:p/>
          </table:table-cell>
          <table:table-cell table:number-columns-repeated="3"/>
          <table:table-cell table:formula="of:=IF(OR([.H32]=&quot;&quot;;[.G32]=&quot;&quot;);&quot;&quot;;[.H32]-[.G32])">
            <text:p/>
          </table:table-cell>
          <table:table-cell table:formula="of:=IF(OR([.I32]=&quot;&quot;;[.A32]=&quot;&quot;);&quot;&quot;;[.I32]-[.A32])">
            <text:p/>
          </table:table-cell>
          <table:table-cell table:number-columns-repeated="3"/>
          <table:table-cell table:formula="of:=IF(OR([.M32]=&quot;&quot;;[.L32]=&quot;&quot;);&quot;&quot;;[.M32]-[.L32])">
            <text:p/>
          </table:table-cell>
          <table:table-cell table:formula="of:=IF(OR([.N32]=&quot;&quot;;[.A32]=&quot;&quot;);&quot;&quot;;[.N32]-[.A32])">
            <text:p/>
          </table:table-cell>
          <table:table-cell table:number-columns-repeated="3"/>
          <table:table-cell table:formula="of:=IF(OR([.R32]=&quot;&quot;;[.Q32]=&quot;&quot;);&quot;&quot;;[.R32]-[.Q32])">
            <text:p/>
          </table:table-cell>
          <table:table-cell table:formula="of:=IF(OR([.S32]=&quot;&quot;;[.A32]=&quot;&quot;);&quot;&quot;;[.S32]-[.A32])">
            <text:p/>
          </table:table-cell>
          <table:table-cell table:number-columns-repeated="3"/>
          <table:table-cell table:formula="of:=IF(OR([.W32]=&quot;&quot;;[.V32]=&quot;&quot;);&quot;&quot;;[.W32]-[.V32])">
            <text:p/>
          </table:table-cell>
          <table:table-cell table:formula="of:=IF(OR([.X32]=&quot;&quot;;[.A32]=&quot;&quot;);&quot;&quot;;[.X32]-[.A32])">
            <text:p/>
          </table:table-cell>
          <table:table-cell table:number-columns-repeated="3"/>
          <table:table-cell table:formula="of:=IF(OR([.AB32]=&quot;&quot;;[.AA32]=&quot;&quot;);&quot;&quot;;[.AB32]-[.AA32])">
            <text:p/>
          </table:table-cell>
          <table:table-cell table:formula="of:=IF(OR([.AC32]=&quot;&quot;;[.A32]=&quot;&quot;);&quot;&quot;;[.AC32]-[.A32])">
            <text:p/>
          </table:table-cell>
        </table:table-row>
        <table:table-row table:style-name="ro2">
          <table:table-cell table:number-columns-repeated="4"/>
          <table:table-cell table:formula="of:=IF(OR([.C33]=&quot;&quot;;[.B33]=&quot;&quot;);&quot;&quot;;[.C33]-[.B33])">
            <text:p/>
          </table:table-cell>
          <table:table-cell table:formula="of:=IF(OR([.D33]=&quot;&quot;;[.A33]=&quot;&quot;);&quot;&quot;;[.D33]-[.A33])">
            <text:p/>
          </table:table-cell>
          <table:table-cell table:number-columns-repeated="3"/>
          <table:table-cell table:formula="of:=IF(OR([.H33]=&quot;&quot;;[.G33]=&quot;&quot;);&quot;&quot;;[.H33]-[.G33])">
            <text:p/>
          </table:table-cell>
          <table:table-cell table:formula="of:=IF(OR([.I33]=&quot;&quot;;[.A33]=&quot;&quot;);&quot;&quot;;[.I33]-[.A33])">
            <text:p/>
          </table:table-cell>
          <table:table-cell table:number-columns-repeated="3"/>
          <table:table-cell table:formula="of:=IF(OR([.M33]=&quot;&quot;;[.L33]=&quot;&quot;);&quot;&quot;;[.M33]-[.L33])">
            <text:p/>
          </table:table-cell>
          <table:table-cell table:formula="of:=IF(OR([.N33]=&quot;&quot;;[.A33]=&quot;&quot;);&quot;&quot;;[.N33]-[.A33])">
            <text:p/>
          </table:table-cell>
          <table:table-cell table:number-columns-repeated="3"/>
          <table:table-cell table:formula="of:=IF(OR([.R33]=&quot;&quot;;[.Q33]=&quot;&quot;);&quot;&quot;;[.R33]-[.Q33])">
            <text:p/>
          </table:table-cell>
          <table:table-cell table:formula="of:=IF(OR([.S33]=&quot;&quot;;[.A33]=&quot;&quot;);&quot;&quot;;[.S33]-[.A33])">
            <text:p/>
          </table:table-cell>
          <table:table-cell table:number-columns-repeated="3"/>
          <table:table-cell table:formula="of:=IF(OR([.W33]=&quot;&quot;;[.V33]=&quot;&quot;);&quot;&quot;;[.W33]-[.V33])">
            <text:p/>
          </table:table-cell>
          <table:table-cell table:formula="of:=IF(OR([.X33]=&quot;&quot;;[.A33]=&quot;&quot;);&quot;&quot;;[.X33]-[.A33])">
            <text:p/>
          </table:table-cell>
          <table:table-cell table:number-columns-repeated="3"/>
          <table:table-cell table:formula="of:=IF(OR([.AB33]=&quot;&quot;;[.AA33]=&quot;&quot;);&quot;&quot;;[.AB33]-[.AA33])">
            <text:p/>
          </table:table-cell>
          <table:table-cell table:formula="of:=IF(OR([.AC33]=&quot;&quot;;[.A33]=&quot;&quot;);&quot;&quot;;[.AC33]-[.A33])">
            <text:p/>
          </table:table-cell>
        </table:table-row>
        <table:table-row table:style-name="ro2">
          <table:table-cell table:number-columns-repeated="4"/>
          <table:table-cell table:formula="of:=IF(OR([.C34]=&quot;&quot;;[.B34]=&quot;&quot;);&quot;&quot;;[.C34]-[.B34])">
            <text:p/>
          </table:table-cell>
          <table:table-cell table:formula="of:=IF(OR([.D34]=&quot;&quot;;[.A34]=&quot;&quot;);&quot;&quot;;[.D34]-[.A34])">
            <text:p/>
          </table:table-cell>
          <table:table-cell table:number-columns-repeated="3"/>
          <table:table-cell table:formula="of:=IF(OR([.H34]=&quot;&quot;;[.G34]=&quot;&quot;);&quot;&quot;;[.H34]-[.G34])">
            <text:p/>
          </table:table-cell>
          <table:table-cell table:formula="of:=IF(OR([.I34]=&quot;&quot;;[.A34]=&quot;&quot;);&quot;&quot;;[.I34]-[.A34])">
            <text:p/>
          </table:table-cell>
          <table:table-cell table:number-columns-repeated="3"/>
          <table:table-cell table:formula="of:=IF(OR([.M34]=&quot;&quot;;[.L34]=&quot;&quot;);&quot;&quot;;[.M34]-[.L34])">
            <text:p/>
          </table:table-cell>
          <table:table-cell table:formula="of:=IF(OR([.N34]=&quot;&quot;;[.A34]=&quot;&quot;);&quot;&quot;;[.N34]-[.A34])">
            <text:p/>
          </table:table-cell>
          <table:table-cell table:number-columns-repeated="3"/>
          <table:table-cell table:formula="of:=IF(OR([.R34]=&quot;&quot;;[.Q34]=&quot;&quot;);&quot;&quot;;[.R34]-[.Q34])">
            <text:p/>
          </table:table-cell>
          <table:table-cell table:formula="of:=IF(OR([.S34]=&quot;&quot;;[.A34]=&quot;&quot;);&quot;&quot;;[.S34]-[.A34])">
            <text:p/>
          </table:table-cell>
          <table:table-cell table:number-columns-repeated="3"/>
          <table:table-cell table:formula="of:=IF(OR([.W34]=&quot;&quot;;[.V34]=&quot;&quot;);&quot;&quot;;[.W34]-[.V34])">
            <text:p/>
          </table:table-cell>
          <table:table-cell table:formula="of:=IF(OR([.X34]=&quot;&quot;;[.A34]=&quot;&quot;);&quot;&quot;;[.X34]-[.A34])">
            <text:p/>
          </table:table-cell>
          <table:table-cell table:number-columns-repeated="3"/>
          <table:table-cell table:formula="of:=IF(OR([.AB34]=&quot;&quot;;[.AA34]=&quot;&quot;);&quot;&quot;;[.AB34]-[.AA34])">
            <text:p/>
          </table:table-cell>
          <table:table-cell table:formula="of:=IF(OR([.AC34]=&quot;&quot;;[.A34]=&quot;&quot;);&quot;&quot;;[.AC34]-[.A34])">
            <text:p/>
          </table:table-cell>
        </table:table-row>
        <table:table-row table:style-name="ro2">
          <table:table-cell table:number-columns-repeated="4"/>
          <table:table-cell table:formula="of:=IF(OR([.C35]=&quot;&quot;;[.B35]=&quot;&quot;);&quot;&quot;;[.C35]-[.B35])">
            <text:p/>
          </table:table-cell>
          <table:table-cell table:formula="of:=IF(OR([.D35]=&quot;&quot;;[.A35]=&quot;&quot;);&quot;&quot;;[.D35]-[.A35])">
            <text:p/>
          </table:table-cell>
          <table:table-cell table:number-columns-repeated="3"/>
          <table:table-cell table:formula="of:=IF(OR([.H35]=&quot;&quot;;[.G35]=&quot;&quot;);&quot;&quot;;[.H35]-[.G35])">
            <text:p/>
          </table:table-cell>
          <table:table-cell table:formula="of:=IF(OR([.I35]=&quot;&quot;;[.A35]=&quot;&quot;);&quot;&quot;;[.I35]-[.A35])">
            <text:p/>
          </table:table-cell>
          <table:table-cell table:number-columns-repeated="3"/>
          <table:table-cell table:formula="of:=IF(OR([.M35]=&quot;&quot;;[.L35]=&quot;&quot;);&quot;&quot;;[.M35]-[.L35])">
            <text:p/>
          </table:table-cell>
          <table:table-cell table:formula="of:=IF(OR([.N35]=&quot;&quot;;[.A35]=&quot;&quot;);&quot;&quot;;[.N35]-[.A35])">
            <text:p/>
          </table:table-cell>
          <table:table-cell table:number-columns-repeated="3"/>
          <table:table-cell table:formula="of:=IF(OR([.R35]=&quot;&quot;;[.Q35]=&quot;&quot;);&quot;&quot;;[.R35]-[.Q35])">
            <text:p/>
          </table:table-cell>
          <table:table-cell table:formula="of:=IF(OR([.S35]=&quot;&quot;;[.A35]=&quot;&quot;);&quot;&quot;;[.S35]-[.A35])">
            <text:p/>
          </table:table-cell>
          <table:table-cell table:number-columns-repeated="3"/>
          <table:table-cell table:formula="of:=IF(OR([.W35]=&quot;&quot;;[.V35]=&quot;&quot;);&quot;&quot;;[.W35]-[.V35])">
            <text:p/>
          </table:table-cell>
          <table:table-cell table:formula="of:=IF(OR([.X35]=&quot;&quot;;[.A35]=&quot;&quot;);&quot;&quot;;[.X35]-[.A35])">
            <text:p/>
          </table:table-cell>
          <table:table-cell table:number-columns-repeated="3"/>
          <table:table-cell table:formula="of:=IF(OR([.AB35]=&quot;&quot;;[.AA35]=&quot;&quot;);&quot;&quot;;[.AB35]-[.AA35])">
            <text:p/>
          </table:table-cell>
          <table:table-cell table:formula="of:=IF(OR([.AC35]=&quot;&quot;;[.A35]=&quot;&quot;);&quot;&quot;;[.AC35]-[.A35])">
            <text:p/>
          </table:table-cell>
        </table:table-row>
        <table:table-row table:style-name="ro2">
          <table:table-cell table:number-columns-repeated="4"/>
          <table:table-cell table:formula="of:=IF(OR([.C36]=&quot;&quot;;[.B36]=&quot;&quot;);&quot;&quot;;[.C36]-[.B36])">
            <text:p/>
          </table:table-cell>
          <table:table-cell table:formula="of:=IF(OR([.D36]=&quot;&quot;;[.A36]=&quot;&quot;);&quot;&quot;;[.D36]-[.A36])">
            <text:p/>
          </table:table-cell>
          <table:table-cell table:number-columns-repeated="3"/>
          <table:table-cell table:formula="of:=IF(OR([.H36]=&quot;&quot;;[.G36]=&quot;&quot;);&quot;&quot;;[.H36]-[.G36])">
            <text:p/>
          </table:table-cell>
          <table:table-cell table:formula="of:=IF(OR([.I36]=&quot;&quot;;[.A36]=&quot;&quot;);&quot;&quot;;[.I36]-[.A36])">
            <text:p/>
          </table:table-cell>
          <table:table-cell table:number-columns-repeated="3"/>
          <table:table-cell table:formula="of:=IF(OR([.M36]=&quot;&quot;;[.L36]=&quot;&quot;);&quot;&quot;;[.M36]-[.L36])">
            <text:p/>
          </table:table-cell>
          <table:table-cell table:formula="of:=IF(OR([.N36]=&quot;&quot;;[.A36]=&quot;&quot;);&quot;&quot;;[.N36]-[.A36])">
            <text:p/>
          </table:table-cell>
          <table:table-cell table:number-columns-repeated="3"/>
          <table:table-cell table:formula="of:=IF(OR([.R36]=&quot;&quot;;[.Q36]=&quot;&quot;);&quot;&quot;;[.R36]-[.Q36])">
            <text:p/>
          </table:table-cell>
          <table:table-cell table:formula="of:=IF(OR([.S36]=&quot;&quot;;[.A36]=&quot;&quot;);&quot;&quot;;[.S36]-[.A36])">
            <text:p/>
          </table:table-cell>
          <table:table-cell table:number-columns-repeated="3"/>
          <table:table-cell table:formula="of:=IF(OR([.W36]=&quot;&quot;;[.V36]=&quot;&quot;);&quot;&quot;;[.W36]-[.V36])">
            <text:p/>
          </table:table-cell>
          <table:table-cell table:formula="of:=IF(OR([.X36]=&quot;&quot;;[.A36]=&quot;&quot;);&quot;&quot;;[.X36]-[.A36])">
            <text:p/>
          </table:table-cell>
          <table:table-cell table:number-columns-repeated="3"/>
          <table:table-cell table:formula="of:=IF(OR([.AB36]=&quot;&quot;;[.AA36]=&quot;&quot;);&quot;&quot;;[.AB36]-[.AA36])">
            <text:p/>
          </table:table-cell>
          <table:table-cell table:formula="of:=IF(OR([.AC36]=&quot;&quot;;[.A36]=&quot;&quot;);&quot;&quot;;[.AC36]-[.A36])">
            <text:p/>
          </table:table-cell>
        </table:table-row>
        <table:table-row table:style-name="ro2">
          <table:table-cell table:number-columns-repeated="4"/>
          <table:table-cell table:formula="of:=IF(OR([.C37]=&quot;&quot;;[.B37]=&quot;&quot;);&quot;&quot;;[.C37]-[.B37])">
            <text:p/>
          </table:table-cell>
          <table:table-cell table:formula="of:=IF(OR([.D37]=&quot;&quot;;[.A37]=&quot;&quot;);&quot;&quot;;[.D37]-[.A37])">
            <text:p/>
          </table:table-cell>
          <table:table-cell table:number-columns-repeated="3"/>
          <table:table-cell table:formula="of:=IF(OR([.H37]=&quot;&quot;;[.G37]=&quot;&quot;);&quot;&quot;;[.H37]-[.G37])">
            <text:p/>
          </table:table-cell>
          <table:table-cell table:formula="of:=IF(OR([.I37]=&quot;&quot;;[.A37]=&quot;&quot;);&quot;&quot;;[.I37]-[.A37])">
            <text:p/>
          </table:table-cell>
          <table:table-cell table:number-columns-repeated="3"/>
          <table:table-cell table:formula="of:=IF(OR([.M37]=&quot;&quot;;[.L37]=&quot;&quot;);&quot;&quot;;[.M37]-[.L37])">
            <text:p/>
          </table:table-cell>
          <table:table-cell table:formula="of:=IF(OR([.N37]=&quot;&quot;;[.A37]=&quot;&quot;);&quot;&quot;;[.N37]-[.A37])">
            <text:p/>
          </table:table-cell>
          <table:table-cell table:number-columns-repeated="3"/>
          <table:table-cell table:formula="of:=IF(OR([.R37]=&quot;&quot;;[.Q37]=&quot;&quot;);&quot;&quot;;[.R37]-[.Q37])">
            <text:p/>
          </table:table-cell>
          <table:table-cell table:formula="of:=IF(OR([.S37]=&quot;&quot;;[.A37]=&quot;&quot;);&quot;&quot;;[.S37]-[.A37])">
            <text:p/>
          </table:table-cell>
          <table:table-cell table:number-columns-repeated="3"/>
          <table:table-cell table:formula="of:=IF(OR([.W37]=&quot;&quot;;[.V37]=&quot;&quot;);&quot;&quot;;[.W37]-[.V37])">
            <text:p/>
          </table:table-cell>
          <table:table-cell table:formula="of:=IF(OR([.X37]=&quot;&quot;;[.A37]=&quot;&quot;);&quot;&quot;;[.X37]-[.A37])">
            <text:p/>
          </table:table-cell>
          <table:table-cell table:number-columns-repeated="3"/>
          <table:table-cell table:formula="of:=IF(OR([.AB37]=&quot;&quot;;[.AA37]=&quot;&quot;);&quot;&quot;;[.AB37]-[.AA37])">
            <text:p/>
          </table:table-cell>
          <table:table-cell table:formula="of:=IF(OR([.AC37]=&quot;&quot;;[.A37]=&quot;&quot;);&quot;&quot;;[.AC37]-[.A37])">
            <text:p/>
          </table:table-cell>
        </table:table-row>
        <table:table-row table:style-name="ro2">
          <table:table-cell table:number-columns-repeated="4"/>
          <table:table-cell table:formula="of:=IF(OR([.C38]=&quot;&quot;;[.B38]=&quot;&quot;);&quot;&quot;;[.C38]-[.B38])">
            <text:p/>
          </table:table-cell>
          <table:table-cell table:formula="of:=IF(OR([.D38]=&quot;&quot;;[.A38]=&quot;&quot;);&quot;&quot;;[.D38]-[.A38])">
            <text:p/>
          </table:table-cell>
          <table:table-cell table:number-columns-repeated="3"/>
          <table:table-cell table:formula="of:=IF(OR([.H38]=&quot;&quot;;[.G38]=&quot;&quot;);&quot;&quot;;[.H38]-[.G38])">
            <text:p/>
          </table:table-cell>
          <table:table-cell table:formula="of:=IF(OR([.I38]=&quot;&quot;;[.A38]=&quot;&quot;);&quot;&quot;;[.I38]-[.A38])">
            <text:p/>
          </table:table-cell>
          <table:table-cell table:number-columns-repeated="3"/>
          <table:table-cell table:formula="of:=IF(OR([.M38]=&quot;&quot;;[.L38]=&quot;&quot;);&quot;&quot;;[.M38]-[.L38])">
            <text:p/>
          </table:table-cell>
          <table:table-cell table:formula="of:=IF(OR([.N38]=&quot;&quot;;[.A38]=&quot;&quot;);&quot;&quot;;[.N38]-[.A38])">
            <text:p/>
          </table:table-cell>
          <table:table-cell table:number-columns-repeated="3"/>
          <table:table-cell table:formula="of:=IF(OR([.R38]=&quot;&quot;;[.Q38]=&quot;&quot;);&quot;&quot;;[.R38]-[.Q38])">
            <text:p/>
          </table:table-cell>
          <table:table-cell table:formula="of:=IF(OR([.S38]=&quot;&quot;;[.A38]=&quot;&quot;);&quot;&quot;;[.S38]-[.A38])">
            <text:p/>
          </table:table-cell>
          <table:table-cell table:number-columns-repeated="3"/>
          <table:table-cell table:formula="of:=IF(OR([.W38]=&quot;&quot;;[.V38]=&quot;&quot;);&quot;&quot;;[.W38]-[.V38])">
            <text:p/>
          </table:table-cell>
          <table:table-cell table:formula="of:=IF(OR([.X38]=&quot;&quot;;[.A38]=&quot;&quot;);&quot;&quot;;[.X38]-[.A38])">
            <text:p/>
          </table:table-cell>
          <table:table-cell table:number-columns-repeated="3"/>
          <table:table-cell table:formula="of:=IF(OR([.AB38]=&quot;&quot;;[.AA38]=&quot;&quot;);&quot;&quot;;[.AB38]-[.AA38])">
            <text:p/>
          </table:table-cell>
          <table:table-cell table:formula="of:=IF(OR([.AC38]=&quot;&quot;;[.A38]=&quot;&quot;);&quot;&quot;;[.AC38]-[.A38])">
            <text:p/>
          </table:table-cell>
        </table:table-row>
        <table:table-row table:style-name="ro2">
          <table:table-cell table:number-columns-repeated="4"/>
          <table:table-cell table:formula="of:=IF(OR([.C39]=&quot;&quot;;[.B39]=&quot;&quot;);&quot;&quot;;[.C39]-[.B39])">
            <text:p/>
          </table:table-cell>
          <table:table-cell table:formula="of:=IF(OR([.D39]=&quot;&quot;;[.A39]=&quot;&quot;);&quot;&quot;;[.D39]-[.A39])">
            <text:p/>
          </table:table-cell>
          <table:table-cell table:number-columns-repeated="3"/>
          <table:table-cell table:formula="of:=IF(OR([.H39]=&quot;&quot;;[.G39]=&quot;&quot;);&quot;&quot;;[.H39]-[.G39])">
            <text:p/>
          </table:table-cell>
          <table:table-cell table:formula="of:=IF(OR([.I39]=&quot;&quot;;[.A39]=&quot;&quot;);&quot;&quot;;[.I39]-[.A39])">
            <text:p/>
          </table:table-cell>
          <table:table-cell table:number-columns-repeated="3"/>
          <table:table-cell table:formula="of:=IF(OR([.M39]=&quot;&quot;;[.L39]=&quot;&quot;);&quot;&quot;;[.M39]-[.L39])">
            <text:p/>
          </table:table-cell>
          <table:table-cell table:formula="of:=IF(OR([.N39]=&quot;&quot;;[.A39]=&quot;&quot;);&quot;&quot;;[.N39]-[.A39])">
            <text:p/>
          </table:table-cell>
          <table:table-cell table:number-columns-repeated="3"/>
          <table:table-cell table:formula="of:=IF(OR([.R39]=&quot;&quot;;[.Q39]=&quot;&quot;);&quot;&quot;;[.R39]-[.Q39])">
            <text:p/>
          </table:table-cell>
          <table:table-cell table:formula="of:=IF(OR([.S39]=&quot;&quot;;[.A39]=&quot;&quot;);&quot;&quot;;[.S39]-[.A39])">
            <text:p/>
          </table:table-cell>
          <table:table-cell table:number-columns-repeated="3"/>
          <table:table-cell table:formula="of:=IF(OR([.W39]=&quot;&quot;;[.V39]=&quot;&quot;);&quot;&quot;;[.W39]-[.V39])">
            <text:p/>
          </table:table-cell>
          <table:table-cell table:formula="of:=IF(OR([.X39]=&quot;&quot;;[.A39]=&quot;&quot;);&quot;&quot;;[.X39]-[.A39])">
            <text:p/>
          </table:table-cell>
          <table:table-cell table:number-columns-repeated="3"/>
          <table:table-cell table:formula="of:=IF(OR([.AB39]=&quot;&quot;;[.AA39]=&quot;&quot;);&quot;&quot;;[.AB39]-[.AA39])">
            <text:p/>
          </table:table-cell>
          <table:table-cell table:formula="of:=IF(OR([.AC39]=&quot;&quot;;[.A39]=&quot;&quot;);&quot;&quot;;[.AC39]-[.A39])">
            <text:p/>
          </table:table-cell>
        </table:table-row>
        <table:table-row table:style-name="ro2">
          <table:table-cell table:number-columns-repeated="4"/>
          <table:table-cell table:formula="of:=IF(OR([.C40]=&quot;&quot;;[.B40]=&quot;&quot;);&quot;&quot;;[.C40]-[.B40])">
            <text:p/>
          </table:table-cell>
          <table:table-cell table:formula="of:=IF(OR([.D40]=&quot;&quot;;[.A40]=&quot;&quot;);&quot;&quot;;[.D40]-[.A40])">
            <text:p/>
          </table:table-cell>
          <table:table-cell table:number-columns-repeated="3"/>
          <table:table-cell table:formula="of:=IF(OR([.H40]=&quot;&quot;;[.G40]=&quot;&quot;);&quot;&quot;;[.H40]-[.G40])">
            <text:p/>
          </table:table-cell>
          <table:table-cell table:formula="of:=IF(OR([.I40]=&quot;&quot;;[.A40]=&quot;&quot;);&quot;&quot;;[.I40]-[.A40])">
            <text:p/>
          </table:table-cell>
          <table:table-cell table:number-columns-repeated="3"/>
          <table:table-cell table:formula="of:=IF(OR([.M40]=&quot;&quot;;[.L40]=&quot;&quot;);&quot;&quot;;[.M40]-[.L40])">
            <text:p/>
          </table:table-cell>
          <table:table-cell table:formula="of:=IF(OR([.N40]=&quot;&quot;;[.A40]=&quot;&quot;);&quot;&quot;;[.N40]-[.A40])">
            <text:p/>
          </table:table-cell>
          <table:table-cell table:number-columns-repeated="3"/>
          <table:table-cell table:formula="of:=IF(OR([.R40]=&quot;&quot;;[.Q40]=&quot;&quot;);&quot;&quot;;[.R40]-[.Q40])">
            <text:p/>
          </table:table-cell>
          <table:table-cell table:formula="of:=IF(OR([.S40]=&quot;&quot;;[.A40]=&quot;&quot;);&quot;&quot;;[.S40]-[.A40])">
            <text:p/>
          </table:table-cell>
          <table:table-cell table:number-columns-repeated="3"/>
          <table:table-cell table:formula="of:=IF(OR([.W40]=&quot;&quot;;[.V40]=&quot;&quot;);&quot;&quot;;[.W40]-[.V40])">
            <text:p/>
          </table:table-cell>
          <table:table-cell table:formula="of:=IF(OR([.X40]=&quot;&quot;;[.A40]=&quot;&quot;);&quot;&quot;;[.X40]-[.A40])">
            <text:p/>
          </table:table-cell>
          <table:table-cell table:number-columns-repeated="3"/>
          <table:table-cell table:formula="of:=IF(OR([.AB40]=&quot;&quot;;[.AA40]=&quot;&quot;);&quot;&quot;;[.AB40]-[.AA40])">
            <text:p/>
          </table:table-cell>
          <table:table-cell table:formula="of:=IF(OR([.AC40]=&quot;&quot;;[.A40]=&quot;&quot;);&quot;&quot;;[.AC40]-[.A40])">
            <text:p/>
          </table:table-cell>
        </table:table-row>
        <table:table-row table:style-name="ro2">
          <table:table-cell table:number-columns-repeated="4"/>
          <table:table-cell table:formula="of:=IF(OR([.C41]=&quot;&quot;;[.B41]=&quot;&quot;);&quot;&quot;;[.C41]-[.B41])">
            <text:p/>
          </table:table-cell>
          <table:table-cell table:formula="of:=IF(OR([.D41]=&quot;&quot;;[.A41]=&quot;&quot;);&quot;&quot;;[.D41]-[.A41])">
            <text:p/>
          </table:table-cell>
          <table:table-cell table:number-columns-repeated="3"/>
          <table:table-cell table:formula="of:=IF(OR([.H41]=&quot;&quot;;[.G41]=&quot;&quot;);&quot;&quot;;[.H41]-[.G41])">
            <text:p/>
          </table:table-cell>
          <table:table-cell table:formula="of:=IF(OR([.I41]=&quot;&quot;;[.A41]=&quot;&quot;);&quot;&quot;;[.I41]-[.A41])">
            <text:p/>
          </table:table-cell>
          <table:table-cell table:number-columns-repeated="3"/>
          <table:table-cell table:formula="of:=IF(OR([.M41]=&quot;&quot;;[.L41]=&quot;&quot;);&quot;&quot;;[.M41]-[.L41])">
            <text:p/>
          </table:table-cell>
          <table:table-cell table:formula="of:=IF(OR([.N41]=&quot;&quot;;[.A41]=&quot;&quot;);&quot;&quot;;[.N41]-[.A41])">
            <text:p/>
          </table:table-cell>
          <table:table-cell table:number-columns-repeated="3"/>
          <table:table-cell table:formula="of:=IF(OR([.R41]=&quot;&quot;;[.Q41]=&quot;&quot;);&quot;&quot;;[.R41]-[.Q41])">
            <text:p/>
          </table:table-cell>
          <table:table-cell table:formula="of:=IF(OR([.S41]=&quot;&quot;;[.A41]=&quot;&quot;);&quot;&quot;;[.S41]-[.A41])">
            <text:p/>
          </table:table-cell>
          <table:table-cell table:number-columns-repeated="3"/>
          <table:table-cell table:formula="of:=IF(OR([.W41]=&quot;&quot;;[.V41]=&quot;&quot;);&quot;&quot;;[.W41]-[.V41])">
            <text:p/>
          </table:table-cell>
          <table:table-cell table:formula="of:=IF(OR([.X41]=&quot;&quot;;[.A41]=&quot;&quot;);&quot;&quot;;[.X41]-[.A41])">
            <text:p/>
          </table:table-cell>
          <table:table-cell table:number-columns-repeated="3"/>
          <table:table-cell table:formula="of:=IF(OR([.AB41]=&quot;&quot;;[.AA41]=&quot;&quot;);&quot;&quot;;[.AB41]-[.AA41])">
            <text:p/>
          </table:table-cell>
          <table:table-cell table:formula="of:=IF(OR([.AC41]=&quot;&quot;;[.A41]=&quot;&quot;);&quot;&quot;;[.AC41]-[.A41])">
            <text:p/>
          </table:table-cell>
        </table:table-row>
        <table:table-row table:style-name="ro2">
          <table:table-cell table:number-columns-repeated="4"/>
          <table:table-cell table:formula="of:=IF(OR([.C42]=&quot;&quot;;[.B42]=&quot;&quot;);&quot;&quot;;[.C42]-[.B42])">
            <text:p/>
          </table:table-cell>
          <table:table-cell table:formula="of:=IF(OR([.D42]=&quot;&quot;;[.A42]=&quot;&quot;);&quot;&quot;;[.D42]-[.A42])">
            <text:p/>
          </table:table-cell>
          <table:table-cell table:number-columns-repeated="3"/>
          <table:table-cell table:formula="of:=IF(OR([.H42]=&quot;&quot;;[.G42]=&quot;&quot;);&quot;&quot;;[.H42]-[.G42])">
            <text:p/>
          </table:table-cell>
          <table:table-cell table:formula="of:=IF(OR([.I42]=&quot;&quot;;[.A42]=&quot;&quot;);&quot;&quot;;[.I42]-[.A42])">
            <text:p/>
          </table:table-cell>
          <table:table-cell table:number-columns-repeated="3"/>
          <table:table-cell table:formula="of:=IF(OR([.M42]=&quot;&quot;;[.L42]=&quot;&quot;);&quot;&quot;;[.M42]-[.L42])">
            <text:p/>
          </table:table-cell>
          <table:table-cell table:formula="of:=IF(OR([.N42]=&quot;&quot;;[.A42]=&quot;&quot;);&quot;&quot;;[.N42]-[.A42])">
            <text:p/>
          </table:table-cell>
          <table:table-cell table:number-columns-repeated="3"/>
          <table:table-cell table:formula="of:=IF(OR([.R42]=&quot;&quot;;[.Q42]=&quot;&quot;);&quot;&quot;;[.R42]-[.Q42])">
            <text:p/>
          </table:table-cell>
          <table:table-cell table:formula="of:=IF(OR([.S42]=&quot;&quot;;[.A42]=&quot;&quot;);&quot;&quot;;[.S42]-[.A42])">
            <text:p/>
          </table:table-cell>
          <table:table-cell table:number-columns-repeated="3"/>
          <table:table-cell table:formula="of:=IF(OR([.W42]=&quot;&quot;;[.V42]=&quot;&quot;);&quot;&quot;;[.W42]-[.V42])">
            <text:p/>
          </table:table-cell>
          <table:table-cell table:formula="of:=IF(OR([.X42]=&quot;&quot;;[.A42]=&quot;&quot;);&quot;&quot;;[.X42]-[.A42])">
            <text:p/>
          </table:table-cell>
          <table:table-cell table:number-columns-repeated="3"/>
          <table:table-cell table:formula="of:=IF(OR([.AB42]=&quot;&quot;;[.AA42]=&quot;&quot;);&quot;&quot;;[.AB42]-[.AA42])">
            <text:p/>
          </table:table-cell>
          <table:table-cell table:formula="of:=IF(OR([.AC42]=&quot;&quot;;[.A42]=&quot;&quot;);&quot;&quot;;[.AC42]-[.A42])">
            <text:p/>
          </table:table-cell>
        </table:table-row>
        <table:table-row table:style-name="ro2">
          <table:table-cell table:number-columns-repeated="4"/>
          <table:table-cell table:formula="of:=IF(OR([.C43]=&quot;&quot;;[.B43]=&quot;&quot;);&quot;&quot;;[.C43]-[.B43])">
            <text:p/>
          </table:table-cell>
          <table:table-cell table:formula="of:=IF(OR([.D43]=&quot;&quot;;[.A43]=&quot;&quot;);&quot;&quot;;[.D43]-[.A43])">
            <text:p/>
          </table:table-cell>
          <table:table-cell table:number-columns-repeated="3"/>
          <table:table-cell table:formula="of:=IF(OR([.H43]=&quot;&quot;;[.G43]=&quot;&quot;);&quot;&quot;;[.H43]-[.G43])">
            <text:p/>
          </table:table-cell>
          <table:table-cell table:formula="of:=IF(OR([.I43]=&quot;&quot;;[.A43]=&quot;&quot;);&quot;&quot;;[.I43]-[.A43])">
            <text:p/>
          </table:table-cell>
          <table:table-cell table:number-columns-repeated="3"/>
          <table:table-cell table:formula="of:=IF(OR([.M43]=&quot;&quot;;[.L43]=&quot;&quot;);&quot;&quot;;[.M43]-[.L43])">
            <text:p/>
          </table:table-cell>
          <table:table-cell table:formula="of:=IF(OR([.N43]=&quot;&quot;;[.A43]=&quot;&quot;);&quot;&quot;;[.N43]-[.A43])">
            <text:p/>
          </table:table-cell>
          <table:table-cell table:number-columns-repeated="3"/>
          <table:table-cell table:formula="of:=IF(OR([.R43]=&quot;&quot;;[.Q43]=&quot;&quot;);&quot;&quot;;[.R43]-[.Q43])">
            <text:p/>
          </table:table-cell>
          <table:table-cell table:formula="of:=IF(OR([.S43]=&quot;&quot;;[.A43]=&quot;&quot;);&quot;&quot;;[.S43]-[.A43])">
            <text:p/>
          </table:table-cell>
          <table:table-cell table:number-columns-repeated="3"/>
          <table:table-cell table:formula="of:=IF(OR([.W43]=&quot;&quot;;[.V43]=&quot;&quot;);&quot;&quot;;[.W43]-[.V43])">
            <text:p/>
          </table:table-cell>
          <table:table-cell table:formula="of:=IF(OR([.X43]=&quot;&quot;;[.A43]=&quot;&quot;);&quot;&quot;;[.X43]-[.A43])">
            <text:p/>
          </table:table-cell>
          <table:table-cell table:number-columns-repeated="3"/>
          <table:table-cell table:formula="of:=IF(OR([.AB43]=&quot;&quot;;[.AA43]=&quot;&quot;);&quot;&quot;;[.AB43]-[.AA43])">
            <text:p/>
          </table:table-cell>
          <table:table-cell table:formula="of:=IF(OR([.AC43]=&quot;&quot;;[.A43]=&quot;&quot;);&quot;&quot;;[.AC43]-[.A43])">
            <text:p/>
          </table:table-cell>
        </table:table-row>
        <table:table-row table:style-name="ro2">
          <table:table-cell table:number-columns-repeated="4"/>
          <table:table-cell table:formula="of:=IF(OR([.C44]=&quot;&quot;;[.B44]=&quot;&quot;);&quot;&quot;;[.C44]-[.B44])">
            <text:p/>
          </table:table-cell>
          <table:table-cell table:formula="of:=IF(OR([.D44]=&quot;&quot;;[.A44]=&quot;&quot;);&quot;&quot;;[.D44]-[.A44])">
            <text:p/>
          </table:table-cell>
          <table:table-cell table:number-columns-repeated="3"/>
          <table:table-cell table:formula="of:=IF(OR([.H44]=&quot;&quot;;[.G44]=&quot;&quot;);&quot;&quot;;[.H44]-[.G44])">
            <text:p/>
          </table:table-cell>
          <table:table-cell table:formula="of:=IF(OR([.I44]=&quot;&quot;;[.A44]=&quot;&quot;);&quot;&quot;;[.I44]-[.A44])">
            <text:p/>
          </table:table-cell>
          <table:table-cell table:number-columns-repeated="3"/>
          <table:table-cell table:formula="of:=IF(OR([.M44]=&quot;&quot;;[.L44]=&quot;&quot;);&quot;&quot;;[.M44]-[.L44])">
            <text:p/>
          </table:table-cell>
          <table:table-cell table:formula="of:=IF(OR([.N44]=&quot;&quot;;[.A44]=&quot;&quot;);&quot;&quot;;[.N44]-[.A44])">
            <text:p/>
          </table:table-cell>
          <table:table-cell table:number-columns-repeated="3"/>
          <table:table-cell table:formula="of:=IF(OR([.R44]=&quot;&quot;;[.Q44]=&quot;&quot;);&quot;&quot;;[.R44]-[.Q44])">
            <text:p/>
          </table:table-cell>
          <table:table-cell table:formula="of:=IF(OR([.S44]=&quot;&quot;;[.A44]=&quot;&quot;);&quot;&quot;;[.S44]-[.A44])">
            <text:p/>
          </table:table-cell>
          <table:table-cell table:number-columns-repeated="3"/>
          <table:table-cell table:formula="of:=IF(OR([.W44]=&quot;&quot;;[.V44]=&quot;&quot;);&quot;&quot;;[.W44]-[.V44])">
            <text:p/>
          </table:table-cell>
          <table:table-cell table:formula="of:=IF(OR([.X44]=&quot;&quot;;[.A44]=&quot;&quot;);&quot;&quot;;[.X44]-[.A44])">
            <text:p/>
          </table:table-cell>
          <table:table-cell table:number-columns-repeated="3"/>
          <table:table-cell table:formula="of:=IF(OR([.AB44]=&quot;&quot;;[.AA44]=&quot;&quot;);&quot;&quot;;[.AB44]-[.AA44])">
            <text:p/>
          </table:table-cell>
          <table:table-cell table:formula="of:=IF(OR([.AC44]=&quot;&quot;;[.A44]=&quot;&quot;);&quot;&quot;;[.AC44]-[.A44])">
            <text:p/>
          </table:table-cell>
        </table:table-row>
        <table:table-row table:style-name="ro2">
          <table:table-cell table:number-columns-repeated="4"/>
          <table:table-cell table:formula="of:=IF(OR([.C45]=&quot;&quot;;[.B45]=&quot;&quot;);&quot;&quot;;[.C45]-[.B45])">
            <text:p/>
          </table:table-cell>
          <table:table-cell table:formula="of:=IF(OR([.D45]=&quot;&quot;;[.A45]=&quot;&quot;);&quot;&quot;;[.D45]-[.A45])">
            <text:p/>
          </table:table-cell>
          <table:table-cell table:number-columns-repeated="3"/>
          <table:table-cell table:formula="of:=IF(OR([.H45]=&quot;&quot;;[.G45]=&quot;&quot;);&quot;&quot;;[.H45]-[.G45])">
            <text:p/>
          </table:table-cell>
          <table:table-cell table:formula="of:=IF(OR([.I45]=&quot;&quot;;[.A45]=&quot;&quot;);&quot;&quot;;[.I45]-[.A45])">
            <text:p/>
          </table:table-cell>
          <table:table-cell table:number-columns-repeated="3"/>
          <table:table-cell table:formula="of:=IF(OR([.M45]=&quot;&quot;;[.L45]=&quot;&quot;);&quot;&quot;;[.M45]-[.L45])">
            <text:p/>
          </table:table-cell>
          <table:table-cell table:formula="of:=IF(OR([.N45]=&quot;&quot;;[.A45]=&quot;&quot;);&quot;&quot;;[.N45]-[.A45])">
            <text:p/>
          </table:table-cell>
          <table:table-cell table:number-columns-repeated="3"/>
          <table:table-cell table:formula="of:=IF(OR([.R45]=&quot;&quot;;[.Q45]=&quot;&quot;);&quot;&quot;;[.R45]-[.Q45])">
            <text:p/>
          </table:table-cell>
          <table:table-cell table:formula="of:=IF(OR([.S45]=&quot;&quot;;[.A45]=&quot;&quot;);&quot;&quot;;[.S45]-[.A45])">
            <text:p/>
          </table:table-cell>
          <table:table-cell table:number-columns-repeated="3"/>
          <table:table-cell table:formula="of:=IF(OR([.W45]=&quot;&quot;;[.V45]=&quot;&quot;);&quot;&quot;;[.W45]-[.V45])">
            <text:p/>
          </table:table-cell>
          <table:table-cell table:formula="of:=IF(OR([.X45]=&quot;&quot;;[.A45]=&quot;&quot;);&quot;&quot;;[.X45]-[.A45])">
            <text:p/>
          </table:table-cell>
          <table:table-cell table:number-columns-repeated="3"/>
          <table:table-cell table:formula="of:=IF(OR([.AB45]=&quot;&quot;;[.AA45]=&quot;&quot;);&quot;&quot;;[.AB45]-[.AA45])">
            <text:p/>
          </table:table-cell>
          <table:table-cell table:formula="of:=IF(OR([.AC45]=&quot;&quot;;[.A45]=&quot;&quot;);&quot;&quot;;[.AC45]-[.A45])">
            <text:p/>
          </table:table-cell>
        </table:table-row>
        <table:table-row table:style-name="ro2">
          <table:table-cell table:number-columns-repeated="4"/>
          <table:table-cell table:formula="of:=IF(OR([.C46]=&quot;&quot;;[.B46]=&quot;&quot;);&quot;&quot;;[.C46]-[.B46])">
            <text:p/>
          </table:table-cell>
          <table:table-cell table:formula="of:=IF(OR([.D46]=&quot;&quot;;[.A46]=&quot;&quot;);&quot;&quot;;[.D46]-[.A46])">
            <text:p/>
          </table:table-cell>
          <table:table-cell table:number-columns-repeated="3"/>
          <table:table-cell table:formula="of:=IF(OR([.H46]=&quot;&quot;;[.G46]=&quot;&quot;);&quot;&quot;;[.H46]-[.G46])">
            <text:p/>
          </table:table-cell>
          <table:table-cell table:formula="of:=IF(OR([.I46]=&quot;&quot;;[.A46]=&quot;&quot;);&quot;&quot;;[.I46]-[.A46])">
            <text:p/>
          </table:table-cell>
          <table:table-cell table:number-columns-repeated="3"/>
          <table:table-cell table:formula="of:=IF(OR([.M46]=&quot;&quot;;[.L46]=&quot;&quot;);&quot;&quot;;[.M46]-[.L46])">
            <text:p/>
          </table:table-cell>
          <table:table-cell table:formula="of:=IF(OR([.N46]=&quot;&quot;;[.A46]=&quot;&quot;);&quot;&quot;;[.N46]-[.A46])">
            <text:p/>
          </table:table-cell>
          <table:table-cell table:number-columns-repeated="3"/>
          <table:table-cell table:formula="of:=IF(OR([.R46]=&quot;&quot;;[.Q46]=&quot;&quot;);&quot;&quot;;[.R46]-[.Q46])">
            <text:p/>
          </table:table-cell>
          <table:table-cell table:formula="of:=IF(OR([.S46]=&quot;&quot;;[.A46]=&quot;&quot;);&quot;&quot;;[.S46]-[.A46])">
            <text:p/>
          </table:table-cell>
          <table:table-cell table:number-columns-repeated="3"/>
          <table:table-cell table:formula="of:=IF(OR([.W46]=&quot;&quot;;[.V46]=&quot;&quot;);&quot;&quot;;[.W46]-[.V46])">
            <text:p/>
          </table:table-cell>
          <table:table-cell table:formula="of:=IF(OR([.X46]=&quot;&quot;;[.A46]=&quot;&quot;);&quot;&quot;;[.X46]-[.A46])">
            <text:p/>
          </table:table-cell>
          <table:table-cell table:number-columns-repeated="3"/>
          <table:table-cell table:formula="of:=IF(OR([.AB46]=&quot;&quot;;[.AA46]=&quot;&quot;);&quot;&quot;;[.AB46]-[.AA46])">
            <text:p/>
          </table:table-cell>
          <table:table-cell table:formula="of:=IF(OR([.AC46]=&quot;&quot;;[.A46]=&quot;&quot;);&quot;&quot;;[.AC46]-[.A46])">
            <text:p/>
          </table:table-cell>
        </table:table-row>
        <table:table-row table:style-name="ro2">
          <table:table-cell table:number-columns-repeated="4"/>
          <table:table-cell table:formula="of:=IF(OR([.C47]=&quot;&quot;;[.B47]=&quot;&quot;);&quot;&quot;;[.C47]-[.B47])">
            <text:p/>
          </table:table-cell>
          <table:table-cell table:formula="of:=IF(OR([.D47]=&quot;&quot;;[.A47]=&quot;&quot;);&quot;&quot;;[.D47]-[.A47])">
            <text:p/>
          </table:table-cell>
          <table:table-cell table:number-columns-repeated="3"/>
          <table:table-cell table:formula="of:=IF(OR([.H47]=&quot;&quot;;[.G47]=&quot;&quot;);&quot;&quot;;[.H47]-[.G47])">
            <text:p/>
          </table:table-cell>
          <table:table-cell table:formula="of:=IF(OR([.I47]=&quot;&quot;;[.A47]=&quot;&quot;);&quot;&quot;;[.I47]-[.A47])">
            <text:p/>
          </table:table-cell>
          <table:table-cell table:number-columns-repeated="3"/>
          <table:table-cell table:formula="of:=IF(OR([.M47]=&quot;&quot;;[.L47]=&quot;&quot;);&quot;&quot;;[.M47]-[.L47])">
            <text:p/>
          </table:table-cell>
          <table:table-cell table:formula="of:=IF(OR([.N47]=&quot;&quot;;[.A47]=&quot;&quot;);&quot;&quot;;[.N47]-[.A47])">
            <text:p/>
          </table:table-cell>
          <table:table-cell table:number-columns-repeated="3"/>
          <table:table-cell table:formula="of:=IF(OR([.R47]=&quot;&quot;;[.Q47]=&quot;&quot;);&quot;&quot;;[.R47]-[.Q47])">
            <text:p/>
          </table:table-cell>
          <table:table-cell table:formula="of:=IF(OR([.S47]=&quot;&quot;;[.A47]=&quot;&quot;);&quot;&quot;;[.S47]-[.A47])">
            <text:p/>
          </table:table-cell>
          <table:table-cell table:number-columns-repeated="3"/>
          <table:table-cell table:formula="of:=IF(OR([.W47]=&quot;&quot;;[.V47]=&quot;&quot;);&quot;&quot;;[.W47]-[.V47])">
            <text:p/>
          </table:table-cell>
          <table:table-cell table:formula="of:=IF(OR([.X47]=&quot;&quot;;[.A47]=&quot;&quot;);&quot;&quot;;[.X47]-[.A47])">
            <text:p/>
          </table:table-cell>
          <table:table-cell table:number-columns-repeated="3"/>
          <table:table-cell table:formula="of:=IF(OR([.AB47]=&quot;&quot;;[.AA47]=&quot;&quot;);&quot;&quot;;[.AB47]-[.AA47])">
            <text:p/>
          </table:table-cell>
          <table:table-cell table:formula="of:=IF(OR([.AC47]=&quot;&quot;;[.A47]=&quot;&quot;);&quot;&quot;;[.AC47]-[.A47])">
            <text:p/>
          </table:table-cell>
        </table:table-row>
        <table:table-row table:style-name="ro2">
          <table:table-cell table:number-columns-repeated="4"/>
          <table:table-cell table:formula="of:=IF(OR([.C48]=&quot;&quot;;[.B48]=&quot;&quot;);&quot;&quot;;[.C48]-[.B48])">
            <text:p/>
          </table:table-cell>
          <table:table-cell table:formula="of:=IF(OR([.D48]=&quot;&quot;;[.A48]=&quot;&quot;);&quot;&quot;;[.D48]-[.A48])">
            <text:p/>
          </table:table-cell>
          <table:table-cell table:number-columns-repeated="3"/>
          <table:table-cell table:formula="of:=IF(OR([.H48]=&quot;&quot;;[.G48]=&quot;&quot;);&quot;&quot;;[.H48]-[.G48])">
            <text:p/>
          </table:table-cell>
          <table:table-cell table:formula="of:=IF(OR([.I48]=&quot;&quot;;[.A48]=&quot;&quot;);&quot;&quot;;[.I48]-[.A48])">
            <text:p/>
          </table:table-cell>
          <table:table-cell table:number-columns-repeated="3"/>
          <table:table-cell table:formula="of:=IF(OR([.M48]=&quot;&quot;;[.L48]=&quot;&quot;);&quot;&quot;;[.M48]-[.L48])">
            <text:p/>
          </table:table-cell>
          <table:table-cell table:formula="of:=IF(OR([.N48]=&quot;&quot;;[.A48]=&quot;&quot;);&quot;&quot;;[.N48]-[.A48])">
            <text:p/>
          </table:table-cell>
          <table:table-cell table:number-columns-repeated="3"/>
          <table:table-cell table:formula="of:=IF(OR([.R48]=&quot;&quot;;[.Q48]=&quot;&quot;);&quot;&quot;;[.R48]-[.Q48])">
            <text:p/>
          </table:table-cell>
          <table:table-cell table:formula="of:=IF(OR([.S48]=&quot;&quot;;[.A48]=&quot;&quot;);&quot;&quot;;[.S48]-[.A48])">
            <text:p/>
          </table:table-cell>
          <table:table-cell table:number-columns-repeated="3"/>
          <table:table-cell table:formula="of:=IF(OR([.W48]=&quot;&quot;;[.V48]=&quot;&quot;);&quot;&quot;;[.W48]-[.V48])">
            <text:p/>
          </table:table-cell>
          <table:table-cell table:formula="of:=IF(OR([.X48]=&quot;&quot;;[.A48]=&quot;&quot;);&quot;&quot;;[.X48]-[.A48])">
            <text:p/>
          </table:table-cell>
          <table:table-cell table:number-columns-repeated="3"/>
          <table:table-cell table:formula="of:=IF(OR([.AB48]=&quot;&quot;;[.AA48]=&quot;&quot;);&quot;&quot;;[.AB48]-[.AA48])">
            <text:p/>
          </table:table-cell>
          <table:table-cell table:formula="of:=IF(OR([.AC48]=&quot;&quot;;[.A48]=&quot;&quot;);&quot;&quot;;[.AC48]-[.A48])">
            <text:p/>
          </table:table-cell>
        </table:table-row>
        <table:table-row table:style-name="ro2">
          <table:table-cell table:number-columns-repeated="4"/>
          <table:table-cell table:formula="of:=IF(OR([.C49]=&quot;&quot;;[.B49]=&quot;&quot;);&quot;&quot;;[.C49]-[.B49])">
            <text:p/>
          </table:table-cell>
          <table:table-cell table:formula="of:=IF(OR([.D49]=&quot;&quot;;[.A49]=&quot;&quot;);&quot;&quot;;[.D49]-[.A49])">
            <text:p/>
          </table:table-cell>
          <table:table-cell table:number-columns-repeated="3"/>
          <table:table-cell table:formula="of:=IF(OR([.H49]=&quot;&quot;;[.G49]=&quot;&quot;);&quot;&quot;;[.H49]-[.G49])">
            <text:p/>
          </table:table-cell>
          <table:table-cell table:formula="of:=IF(OR([.I49]=&quot;&quot;;[.A49]=&quot;&quot;);&quot;&quot;;[.I49]-[.A49])">
            <text:p/>
          </table:table-cell>
          <table:table-cell table:number-columns-repeated="3"/>
          <table:table-cell table:formula="of:=IF(OR([.M49]=&quot;&quot;;[.L49]=&quot;&quot;);&quot;&quot;;[.M49]-[.L49])">
            <text:p/>
          </table:table-cell>
          <table:table-cell table:formula="of:=IF(OR([.N49]=&quot;&quot;;[.A49]=&quot;&quot;);&quot;&quot;;[.N49]-[.A49])">
            <text:p/>
          </table:table-cell>
          <table:table-cell table:number-columns-repeated="3"/>
          <table:table-cell table:formula="of:=IF(OR([.R49]=&quot;&quot;;[.Q49]=&quot;&quot;);&quot;&quot;;[.R49]-[.Q49])">
            <text:p/>
          </table:table-cell>
          <table:table-cell table:formula="of:=IF(OR([.S49]=&quot;&quot;;[.A49]=&quot;&quot;);&quot;&quot;;[.S49]-[.A49])">
            <text:p/>
          </table:table-cell>
          <table:table-cell table:number-columns-repeated="3"/>
          <table:table-cell table:formula="of:=IF(OR([.W49]=&quot;&quot;;[.V49]=&quot;&quot;);&quot;&quot;;[.W49]-[.V49])">
            <text:p/>
          </table:table-cell>
          <table:table-cell table:formula="of:=IF(OR([.X49]=&quot;&quot;;[.A49]=&quot;&quot;);&quot;&quot;;[.X49]-[.A49])">
            <text:p/>
          </table:table-cell>
          <table:table-cell table:number-columns-repeated="3"/>
          <table:table-cell table:formula="of:=IF(OR([.AB49]=&quot;&quot;;[.AA49]=&quot;&quot;);&quot;&quot;;[.AB49]-[.AA49])">
            <text:p/>
          </table:table-cell>
          <table:table-cell table:formula="of:=IF(OR([.AC49]=&quot;&quot;;[.A49]=&quot;&quot;);&quot;&quot;;[.AC49]-[.A49])">
            <text:p/>
          </table:table-cell>
        </table:table-row>
        <table:table-row table:style-name="ro2">
          <table:table-cell table:number-columns-repeated="4"/>
          <table:table-cell table:formula="of:=IF(OR([.C50]=&quot;&quot;;[.B50]=&quot;&quot;);&quot;&quot;;[.C50]-[.B50])">
            <text:p/>
          </table:table-cell>
          <table:table-cell table:formula="of:=IF(OR([.D50]=&quot;&quot;;[.A50]=&quot;&quot;);&quot;&quot;;[.D50]-[.A50])">
            <text:p/>
          </table:table-cell>
          <table:table-cell table:number-columns-repeated="3"/>
          <table:table-cell table:formula="of:=IF(OR([.H50]=&quot;&quot;;[.G50]=&quot;&quot;);&quot;&quot;;[.H50]-[.G50])">
            <text:p/>
          </table:table-cell>
          <table:table-cell table:formula="of:=IF(OR([.I50]=&quot;&quot;;[.A50]=&quot;&quot;);&quot;&quot;;[.I50]-[.A50])">
            <text:p/>
          </table:table-cell>
          <table:table-cell table:number-columns-repeated="3"/>
          <table:table-cell table:formula="of:=IF(OR([.M50]=&quot;&quot;;[.L50]=&quot;&quot;);&quot;&quot;;[.M50]-[.L50])">
            <text:p/>
          </table:table-cell>
          <table:table-cell table:formula="of:=IF(OR([.N50]=&quot;&quot;;[.A50]=&quot;&quot;);&quot;&quot;;[.N50]-[.A50])">
            <text:p/>
          </table:table-cell>
          <table:table-cell table:number-columns-repeated="3"/>
          <table:table-cell table:formula="of:=IF(OR([.R50]=&quot;&quot;;[.Q50]=&quot;&quot;);&quot;&quot;;[.R50]-[.Q50])">
            <text:p/>
          </table:table-cell>
          <table:table-cell table:formula="of:=IF(OR([.S50]=&quot;&quot;;[.A50]=&quot;&quot;);&quot;&quot;;[.S50]-[.A50])">
            <text:p/>
          </table:table-cell>
          <table:table-cell table:number-columns-repeated="3"/>
          <table:table-cell table:formula="of:=IF(OR([.W50]=&quot;&quot;;[.V50]=&quot;&quot;);&quot;&quot;;[.W50]-[.V50])">
            <text:p/>
          </table:table-cell>
          <table:table-cell table:formula="of:=IF(OR([.X50]=&quot;&quot;;[.A50]=&quot;&quot;);&quot;&quot;;[.X50]-[.A50])">
            <text:p/>
          </table:table-cell>
          <table:table-cell table:number-columns-repeated="3"/>
          <table:table-cell table:formula="of:=IF(OR([.AB50]=&quot;&quot;;[.AA50]=&quot;&quot;);&quot;&quot;;[.AB50]-[.AA50])">
            <text:p/>
          </table:table-cell>
          <table:table-cell table:formula="of:=IF(OR([.AC50]=&quot;&quot;;[.A50]=&quot;&quot;);&quot;&quot;;[.AC50]-[.A50])">
            <text:p/>
          </table:table-cell>
        </table:table-row>
        <table:table-row table:style-name="ro2">
          <table:table-cell table:number-columns-repeated="4"/>
          <table:table-cell table:formula="of:=IF(OR([.C51]=&quot;&quot;;[.B51]=&quot;&quot;);&quot;&quot;;[.C51]-[.B51])">
            <text:p/>
          </table:table-cell>
          <table:table-cell table:formula="of:=IF(OR([.D51]=&quot;&quot;;[.A51]=&quot;&quot;);&quot;&quot;;[.D51]-[.A51])">
            <text:p/>
          </table:table-cell>
          <table:table-cell table:number-columns-repeated="3"/>
          <table:table-cell table:formula="of:=IF(OR([.H51]=&quot;&quot;;[.G51]=&quot;&quot;);&quot;&quot;;[.H51]-[.G51])">
            <text:p/>
          </table:table-cell>
          <table:table-cell table:formula="of:=IF(OR([.I51]=&quot;&quot;;[.A51]=&quot;&quot;);&quot;&quot;;[.I51]-[.A51])">
            <text:p/>
          </table:table-cell>
          <table:table-cell table:number-columns-repeated="3"/>
          <table:table-cell table:formula="of:=IF(OR([.M51]=&quot;&quot;;[.L51]=&quot;&quot;);&quot;&quot;;[.M51]-[.L51])">
            <text:p/>
          </table:table-cell>
          <table:table-cell table:formula="of:=IF(OR([.N51]=&quot;&quot;;[.A51]=&quot;&quot;);&quot;&quot;;[.N51]-[.A51])">
            <text:p/>
          </table:table-cell>
          <table:table-cell table:number-columns-repeated="3"/>
          <table:table-cell table:formula="of:=IF(OR([.R51]=&quot;&quot;;[.Q51]=&quot;&quot;);&quot;&quot;;[.R51]-[.Q51])">
            <text:p/>
          </table:table-cell>
          <table:table-cell table:formula="of:=IF(OR([.S51]=&quot;&quot;;[.A51]=&quot;&quot;);&quot;&quot;;[.S51]-[.A51])">
            <text:p/>
          </table:table-cell>
          <table:table-cell table:number-columns-repeated="3"/>
          <table:table-cell table:formula="of:=IF(OR([.W51]=&quot;&quot;;[.V51]=&quot;&quot;);&quot;&quot;;[.W51]-[.V51])">
            <text:p/>
          </table:table-cell>
          <table:table-cell table:formula="of:=IF(OR([.X51]=&quot;&quot;;[.A51]=&quot;&quot;);&quot;&quot;;[.X51]-[.A51])">
            <text:p/>
          </table:table-cell>
          <table:table-cell table:number-columns-repeated="3"/>
          <table:table-cell table:formula="of:=IF(OR([.AB51]=&quot;&quot;;[.AA51]=&quot;&quot;);&quot;&quot;;[.AB51]-[.AA51])">
            <text:p/>
          </table:table-cell>
          <table:table-cell table:formula="of:=IF(OR([.AC51]=&quot;&quot;;[.A51]=&quot;&quot;);&quot;&quot;;[.AC51]-[.A51])">
            <text:p/>
          </table:table-cell>
        </table:table-row>
        <table:table-row table:style-name="ro2">
          <table:table-cell table:number-columns-repeated="4"/>
          <table:table-cell table:formula="of:=IF(OR([.C52]=&quot;&quot;;[.B52]=&quot;&quot;);&quot;&quot;;[.C52]-[.B52])">
            <text:p/>
          </table:table-cell>
          <table:table-cell table:formula="of:=IF(OR([.D52]=&quot;&quot;;[.A52]=&quot;&quot;);&quot;&quot;;[.D52]-[.A52])">
            <text:p/>
          </table:table-cell>
          <table:table-cell table:number-columns-repeated="3"/>
          <table:table-cell table:formula="of:=IF(OR([.H52]=&quot;&quot;;[.G52]=&quot;&quot;);&quot;&quot;;[.H52]-[.G52])">
            <text:p/>
          </table:table-cell>
          <table:table-cell table:formula="of:=IF(OR([.I52]=&quot;&quot;;[.A52]=&quot;&quot;);&quot;&quot;;[.I52]-[.A52])">
            <text:p/>
          </table:table-cell>
          <table:table-cell table:number-columns-repeated="3"/>
          <table:table-cell table:formula="of:=IF(OR([.M52]=&quot;&quot;;[.L52]=&quot;&quot;);&quot;&quot;;[.M52]-[.L52])">
            <text:p/>
          </table:table-cell>
          <table:table-cell table:formula="of:=IF(OR([.N52]=&quot;&quot;;[.A52]=&quot;&quot;);&quot;&quot;;[.N52]-[.A52])">
            <text:p/>
          </table:table-cell>
          <table:table-cell table:number-columns-repeated="3"/>
          <table:table-cell table:formula="of:=IF(OR([.R52]=&quot;&quot;;[.Q52]=&quot;&quot;);&quot;&quot;;[.R52]-[.Q52])">
            <text:p/>
          </table:table-cell>
          <table:table-cell table:formula="of:=IF(OR([.S52]=&quot;&quot;;[.A52]=&quot;&quot;);&quot;&quot;;[.S52]-[.A52])">
            <text:p/>
          </table:table-cell>
          <table:table-cell table:number-columns-repeated="3"/>
          <table:table-cell table:formula="of:=IF(OR([.W52]=&quot;&quot;;[.V52]=&quot;&quot;);&quot;&quot;;[.W52]-[.V52])">
            <text:p/>
          </table:table-cell>
          <table:table-cell table:formula="of:=IF(OR([.X52]=&quot;&quot;;[.A52]=&quot;&quot;);&quot;&quot;;[.X52]-[.A52])">
            <text:p/>
          </table:table-cell>
          <table:table-cell table:number-columns-repeated="3"/>
          <table:table-cell table:formula="of:=IF(OR([.AB52]=&quot;&quot;;[.AA52]=&quot;&quot;);&quot;&quot;;[.AB52]-[.AA52])">
            <text:p/>
          </table:table-cell>
          <table:table-cell table:formula="of:=IF(OR([.AC52]=&quot;&quot;;[.A52]=&quot;&quot;);&quot;&quot;;[.AC52]-[.A52])">
            <text:p/>
          </table:table-cell>
        </table:table-row>
        <table:table-row table:style-name="ro2">
          <table:table-cell table:number-columns-repeated="4"/>
          <table:table-cell table:formula="of:=IF(OR([.C53]=&quot;&quot;;[.B53]=&quot;&quot;);&quot;&quot;;[.C53]-[.B53])">
            <text:p/>
          </table:table-cell>
          <table:table-cell table:formula="of:=IF(OR([.D53]=&quot;&quot;;[.A53]=&quot;&quot;);&quot;&quot;;[.D53]-[.A53])">
            <text:p/>
          </table:table-cell>
          <table:table-cell table:number-columns-repeated="3"/>
          <table:table-cell table:formula="of:=IF(OR([.H53]=&quot;&quot;;[.G53]=&quot;&quot;);&quot;&quot;;[.H53]-[.G53])">
            <text:p/>
          </table:table-cell>
          <table:table-cell table:formula="of:=IF(OR([.I53]=&quot;&quot;;[.A53]=&quot;&quot;);&quot;&quot;;[.I53]-[.A53])">
            <text:p/>
          </table:table-cell>
          <table:table-cell table:number-columns-repeated="3"/>
          <table:table-cell table:formula="of:=IF(OR([.M53]=&quot;&quot;;[.L53]=&quot;&quot;);&quot;&quot;;[.M53]-[.L53])">
            <text:p/>
          </table:table-cell>
          <table:table-cell table:formula="of:=IF(OR([.N53]=&quot;&quot;;[.A53]=&quot;&quot;);&quot;&quot;;[.N53]-[.A53])">
            <text:p/>
          </table:table-cell>
          <table:table-cell table:number-columns-repeated="3"/>
          <table:table-cell table:formula="of:=IF(OR([.R53]=&quot;&quot;;[.Q53]=&quot;&quot;);&quot;&quot;;[.R53]-[.Q53])">
            <text:p/>
          </table:table-cell>
          <table:table-cell table:formula="of:=IF(OR([.S53]=&quot;&quot;;[.A53]=&quot;&quot;);&quot;&quot;;[.S53]-[.A53])">
            <text:p/>
          </table:table-cell>
          <table:table-cell table:number-columns-repeated="3"/>
          <table:table-cell table:formula="of:=IF(OR([.W53]=&quot;&quot;;[.V53]=&quot;&quot;);&quot;&quot;;[.W53]-[.V53])">
            <text:p/>
          </table:table-cell>
          <table:table-cell table:formula="of:=IF(OR([.X53]=&quot;&quot;;[.A53]=&quot;&quot;);&quot;&quot;;[.X53]-[.A53])">
            <text:p/>
          </table:table-cell>
          <table:table-cell table:number-columns-repeated="3"/>
          <table:table-cell table:formula="of:=IF(OR([.AB53]=&quot;&quot;;[.AA53]=&quot;&quot;);&quot;&quot;;[.AB53]-[.AA53])">
            <text:p/>
          </table:table-cell>
          <table:table-cell table:formula="of:=IF(OR([.AC53]=&quot;&quot;;[.A53]=&quot;&quot;);&quot;&quot;;[.AC53]-[.A53])">
            <text:p/>
          </table:table-cell>
        </table:table-row>
        <table:table-row table:style-name="ro2">
          <table:table-cell table:number-columns-repeated="4"/>
          <table:table-cell table:formula="of:=IF(OR([.C54]=&quot;&quot;;[.B54]=&quot;&quot;);&quot;&quot;;[.C54]-[.B54])">
            <text:p/>
          </table:table-cell>
          <table:table-cell table:formula="of:=IF(OR([.D54]=&quot;&quot;;[.A54]=&quot;&quot;);&quot;&quot;;[.D54]-[.A54])">
            <text:p/>
          </table:table-cell>
          <table:table-cell table:number-columns-repeated="3"/>
          <table:table-cell table:formula="of:=IF(OR([.H54]=&quot;&quot;;[.G54]=&quot;&quot;);&quot;&quot;;[.H54]-[.G54])">
            <text:p/>
          </table:table-cell>
          <table:table-cell table:formula="of:=IF(OR([.I54]=&quot;&quot;;[.A54]=&quot;&quot;);&quot;&quot;;[.I54]-[.A54])">
            <text:p/>
          </table:table-cell>
          <table:table-cell table:number-columns-repeated="3"/>
          <table:table-cell table:formula="of:=IF(OR([.M54]=&quot;&quot;;[.L54]=&quot;&quot;);&quot;&quot;;[.M54]-[.L54])">
            <text:p/>
          </table:table-cell>
          <table:table-cell table:formula="of:=IF(OR([.N54]=&quot;&quot;;[.A54]=&quot;&quot;);&quot;&quot;;[.N54]-[.A54])">
            <text:p/>
          </table:table-cell>
          <table:table-cell table:number-columns-repeated="3"/>
          <table:table-cell table:formula="of:=IF(OR([.R54]=&quot;&quot;;[.Q54]=&quot;&quot;);&quot;&quot;;[.R54]-[.Q54])">
            <text:p/>
          </table:table-cell>
          <table:table-cell table:formula="of:=IF(OR([.S54]=&quot;&quot;;[.A54]=&quot;&quot;);&quot;&quot;;[.S54]-[.A54])">
            <text:p/>
          </table:table-cell>
          <table:table-cell table:number-columns-repeated="3"/>
          <table:table-cell table:formula="of:=IF(OR([.W54]=&quot;&quot;;[.V54]=&quot;&quot;);&quot;&quot;;[.W54]-[.V54])">
            <text:p/>
          </table:table-cell>
          <table:table-cell table:formula="of:=IF(OR([.X54]=&quot;&quot;;[.A54]=&quot;&quot;);&quot;&quot;;[.X54]-[.A54])">
            <text:p/>
          </table:table-cell>
          <table:table-cell table:number-columns-repeated="3"/>
          <table:table-cell table:formula="of:=IF(OR([.AB54]=&quot;&quot;;[.AA54]=&quot;&quot;);&quot;&quot;;[.AB54]-[.AA54])">
            <text:p/>
          </table:table-cell>
          <table:table-cell table:formula="of:=IF(OR([.AC54]=&quot;&quot;;[.A54]=&quot;&quot;);&quot;&quot;;[.AC54]-[.A54])">
            <text:p/>
          </table:table-cell>
        </table:table-row>
        <table:table-row table:style-name="ro2">
          <table:table-cell table:number-columns-repeated="4"/>
          <table:table-cell table:formula="of:=IF(OR([.C55]=&quot;&quot;;[.B55]=&quot;&quot;);&quot;&quot;;[.C55]-[.B55])">
            <text:p/>
          </table:table-cell>
          <table:table-cell table:formula="of:=IF(OR([.D55]=&quot;&quot;;[.A55]=&quot;&quot;);&quot;&quot;;[.D55]-[.A55])">
            <text:p/>
          </table:table-cell>
          <table:table-cell table:number-columns-repeated="3"/>
          <table:table-cell table:formula="of:=IF(OR([.H55]=&quot;&quot;;[.G55]=&quot;&quot;);&quot;&quot;;[.H55]-[.G55])">
            <text:p/>
          </table:table-cell>
          <table:table-cell table:formula="of:=IF(OR([.I55]=&quot;&quot;;[.A55]=&quot;&quot;);&quot;&quot;;[.I55]-[.A55])">
            <text:p/>
          </table:table-cell>
          <table:table-cell table:number-columns-repeated="3"/>
          <table:table-cell table:formula="of:=IF(OR([.M55]=&quot;&quot;;[.L55]=&quot;&quot;);&quot;&quot;;[.M55]-[.L55])">
            <text:p/>
          </table:table-cell>
          <table:table-cell table:formula="of:=IF(OR([.N55]=&quot;&quot;;[.A55]=&quot;&quot;);&quot;&quot;;[.N55]-[.A55])">
            <text:p/>
          </table:table-cell>
          <table:table-cell table:number-columns-repeated="3"/>
          <table:table-cell table:formula="of:=IF(OR([.R55]=&quot;&quot;;[.Q55]=&quot;&quot;);&quot;&quot;;[.R55]-[.Q55])">
            <text:p/>
          </table:table-cell>
          <table:table-cell table:formula="of:=IF(OR([.S55]=&quot;&quot;;[.A55]=&quot;&quot;);&quot;&quot;;[.S55]-[.A55])">
            <text:p/>
          </table:table-cell>
          <table:table-cell table:number-columns-repeated="3"/>
          <table:table-cell table:formula="of:=IF(OR([.W55]=&quot;&quot;;[.V55]=&quot;&quot;);&quot;&quot;;[.W55]-[.V55])">
            <text:p/>
          </table:table-cell>
          <table:table-cell table:formula="of:=IF(OR([.X55]=&quot;&quot;;[.A55]=&quot;&quot;);&quot;&quot;;[.X55]-[.A55])">
            <text:p/>
          </table:table-cell>
          <table:table-cell table:number-columns-repeated="3"/>
          <table:table-cell table:formula="of:=IF(OR([.AB55]=&quot;&quot;;[.AA55]=&quot;&quot;);&quot;&quot;;[.AB55]-[.AA55])">
            <text:p/>
          </table:table-cell>
          <table:table-cell table:formula="of:=IF(OR([.AC55]=&quot;&quot;;[.A55]=&quot;&quot;);&quot;&quot;;[.AC55]-[.A55])">
            <text:p/>
          </table:table-cell>
        </table:table-row>
        <table:table-row table:style-name="ro2">
          <table:table-cell table:number-columns-repeated="4"/>
          <table:table-cell table:formula="of:=IF(OR([.C56]=&quot;&quot;;[.B56]=&quot;&quot;);&quot;&quot;;[.C56]-[.B56])">
            <text:p/>
          </table:table-cell>
          <table:table-cell table:formula="of:=IF(OR([.D56]=&quot;&quot;;[.A56]=&quot;&quot;);&quot;&quot;;[.D56]-[.A56])">
            <text:p/>
          </table:table-cell>
          <table:table-cell table:number-columns-repeated="3"/>
          <table:table-cell table:formula="of:=IF(OR([.H56]=&quot;&quot;;[.G56]=&quot;&quot;);&quot;&quot;;[.H56]-[.G56])">
            <text:p/>
          </table:table-cell>
          <table:table-cell table:formula="of:=IF(OR([.I56]=&quot;&quot;;[.A56]=&quot;&quot;);&quot;&quot;;[.I56]-[.A56])">
            <text:p/>
          </table:table-cell>
          <table:table-cell table:number-columns-repeated="3"/>
          <table:table-cell table:formula="of:=IF(OR([.M56]=&quot;&quot;;[.L56]=&quot;&quot;);&quot;&quot;;[.M56]-[.L56])">
            <text:p/>
          </table:table-cell>
          <table:table-cell table:formula="of:=IF(OR([.N56]=&quot;&quot;;[.A56]=&quot;&quot;);&quot;&quot;;[.N56]-[.A56])">
            <text:p/>
          </table:table-cell>
          <table:table-cell table:number-columns-repeated="3"/>
          <table:table-cell table:formula="of:=IF(OR([.R56]=&quot;&quot;;[.Q56]=&quot;&quot;);&quot;&quot;;[.R56]-[.Q56])">
            <text:p/>
          </table:table-cell>
          <table:table-cell table:formula="of:=IF(OR([.S56]=&quot;&quot;;[.A56]=&quot;&quot;);&quot;&quot;;[.S56]-[.A56])">
            <text:p/>
          </table:table-cell>
          <table:table-cell table:number-columns-repeated="3"/>
          <table:table-cell table:formula="of:=IF(OR([.W56]=&quot;&quot;;[.V56]=&quot;&quot;);&quot;&quot;;[.W56]-[.V56])">
            <text:p/>
          </table:table-cell>
          <table:table-cell table:formula="of:=IF(OR([.X56]=&quot;&quot;;[.A56]=&quot;&quot;);&quot;&quot;;[.X56]-[.A56])">
            <text:p/>
          </table:table-cell>
          <table:table-cell table:number-columns-repeated="3"/>
          <table:table-cell table:formula="of:=IF(OR([.AB56]=&quot;&quot;;[.AA56]=&quot;&quot;);&quot;&quot;;[.AB56]-[.AA56])">
            <text:p/>
          </table:table-cell>
          <table:table-cell table:formula="of:=IF(OR([.AC56]=&quot;&quot;;[.A56]=&quot;&quot;);&quot;&quot;;[.AC56]-[.A56])">
            <text:p/>
          </table:table-cell>
        </table:table-row>
        <table:table-row table:style-name="ro2">
          <table:table-cell table:number-columns-repeated="4"/>
          <table:table-cell table:formula="of:=IF(OR([.C57]=&quot;&quot;;[.B57]=&quot;&quot;);&quot;&quot;;[.C57]-[.B57])">
            <text:p/>
          </table:table-cell>
          <table:table-cell table:formula="of:=IF(OR([.D57]=&quot;&quot;;[.A57]=&quot;&quot;);&quot;&quot;;[.D57]-[.A57])">
            <text:p/>
          </table:table-cell>
          <table:table-cell table:number-columns-repeated="3"/>
          <table:table-cell table:formula="of:=IF(OR([.H57]=&quot;&quot;;[.G57]=&quot;&quot;);&quot;&quot;;[.H57]-[.G57])">
            <text:p/>
          </table:table-cell>
          <table:table-cell table:formula="of:=IF(OR([.I57]=&quot;&quot;;[.A57]=&quot;&quot;);&quot;&quot;;[.I57]-[.A57])">
            <text:p/>
          </table:table-cell>
          <table:table-cell table:number-columns-repeated="3"/>
          <table:table-cell table:formula="of:=IF(OR([.M57]=&quot;&quot;;[.L57]=&quot;&quot;);&quot;&quot;;[.M57]-[.L57])">
            <text:p/>
          </table:table-cell>
          <table:table-cell table:formula="of:=IF(OR([.N57]=&quot;&quot;;[.A57]=&quot;&quot;);&quot;&quot;;[.N57]-[.A57])">
            <text:p/>
          </table:table-cell>
          <table:table-cell table:number-columns-repeated="3"/>
          <table:table-cell table:formula="of:=IF(OR([.R57]=&quot;&quot;;[.Q57]=&quot;&quot;);&quot;&quot;;[.R57]-[.Q57])">
            <text:p/>
          </table:table-cell>
          <table:table-cell table:formula="of:=IF(OR([.S57]=&quot;&quot;;[.A57]=&quot;&quot;);&quot;&quot;;[.S57]-[.A57])">
            <text:p/>
          </table:table-cell>
          <table:table-cell table:number-columns-repeated="3"/>
          <table:table-cell table:formula="of:=IF(OR([.W57]=&quot;&quot;;[.V57]=&quot;&quot;);&quot;&quot;;[.W57]-[.V57])">
            <text:p/>
          </table:table-cell>
          <table:table-cell table:formula="of:=IF(OR([.X57]=&quot;&quot;;[.A57]=&quot;&quot;);&quot;&quot;;[.X57]-[.A57])">
            <text:p/>
          </table:table-cell>
          <table:table-cell table:number-columns-repeated="3"/>
          <table:table-cell table:formula="of:=IF(OR([.AB57]=&quot;&quot;;[.AA57]=&quot;&quot;);&quot;&quot;;[.AB57]-[.AA57])">
            <text:p/>
          </table:table-cell>
          <table:table-cell table:formula="of:=IF(OR([.AC57]=&quot;&quot;;[.A57]=&quot;&quot;);&quot;&quot;;[.AC57]-[.A57])">
            <text:p/>
          </table:table-cell>
        </table:table-row>
        <table:table-row table:style-name="ro2">
          <table:table-cell table:number-columns-repeated="4"/>
          <table:table-cell table:formula="of:=IF(OR([.C58]=&quot;&quot;;[.B58]=&quot;&quot;);&quot;&quot;;[.C58]-[.B58])">
            <text:p/>
          </table:table-cell>
          <table:table-cell table:formula="of:=IF(OR([.D58]=&quot;&quot;;[.A58]=&quot;&quot;);&quot;&quot;;[.D58]-[.A58])">
            <text:p/>
          </table:table-cell>
          <table:table-cell table:number-columns-repeated="3"/>
          <table:table-cell table:formula="of:=IF(OR([.H58]=&quot;&quot;;[.G58]=&quot;&quot;);&quot;&quot;;[.H58]-[.G58])">
            <text:p/>
          </table:table-cell>
          <table:table-cell table:formula="of:=IF(OR([.I58]=&quot;&quot;;[.A58]=&quot;&quot;);&quot;&quot;;[.I58]-[.A58])">
            <text:p/>
          </table:table-cell>
          <table:table-cell table:number-columns-repeated="3"/>
          <table:table-cell table:formula="of:=IF(OR([.M58]=&quot;&quot;;[.L58]=&quot;&quot;);&quot;&quot;;[.M58]-[.L58])">
            <text:p/>
          </table:table-cell>
          <table:table-cell table:formula="of:=IF(OR([.N58]=&quot;&quot;;[.A58]=&quot;&quot;);&quot;&quot;;[.N58]-[.A58])">
            <text:p/>
          </table:table-cell>
          <table:table-cell table:number-columns-repeated="3"/>
          <table:table-cell table:formula="of:=IF(OR([.R58]=&quot;&quot;;[.Q58]=&quot;&quot;);&quot;&quot;;[.R58]-[.Q58])">
            <text:p/>
          </table:table-cell>
          <table:table-cell table:formula="of:=IF(OR([.S58]=&quot;&quot;;[.A58]=&quot;&quot;);&quot;&quot;;[.S58]-[.A58])">
            <text:p/>
          </table:table-cell>
          <table:table-cell table:number-columns-repeated="3"/>
          <table:table-cell table:formula="of:=IF(OR([.W58]=&quot;&quot;;[.V58]=&quot;&quot;);&quot;&quot;;[.W58]-[.V58])">
            <text:p/>
          </table:table-cell>
          <table:table-cell table:formula="of:=IF(OR([.X58]=&quot;&quot;;[.A58]=&quot;&quot;);&quot;&quot;;[.X58]-[.A58])">
            <text:p/>
          </table:table-cell>
          <table:table-cell table:number-columns-repeated="3"/>
          <table:table-cell table:formula="of:=IF(OR([.AB58]=&quot;&quot;;[.AA58]=&quot;&quot;);&quot;&quot;;[.AB58]-[.AA58])">
            <text:p/>
          </table:table-cell>
          <table:table-cell table:formula="of:=IF(OR([.AC58]=&quot;&quot;;[.A58]=&quot;&quot;);&quot;&quot;;[.AC58]-[.A58])">
            <text:p/>
          </table:table-cell>
        </table:table-row>
        <table:table-row table:style-name="ro2">
          <table:table-cell table:number-columns-repeated="4"/>
          <table:table-cell table:formula="of:=IF(OR([.C59]=&quot;&quot;;[.B59]=&quot;&quot;);&quot;&quot;;[.C59]-[.B59])">
            <text:p/>
          </table:table-cell>
          <table:table-cell table:formula="of:=IF(OR([.D59]=&quot;&quot;;[.A59]=&quot;&quot;);&quot;&quot;;[.D59]-[.A59])">
            <text:p/>
          </table:table-cell>
          <table:table-cell table:number-columns-repeated="3"/>
          <table:table-cell table:formula="of:=IF(OR([.H59]=&quot;&quot;;[.G59]=&quot;&quot;);&quot;&quot;;[.H59]-[.G59])">
            <text:p/>
          </table:table-cell>
          <table:table-cell table:formula="of:=IF(OR([.I59]=&quot;&quot;;[.A59]=&quot;&quot;);&quot;&quot;;[.I59]-[.A59])">
            <text:p/>
          </table:table-cell>
          <table:table-cell table:number-columns-repeated="3"/>
          <table:table-cell table:formula="of:=IF(OR([.M59]=&quot;&quot;;[.L59]=&quot;&quot;);&quot;&quot;;[.M59]-[.L59])">
            <text:p/>
          </table:table-cell>
          <table:table-cell table:formula="of:=IF(OR([.N59]=&quot;&quot;;[.A59]=&quot;&quot;);&quot;&quot;;[.N59]-[.A59])">
            <text:p/>
          </table:table-cell>
          <table:table-cell table:number-columns-repeated="3"/>
          <table:table-cell table:formula="of:=IF(OR([.R59]=&quot;&quot;;[.Q59]=&quot;&quot;);&quot;&quot;;[.R59]-[.Q59])">
            <text:p/>
          </table:table-cell>
          <table:table-cell table:formula="of:=IF(OR([.S59]=&quot;&quot;;[.A59]=&quot;&quot;);&quot;&quot;;[.S59]-[.A59])">
            <text:p/>
          </table:table-cell>
          <table:table-cell table:number-columns-repeated="3"/>
          <table:table-cell table:formula="of:=IF(OR([.W59]=&quot;&quot;;[.V59]=&quot;&quot;);&quot;&quot;;[.W59]-[.V59])">
            <text:p/>
          </table:table-cell>
          <table:table-cell table:formula="of:=IF(OR([.X59]=&quot;&quot;;[.A59]=&quot;&quot;);&quot;&quot;;[.X59]-[.A59])">
            <text:p/>
          </table:table-cell>
          <table:table-cell table:number-columns-repeated="3"/>
          <table:table-cell table:formula="of:=IF(OR([.AB59]=&quot;&quot;;[.AA59]=&quot;&quot;);&quot;&quot;;[.AB59]-[.AA59])">
            <text:p/>
          </table:table-cell>
          <table:table-cell table:formula="of:=IF(OR([.AC59]=&quot;&quot;;[.A59]=&quot;&quot;);&quot;&quot;;[.AC59]-[.A59])">
            <text:p/>
          </table:table-cell>
        </table:table-row>
        <table:table-row table:style-name="ro2">
          <table:table-cell table:number-columns-repeated="4"/>
          <table:table-cell table:formula="of:=IF(OR([.C60]=&quot;&quot;;[.B60]=&quot;&quot;);&quot;&quot;;[.C60]-[.B60])">
            <text:p/>
          </table:table-cell>
          <table:table-cell table:formula="of:=IF(OR([.D60]=&quot;&quot;;[.A60]=&quot;&quot;);&quot;&quot;;[.D60]-[.A60])">
            <text:p/>
          </table:table-cell>
          <table:table-cell table:number-columns-repeated="3"/>
          <table:table-cell table:formula="of:=IF(OR([.H60]=&quot;&quot;;[.G60]=&quot;&quot;);&quot;&quot;;[.H60]-[.G60])">
            <text:p/>
          </table:table-cell>
          <table:table-cell table:formula="of:=IF(OR([.I60]=&quot;&quot;;[.A60]=&quot;&quot;);&quot;&quot;;[.I60]-[.A60])">
            <text:p/>
          </table:table-cell>
          <table:table-cell table:number-columns-repeated="3"/>
          <table:table-cell table:formula="of:=IF(OR([.M60]=&quot;&quot;;[.L60]=&quot;&quot;);&quot;&quot;;[.M60]-[.L60])">
            <text:p/>
          </table:table-cell>
          <table:table-cell table:formula="of:=IF(OR([.N60]=&quot;&quot;;[.A60]=&quot;&quot;);&quot;&quot;;[.N60]-[.A60])">
            <text:p/>
          </table:table-cell>
          <table:table-cell table:number-columns-repeated="3"/>
          <table:table-cell table:formula="of:=IF(OR([.R60]=&quot;&quot;;[.Q60]=&quot;&quot;);&quot;&quot;;[.R60]-[.Q60])">
            <text:p/>
          </table:table-cell>
          <table:table-cell table:formula="of:=IF(OR([.S60]=&quot;&quot;;[.A60]=&quot;&quot;);&quot;&quot;;[.S60]-[.A60])">
            <text:p/>
          </table:table-cell>
          <table:table-cell table:number-columns-repeated="3"/>
          <table:table-cell table:formula="of:=IF(OR([.W60]=&quot;&quot;;[.V60]=&quot;&quot;);&quot;&quot;;[.W60]-[.V60])">
            <text:p/>
          </table:table-cell>
          <table:table-cell table:formula="of:=IF(OR([.X60]=&quot;&quot;;[.A60]=&quot;&quot;);&quot;&quot;;[.X60]-[.A60])">
            <text:p/>
          </table:table-cell>
          <table:table-cell table:number-columns-repeated="3"/>
          <table:table-cell table:formula="of:=IF(OR([.AB60]=&quot;&quot;;[.AA60]=&quot;&quot;);&quot;&quot;;[.AB60]-[.AA60])">
            <text:p/>
          </table:table-cell>
          <table:table-cell table:formula="of:=IF(OR([.AC60]=&quot;&quot;;[.A60]=&quot;&quot;);&quot;&quot;;[.AC60]-[.A60])">
            <text:p/>
          </table:table-cell>
        </table:table-row>
        <table:table-row table:style-name="ro2">
          <table:table-cell table:number-columns-repeated="4"/>
          <table:table-cell table:formula="of:=IF(OR([.C61]=&quot;&quot;;[.B61]=&quot;&quot;);&quot;&quot;;[.C61]-[.B61])">
            <text:p/>
          </table:table-cell>
          <table:table-cell table:formula="of:=IF(OR([.D61]=&quot;&quot;;[.A61]=&quot;&quot;);&quot;&quot;;[.D61]-[.A61])">
            <text:p/>
          </table:table-cell>
          <table:table-cell table:number-columns-repeated="3"/>
          <table:table-cell table:formula="of:=IF(OR([.H61]=&quot;&quot;;[.G61]=&quot;&quot;);&quot;&quot;;[.H61]-[.G61])">
            <text:p/>
          </table:table-cell>
          <table:table-cell table:formula="of:=IF(OR([.I61]=&quot;&quot;;[.A61]=&quot;&quot;);&quot;&quot;;[.I61]-[.A61])">
            <text:p/>
          </table:table-cell>
          <table:table-cell table:number-columns-repeated="3"/>
          <table:table-cell table:formula="of:=IF(OR([.M61]=&quot;&quot;;[.L61]=&quot;&quot;);&quot;&quot;;[.M61]-[.L61])">
            <text:p/>
          </table:table-cell>
          <table:table-cell table:formula="of:=IF(OR([.N61]=&quot;&quot;;[.A61]=&quot;&quot;);&quot;&quot;;[.N61]-[.A61])">
            <text:p/>
          </table:table-cell>
          <table:table-cell table:number-columns-repeated="3"/>
          <table:table-cell table:formula="of:=IF(OR([.R61]=&quot;&quot;;[.Q61]=&quot;&quot;);&quot;&quot;;[.R61]-[.Q61])">
            <text:p/>
          </table:table-cell>
          <table:table-cell table:formula="of:=IF(OR([.S61]=&quot;&quot;;[.A61]=&quot;&quot;);&quot;&quot;;[.S61]-[.A61])">
            <text:p/>
          </table:table-cell>
          <table:table-cell table:number-columns-repeated="3"/>
          <table:table-cell table:formula="of:=IF(OR([.W61]=&quot;&quot;;[.V61]=&quot;&quot;);&quot;&quot;;[.W61]-[.V61])">
            <text:p/>
          </table:table-cell>
          <table:table-cell table:formula="of:=IF(OR([.X61]=&quot;&quot;;[.A61]=&quot;&quot;);&quot;&quot;;[.X61]-[.A61])">
            <text:p/>
          </table:table-cell>
          <table:table-cell table:number-columns-repeated="3"/>
          <table:table-cell table:formula="of:=IF(OR([.AB61]=&quot;&quot;;[.AA61]=&quot;&quot;);&quot;&quot;;[.AB61]-[.AA61])">
            <text:p/>
          </table:table-cell>
          <table:table-cell table:formula="of:=IF(OR([.AC61]=&quot;&quot;;[.A61]=&quot;&quot;);&quot;&quot;;[.AC61]-[.A61])">
            <text:p/>
          </table:table-cell>
        </table:table-row>
        <table:table-row table:style-name="ro2">
          <table:table-cell table:number-columns-repeated="4"/>
          <table:table-cell table:formula="of:=IF(OR([.C62]=&quot;&quot;;[.B62]=&quot;&quot;);&quot;&quot;;[.C62]-[.B62])">
            <text:p/>
          </table:table-cell>
          <table:table-cell table:formula="of:=IF(OR([.D62]=&quot;&quot;;[.A62]=&quot;&quot;);&quot;&quot;;[.D62]-[.A62])">
            <text:p/>
          </table:table-cell>
          <table:table-cell table:number-columns-repeated="3"/>
          <table:table-cell table:formula="of:=IF(OR([.H62]=&quot;&quot;;[.G62]=&quot;&quot;);&quot;&quot;;[.H62]-[.G62])">
            <text:p/>
          </table:table-cell>
          <table:table-cell table:formula="of:=IF(OR([.I62]=&quot;&quot;;[.A62]=&quot;&quot;);&quot;&quot;;[.I62]-[.A62])">
            <text:p/>
          </table:table-cell>
          <table:table-cell table:number-columns-repeated="3"/>
          <table:table-cell table:formula="of:=IF(OR([.M62]=&quot;&quot;;[.L62]=&quot;&quot;);&quot;&quot;;[.M62]-[.L62])">
            <text:p/>
          </table:table-cell>
          <table:table-cell table:formula="of:=IF(OR([.N62]=&quot;&quot;;[.A62]=&quot;&quot;);&quot;&quot;;[.N62]-[.A62])">
            <text:p/>
          </table:table-cell>
          <table:table-cell table:number-columns-repeated="3"/>
          <table:table-cell table:formula="of:=IF(OR([.R62]=&quot;&quot;;[.Q62]=&quot;&quot;);&quot;&quot;;[.R62]-[.Q62])">
            <text:p/>
          </table:table-cell>
          <table:table-cell table:formula="of:=IF(OR([.S62]=&quot;&quot;;[.A62]=&quot;&quot;);&quot;&quot;;[.S62]-[.A62])">
            <text:p/>
          </table:table-cell>
          <table:table-cell table:number-columns-repeated="3"/>
          <table:table-cell table:formula="of:=IF(OR([.W62]=&quot;&quot;;[.V62]=&quot;&quot;);&quot;&quot;;[.W62]-[.V62])">
            <text:p/>
          </table:table-cell>
          <table:table-cell table:formula="of:=IF(OR([.X62]=&quot;&quot;;[.A62]=&quot;&quot;);&quot;&quot;;[.X62]-[.A62])">
            <text:p/>
          </table:table-cell>
          <table:table-cell table:number-columns-repeated="3"/>
          <table:table-cell table:formula="of:=IF(OR([.AB62]=&quot;&quot;;[.AA62]=&quot;&quot;);&quot;&quot;;[.AB62]-[.AA62])">
            <text:p/>
          </table:table-cell>
          <table:table-cell table:formula="of:=IF(OR([.AC62]=&quot;&quot;;[.A62]=&quot;&quot;);&quot;&quot;;[.AC62]-[.A62])">
            <text:p/>
          </table:table-cell>
        </table:table-row>
        <table:table-row table:style-name="ro2">
          <table:table-cell table:number-columns-repeated="4"/>
          <table:table-cell table:formula="of:=IF(OR([.C63]=&quot;&quot;;[.B63]=&quot;&quot;);&quot;&quot;;[.C63]-[.B63])">
            <text:p/>
          </table:table-cell>
          <table:table-cell table:formula="of:=IF(OR([.D63]=&quot;&quot;;[.A63]=&quot;&quot;);&quot;&quot;;[.D63]-[.A63])">
            <text:p/>
          </table:table-cell>
          <table:table-cell table:number-columns-repeated="3"/>
          <table:table-cell table:formula="of:=IF(OR([.H63]=&quot;&quot;;[.G63]=&quot;&quot;);&quot;&quot;;[.H63]-[.G63])">
            <text:p/>
          </table:table-cell>
          <table:table-cell table:formula="of:=IF(OR([.I63]=&quot;&quot;;[.A63]=&quot;&quot;);&quot;&quot;;[.I63]-[.A63])">
            <text:p/>
          </table:table-cell>
          <table:table-cell table:number-columns-repeated="3"/>
          <table:table-cell table:formula="of:=IF(OR([.M63]=&quot;&quot;;[.L63]=&quot;&quot;);&quot;&quot;;[.M63]-[.L63])">
            <text:p/>
          </table:table-cell>
          <table:table-cell table:formula="of:=IF(OR([.N63]=&quot;&quot;;[.A63]=&quot;&quot;);&quot;&quot;;[.N63]-[.A63])">
            <text:p/>
          </table:table-cell>
          <table:table-cell table:number-columns-repeated="3"/>
          <table:table-cell table:formula="of:=IF(OR([.R63]=&quot;&quot;;[.Q63]=&quot;&quot;);&quot;&quot;;[.R63]-[.Q63])">
            <text:p/>
          </table:table-cell>
          <table:table-cell table:formula="of:=IF(OR([.S63]=&quot;&quot;;[.A63]=&quot;&quot;);&quot;&quot;;[.S63]-[.A63])">
            <text:p/>
          </table:table-cell>
          <table:table-cell table:number-columns-repeated="3"/>
          <table:table-cell table:formula="of:=IF(OR([.W63]=&quot;&quot;;[.V63]=&quot;&quot;);&quot;&quot;;[.W63]-[.V63])">
            <text:p/>
          </table:table-cell>
          <table:table-cell table:formula="of:=IF(OR([.X63]=&quot;&quot;;[.A63]=&quot;&quot;);&quot;&quot;;[.X63]-[.A63])">
            <text:p/>
          </table:table-cell>
          <table:table-cell table:number-columns-repeated="3"/>
          <table:table-cell table:formula="of:=IF(OR([.AB63]=&quot;&quot;;[.AA63]=&quot;&quot;);&quot;&quot;;[.AB63]-[.AA63])">
            <text:p/>
          </table:table-cell>
          <table:table-cell table:formula="of:=IF(OR([.AC63]=&quot;&quot;;[.A63]=&quot;&quot;);&quot;&quot;;[.AC63]-[.A63])">
            <text:p/>
          </table:table-cell>
        </table:table-row>
        <table:table-row table:style-name="ro2">
          <table:table-cell table:number-columns-repeated="4"/>
          <table:table-cell table:formula="of:=IF(OR([.C64]=&quot;&quot;;[.B64]=&quot;&quot;);&quot;&quot;;[.C64]-[.B64])">
            <text:p/>
          </table:table-cell>
          <table:table-cell table:formula="of:=IF(OR([.D64]=&quot;&quot;;[.A64]=&quot;&quot;);&quot;&quot;;[.D64]-[.A64])">
            <text:p/>
          </table:table-cell>
          <table:table-cell table:number-columns-repeated="3"/>
          <table:table-cell table:formula="of:=IF(OR([.H64]=&quot;&quot;;[.G64]=&quot;&quot;);&quot;&quot;;[.H64]-[.G64])">
            <text:p/>
          </table:table-cell>
          <table:table-cell table:formula="of:=IF(OR([.I64]=&quot;&quot;;[.A64]=&quot;&quot;);&quot;&quot;;[.I64]-[.A64])">
            <text:p/>
          </table:table-cell>
          <table:table-cell table:number-columns-repeated="3"/>
          <table:table-cell table:formula="of:=IF(OR([.M64]=&quot;&quot;;[.L64]=&quot;&quot;);&quot;&quot;;[.M64]-[.L64])">
            <text:p/>
          </table:table-cell>
          <table:table-cell table:formula="of:=IF(OR([.N64]=&quot;&quot;;[.A64]=&quot;&quot;);&quot;&quot;;[.N64]-[.A64])">
            <text:p/>
          </table:table-cell>
          <table:table-cell table:number-columns-repeated="3"/>
          <table:table-cell table:formula="of:=IF(OR([.R64]=&quot;&quot;;[.Q64]=&quot;&quot;);&quot;&quot;;[.R64]-[.Q64])">
            <text:p/>
          </table:table-cell>
          <table:table-cell table:formula="of:=IF(OR([.S64]=&quot;&quot;;[.A64]=&quot;&quot;);&quot;&quot;;[.S64]-[.A64])">
            <text:p/>
          </table:table-cell>
          <table:table-cell table:number-columns-repeated="3"/>
          <table:table-cell table:formula="of:=IF(OR([.W64]=&quot;&quot;;[.V64]=&quot;&quot;);&quot;&quot;;[.W64]-[.V64])">
            <text:p/>
          </table:table-cell>
          <table:table-cell table:formula="of:=IF(OR([.X64]=&quot;&quot;;[.A64]=&quot;&quot;);&quot;&quot;;[.X64]-[.A64])">
            <text:p/>
          </table:table-cell>
          <table:table-cell table:number-columns-repeated="3"/>
          <table:table-cell table:formula="of:=IF(OR([.AB64]=&quot;&quot;;[.AA64]=&quot;&quot;);&quot;&quot;;[.AB64]-[.AA64])">
            <text:p/>
          </table:table-cell>
          <table:table-cell table:formula="of:=IF(OR([.AC64]=&quot;&quot;;[.A64]=&quot;&quot;);&quot;&quot;;[.AC64]-[.A64])">
            <text:p/>
          </table:table-cell>
        </table:table-row>
        <table:table-row table:style-name="ro2">
          <table:table-cell table:number-columns-repeated="4"/>
          <table:table-cell table:formula="of:=IF(OR([.C65]=&quot;&quot;;[.B65]=&quot;&quot;);&quot;&quot;;[.C65]-[.B65])">
            <text:p/>
          </table:table-cell>
          <table:table-cell table:formula="of:=IF(OR([.D65]=&quot;&quot;;[.A65]=&quot;&quot;);&quot;&quot;;[.D65]-[.A65])">
            <text:p/>
          </table:table-cell>
          <table:table-cell table:number-columns-repeated="3"/>
          <table:table-cell table:formula="of:=IF(OR([.H65]=&quot;&quot;;[.G65]=&quot;&quot;);&quot;&quot;;[.H65]-[.G65])">
            <text:p/>
          </table:table-cell>
          <table:table-cell table:formula="of:=IF(OR([.I65]=&quot;&quot;;[.A65]=&quot;&quot;);&quot;&quot;;[.I65]-[.A65])">
            <text:p/>
          </table:table-cell>
          <table:table-cell table:number-columns-repeated="3"/>
          <table:table-cell table:formula="of:=IF(OR([.M65]=&quot;&quot;;[.L65]=&quot;&quot;);&quot;&quot;;[.M65]-[.L65])">
            <text:p/>
          </table:table-cell>
          <table:table-cell table:formula="of:=IF(OR([.N65]=&quot;&quot;;[.A65]=&quot;&quot;);&quot;&quot;;[.N65]-[.A65])">
            <text:p/>
          </table:table-cell>
          <table:table-cell table:number-columns-repeated="3"/>
          <table:table-cell table:formula="of:=IF(OR([.R65]=&quot;&quot;;[.Q65]=&quot;&quot;);&quot;&quot;;[.R65]-[.Q65])">
            <text:p/>
          </table:table-cell>
          <table:table-cell table:formula="of:=IF(OR([.S65]=&quot;&quot;;[.A65]=&quot;&quot;);&quot;&quot;;[.S65]-[.A65])">
            <text:p/>
          </table:table-cell>
          <table:table-cell table:number-columns-repeated="3"/>
          <table:table-cell table:formula="of:=IF(OR([.W65]=&quot;&quot;;[.V65]=&quot;&quot;);&quot;&quot;;[.W65]-[.V65])">
            <text:p/>
          </table:table-cell>
          <table:table-cell table:formula="of:=IF(OR([.X65]=&quot;&quot;;[.A65]=&quot;&quot;);&quot;&quot;;[.X65]-[.A65])">
            <text:p/>
          </table:table-cell>
          <table:table-cell table:number-columns-repeated="3"/>
          <table:table-cell table:formula="of:=IF(OR([.AB65]=&quot;&quot;;[.AA65]=&quot;&quot;);&quot;&quot;;[.AB65]-[.AA65])">
            <text:p/>
          </table:table-cell>
          <table:table-cell table:formula="of:=IF(OR([.AC65]=&quot;&quot;;[.A65]=&quot;&quot;);&quot;&quot;;[.AC65]-[.A65])">
            <text:p/>
          </table:table-cell>
        </table:table-row>
        <table:table-row table:style-name="ro2">
          <table:table-cell table:number-columns-repeated="4"/>
          <table:table-cell table:formula="of:=IF(OR([.C66]=&quot;&quot;;[.B66]=&quot;&quot;);&quot;&quot;;[.C66]-[.B66])">
            <text:p/>
          </table:table-cell>
          <table:table-cell table:formula="of:=IF(OR([.D66]=&quot;&quot;;[.A66]=&quot;&quot;);&quot;&quot;;[.D66]-[.A66])">
            <text:p/>
          </table:table-cell>
          <table:table-cell table:number-columns-repeated="3"/>
          <table:table-cell table:formula="of:=IF(OR([.H66]=&quot;&quot;;[.G66]=&quot;&quot;);&quot;&quot;;[.H66]-[.G66])">
            <text:p/>
          </table:table-cell>
          <table:table-cell table:formula="of:=IF(OR([.I66]=&quot;&quot;;[.A66]=&quot;&quot;);&quot;&quot;;[.I66]-[.A66])">
            <text:p/>
          </table:table-cell>
          <table:table-cell table:number-columns-repeated="3"/>
          <table:table-cell table:formula="of:=IF(OR([.M66]=&quot;&quot;;[.L66]=&quot;&quot;);&quot;&quot;;[.M66]-[.L66])">
            <text:p/>
          </table:table-cell>
          <table:table-cell table:formula="of:=IF(OR([.N66]=&quot;&quot;;[.A66]=&quot;&quot;);&quot;&quot;;[.N66]-[.A66])">
            <text:p/>
          </table:table-cell>
          <table:table-cell table:number-columns-repeated="3"/>
          <table:table-cell table:formula="of:=IF(OR([.R66]=&quot;&quot;;[.Q66]=&quot;&quot;);&quot;&quot;;[.R66]-[.Q66])">
            <text:p/>
          </table:table-cell>
          <table:table-cell table:formula="of:=IF(OR([.S66]=&quot;&quot;;[.A66]=&quot;&quot;);&quot;&quot;;[.S66]-[.A66])">
            <text:p/>
          </table:table-cell>
          <table:table-cell table:number-columns-repeated="3"/>
          <table:table-cell table:formula="of:=IF(OR([.W66]=&quot;&quot;;[.V66]=&quot;&quot;);&quot;&quot;;[.W66]-[.V66])">
            <text:p/>
          </table:table-cell>
          <table:table-cell table:formula="of:=IF(OR([.X66]=&quot;&quot;;[.A66]=&quot;&quot;);&quot;&quot;;[.X66]-[.A66])">
            <text:p/>
          </table:table-cell>
          <table:table-cell table:number-columns-repeated="3"/>
          <table:table-cell table:formula="of:=IF(OR([.AB66]=&quot;&quot;;[.AA66]=&quot;&quot;);&quot;&quot;;[.AB66]-[.AA66])">
            <text:p/>
          </table:table-cell>
          <table:table-cell table:formula="of:=IF(OR([.AC66]=&quot;&quot;;[.A66]=&quot;&quot;);&quot;&quot;;[.AC66]-[.A66])">
            <text:p/>
          </table:table-cell>
        </table:table-row>
        <table:table-row table:style-name="ro2">
          <table:table-cell table:number-columns-repeated="4"/>
          <table:table-cell table:formula="of:=IF(OR([.C67]=&quot;&quot;;[.B67]=&quot;&quot;);&quot;&quot;;[.C67]-[.B67])">
            <text:p/>
          </table:table-cell>
          <table:table-cell table:formula="of:=IF(OR([.D67]=&quot;&quot;;[.A67]=&quot;&quot;);&quot;&quot;;[.D67]-[.A67])">
            <text:p/>
          </table:table-cell>
          <table:table-cell table:number-columns-repeated="3"/>
          <table:table-cell table:formula="of:=IF(OR([.H67]=&quot;&quot;;[.G67]=&quot;&quot;);&quot;&quot;;[.H67]-[.G67])">
            <text:p/>
          </table:table-cell>
          <table:table-cell table:formula="of:=IF(OR([.I67]=&quot;&quot;;[.A67]=&quot;&quot;);&quot;&quot;;[.I67]-[.A67])">
            <text:p/>
          </table:table-cell>
          <table:table-cell table:number-columns-repeated="3"/>
          <table:table-cell table:formula="of:=IF(OR([.M67]=&quot;&quot;;[.L67]=&quot;&quot;);&quot;&quot;;[.M67]-[.L67])">
            <text:p/>
          </table:table-cell>
          <table:table-cell table:formula="of:=IF(OR([.N67]=&quot;&quot;;[.A67]=&quot;&quot;);&quot;&quot;;[.N67]-[.A67])">
            <text:p/>
          </table:table-cell>
          <table:table-cell table:number-columns-repeated="3"/>
          <table:table-cell table:formula="of:=IF(OR([.R67]=&quot;&quot;;[.Q67]=&quot;&quot;);&quot;&quot;;[.R67]-[.Q67])">
            <text:p/>
          </table:table-cell>
          <table:table-cell table:formula="of:=IF(OR([.S67]=&quot;&quot;;[.A67]=&quot;&quot;);&quot;&quot;;[.S67]-[.A67])">
            <text:p/>
          </table:table-cell>
          <table:table-cell table:number-columns-repeated="3"/>
          <table:table-cell table:formula="of:=IF(OR([.W67]=&quot;&quot;;[.V67]=&quot;&quot;);&quot;&quot;;[.W67]-[.V67])">
            <text:p/>
          </table:table-cell>
          <table:table-cell table:formula="of:=IF(OR([.X67]=&quot;&quot;;[.A67]=&quot;&quot;);&quot;&quot;;[.X67]-[.A67])">
            <text:p/>
          </table:table-cell>
          <table:table-cell table:number-columns-repeated="3"/>
          <table:table-cell table:formula="of:=IF(OR([.AB67]=&quot;&quot;;[.AA67]=&quot;&quot;);&quot;&quot;;[.AB67]-[.AA67])">
            <text:p/>
          </table:table-cell>
          <table:table-cell table:formula="of:=IF(OR([.AC67]=&quot;&quot;;[.A67]=&quot;&quot;);&quot;&quot;;[.AC67]-[.A67])">
            <text:p/>
          </table:table-cell>
        </table:table-row>
        <table:table-row table:style-name="ro2">
          <table:table-cell table:number-columns-repeated="4"/>
          <table:table-cell table:formula="of:=IF(OR([.C68]=&quot;&quot;;[.B68]=&quot;&quot;);&quot;&quot;;[.C68]-[.B68])">
            <text:p/>
          </table:table-cell>
          <table:table-cell table:formula="of:=IF(OR([.D68]=&quot;&quot;;[.A68]=&quot;&quot;);&quot;&quot;;[.D68]-[.A68])">
            <text:p/>
          </table:table-cell>
          <table:table-cell table:number-columns-repeated="3"/>
          <table:table-cell table:formula="of:=IF(OR([.H68]=&quot;&quot;;[.G68]=&quot;&quot;);&quot;&quot;;[.H68]-[.G68])">
            <text:p/>
          </table:table-cell>
          <table:table-cell table:formula="of:=IF(OR([.I68]=&quot;&quot;;[.A68]=&quot;&quot;);&quot;&quot;;[.I68]-[.A68])">
            <text:p/>
          </table:table-cell>
          <table:table-cell table:number-columns-repeated="3"/>
          <table:table-cell table:formula="of:=IF(OR([.M68]=&quot;&quot;;[.L68]=&quot;&quot;);&quot;&quot;;[.M68]-[.L68])">
            <text:p/>
          </table:table-cell>
          <table:table-cell table:formula="of:=IF(OR([.N68]=&quot;&quot;;[.A68]=&quot;&quot;);&quot;&quot;;[.N68]-[.A68])">
            <text:p/>
          </table:table-cell>
          <table:table-cell table:number-columns-repeated="3"/>
          <table:table-cell table:formula="of:=IF(OR([.R68]=&quot;&quot;;[.Q68]=&quot;&quot;);&quot;&quot;;[.R68]-[.Q68])">
            <text:p/>
          </table:table-cell>
          <table:table-cell table:formula="of:=IF(OR([.S68]=&quot;&quot;;[.A68]=&quot;&quot;);&quot;&quot;;[.S68]-[.A68])">
            <text:p/>
          </table:table-cell>
          <table:table-cell table:number-columns-repeated="3"/>
          <table:table-cell table:formula="of:=IF(OR([.W68]=&quot;&quot;;[.V68]=&quot;&quot;);&quot;&quot;;[.W68]-[.V68])">
            <text:p/>
          </table:table-cell>
          <table:table-cell table:formula="of:=IF(OR([.X68]=&quot;&quot;;[.A68]=&quot;&quot;);&quot;&quot;;[.X68]-[.A68])">
            <text:p/>
          </table:table-cell>
          <table:table-cell table:number-columns-repeated="3"/>
          <table:table-cell table:formula="of:=IF(OR([.AB68]=&quot;&quot;;[.AA68]=&quot;&quot;);&quot;&quot;;[.AB68]-[.AA68])">
            <text:p/>
          </table:table-cell>
          <table:table-cell table:formula="of:=IF(OR([.AC68]=&quot;&quot;;[.A68]=&quot;&quot;);&quot;&quot;;[.AC68]-[.A68])">
            <text:p/>
          </table:table-cell>
        </table:table-row>
        <table:table-row table:style-name="ro2">
          <table:table-cell table:number-columns-repeated="4"/>
          <table:table-cell table:formula="of:=IF(OR([.C69]=&quot;&quot;;[.B69]=&quot;&quot;);&quot;&quot;;[.C69]-[.B69])">
            <text:p/>
          </table:table-cell>
          <table:table-cell table:formula="of:=IF(OR([.D69]=&quot;&quot;;[.A69]=&quot;&quot;);&quot;&quot;;[.D69]-[.A69])">
            <text:p/>
          </table:table-cell>
          <table:table-cell table:number-columns-repeated="3"/>
          <table:table-cell table:formula="of:=IF(OR([.H69]=&quot;&quot;;[.G69]=&quot;&quot;);&quot;&quot;;[.H69]-[.G69])">
            <text:p/>
          </table:table-cell>
          <table:table-cell table:formula="of:=IF(OR([.I69]=&quot;&quot;;[.A69]=&quot;&quot;);&quot;&quot;;[.I69]-[.A69])">
            <text:p/>
          </table:table-cell>
          <table:table-cell table:number-columns-repeated="3"/>
          <table:table-cell table:formula="of:=IF(OR([.M69]=&quot;&quot;;[.L69]=&quot;&quot;);&quot;&quot;;[.M69]-[.L69])">
            <text:p/>
          </table:table-cell>
          <table:table-cell table:formula="of:=IF(OR([.N69]=&quot;&quot;;[.A69]=&quot;&quot;);&quot;&quot;;[.N69]-[.A69])">
            <text:p/>
          </table:table-cell>
          <table:table-cell table:number-columns-repeated="3"/>
          <table:table-cell table:formula="of:=IF(OR([.R69]=&quot;&quot;;[.Q69]=&quot;&quot;);&quot;&quot;;[.R69]-[.Q69])">
            <text:p/>
          </table:table-cell>
          <table:table-cell table:formula="of:=IF(OR([.S69]=&quot;&quot;;[.A69]=&quot;&quot;);&quot;&quot;;[.S69]-[.A69])">
            <text:p/>
          </table:table-cell>
          <table:table-cell table:number-columns-repeated="3"/>
          <table:table-cell table:formula="of:=IF(OR([.W69]=&quot;&quot;;[.V69]=&quot;&quot;);&quot;&quot;;[.W69]-[.V69])">
            <text:p/>
          </table:table-cell>
          <table:table-cell table:formula="of:=IF(OR([.X69]=&quot;&quot;;[.A69]=&quot;&quot;);&quot;&quot;;[.X69]-[.A69])">
            <text:p/>
          </table:table-cell>
          <table:table-cell table:number-columns-repeated="3"/>
          <table:table-cell table:formula="of:=IF(OR([.AB69]=&quot;&quot;;[.AA69]=&quot;&quot;);&quot;&quot;;[.AB69]-[.AA69])">
            <text:p/>
          </table:table-cell>
          <table:table-cell table:formula="of:=IF(OR([.AC69]=&quot;&quot;;[.A69]=&quot;&quot;);&quot;&quot;;[.AC69]-[.A69])">
            <text:p/>
          </table:table-cell>
        </table:table-row>
        <table:table-row table:style-name="ro2">
          <table:table-cell table:number-columns-repeated="4"/>
          <table:table-cell table:formula="of:=IF(OR([.C70]=&quot;&quot;;[.B70]=&quot;&quot;);&quot;&quot;;[.C70]-[.B70])">
            <text:p/>
          </table:table-cell>
          <table:table-cell table:formula="of:=IF(OR([.D70]=&quot;&quot;;[.A70]=&quot;&quot;);&quot;&quot;;[.D70]-[.A70])">
            <text:p/>
          </table:table-cell>
          <table:table-cell table:number-columns-repeated="3"/>
          <table:table-cell table:formula="of:=IF(OR([.H70]=&quot;&quot;;[.G70]=&quot;&quot;);&quot;&quot;;[.H70]-[.G70])">
            <text:p/>
          </table:table-cell>
          <table:table-cell table:formula="of:=IF(OR([.I70]=&quot;&quot;;[.A70]=&quot;&quot;);&quot;&quot;;[.I70]-[.A70])">
            <text:p/>
          </table:table-cell>
          <table:table-cell table:number-columns-repeated="3"/>
          <table:table-cell table:formula="of:=IF(OR([.M70]=&quot;&quot;;[.L70]=&quot;&quot;);&quot;&quot;;[.M70]-[.L70])">
            <text:p/>
          </table:table-cell>
          <table:table-cell table:formula="of:=IF(OR([.N70]=&quot;&quot;;[.A70]=&quot;&quot;);&quot;&quot;;[.N70]-[.A70])">
            <text:p/>
          </table:table-cell>
          <table:table-cell table:number-columns-repeated="3"/>
          <table:table-cell table:formula="of:=IF(OR([.R70]=&quot;&quot;;[.Q70]=&quot;&quot;);&quot;&quot;;[.R70]-[.Q70])">
            <text:p/>
          </table:table-cell>
          <table:table-cell table:formula="of:=IF(OR([.S70]=&quot;&quot;;[.A70]=&quot;&quot;);&quot;&quot;;[.S70]-[.A70])">
            <text:p/>
          </table:table-cell>
          <table:table-cell table:number-columns-repeated="3"/>
          <table:table-cell table:formula="of:=IF(OR([.W70]=&quot;&quot;;[.V70]=&quot;&quot;);&quot;&quot;;[.W70]-[.V70])">
            <text:p/>
          </table:table-cell>
          <table:table-cell table:formula="of:=IF(OR([.X70]=&quot;&quot;;[.A70]=&quot;&quot;);&quot;&quot;;[.X70]-[.A70])">
            <text:p/>
          </table:table-cell>
          <table:table-cell table:number-columns-repeated="3"/>
          <table:table-cell table:formula="of:=IF(OR([.AB70]=&quot;&quot;;[.AA70]=&quot;&quot;);&quot;&quot;;[.AB70]-[.AA70])">
            <text:p/>
          </table:table-cell>
          <table:table-cell table:formula="of:=IF(OR([.AC70]=&quot;&quot;;[.A70]=&quot;&quot;);&quot;&quot;;[.AC70]-[.A70])">
            <text:p/>
          </table:table-cell>
        </table:table-row>
        <table:table-row table:style-name="ro2">
          <table:table-cell table:number-columns-repeated="4"/>
          <table:table-cell table:formula="of:=IF(OR([.C71]=&quot;&quot;;[.B71]=&quot;&quot;);&quot;&quot;;[.C71]-[.B71])">
            <text:p/>
          </table:table-cell>
          <table:table-cell table:formula="of:=IF(OR([.D71]=&quot;&quot;;[.A71]=&quot;&quot;);&quot;&quot;;[.D71]-[.A71])">
            <text:p/>
          </table:table-cell>
          <table:table-cell table:number-columns-repeated="3"/>
          <table:table-cell table:formula="of:=IF(OR([.H71]=&quot;&quot;;[.G71]=&quot;&quot;);&quot;&quot;;[.H71]-[.G71])">
            <text:p/>
          </table:table-cell>
          <table:table-cell table:formula="of:=IF(OR([.I71]=&quot;&quot;;[.A71]=&quot;&quot;);&quot;&quot;;[.I71]-[.A71])">
            <text:p/>
          </table:table-cell>
          <table:table-cell table:number-columns-repeated="3"/>
          <table:table-cell table:formula="of:=IF(OR([.M71]=&quot;&quot;;[.L71]=&quot;&quot;);&quot;&quot;;[.M71]-[.L71])">
            <text:p/>
          </table:table-cell>
          <table:table-cell table:formula="of:=IF(OR([.N71]=&quot;&quot;;[.A71]=&quot;&quot;);&quot;&quot;;[.N71]-[.A71])">
            <text:p/>
          </table:table-cell>
          <table:table-cell table:number-columns-repeated="3"/>
          <table:table-cell table:formula="of:=IF(OR([.R71]=&quot;&quot;;[.Q71]=&quot;&quot;);&quot;&quot;;[.R71]-[.Q71])">
            <text:p/>
          </table:table-cell>
          <table:table-cell table:formula="of:=IF(OR([.S71]=&quot;&quot;;[.A71]=&quot;&quot;);&quot;&quot;;[.S71]-[.A71])">
            <text:p/>
          </table:table-cell>
          <table:table-cell table:number-columns-repeated="3"/>
          <table:table-cell table:formula="of:=IF(OR([.W71]=&quot;&quot;;[.V71]=&quot;&quot;);&quot;&quot;;[.W71]-[.V71])">
            <text:p/>
          </table:table-cell>
          <table:table-cell table:formula="of:=IF(OR([.X71]=&quot;&quot;;[.A71]=&quot;&quot;);&quot;&quot;;[.X71]-[.A71])">
            <text:p/>
          </table:table-cell>
          <table:table-cell table:number-columns-repeated="3"/>
          <table:table-cell table:formula="of:=IF(OR([.AB71]=&quot;&quot;;[.AA71]=&quot;&quot;);&quot;&quot;;[.AB71]-[.AA71])">
            <text:p/>
          </table:table-cell>
          <table:table-cell table:formula="of:=IF(OR([.AC71]=&quot;&quot;;[.A71]=&quot;&quot;);&quot;&quot;;[.AC71]-[.A71])">
            <text:p/>
          </table:table-cell>
        </table:table-row>
        <table:table-row table:style-name="ro2">
          <table:table-cell table:number-columns-repeated="4"/>
          <table:table-cell table:formula="of:=IF(OR([.C72]=&quot;&quot;;[.B72]=&quot;&quot;);&quot;&quot;;[.C72]-[.B72])">
            <text:p/>
          </table:table-cell>
          <table:table-cell table:formula="of:=IF(OR([.D72]=&quot;&quot;;[.A72]=&quot;&quot;);&quot;&quot;;[.D72]-[.A72])">
            <text:p/>
          </table:table-cell>
          <table:table-cell table:number-columns-repeated="3"/>
          <table:table-cell table:formula="of:=IF(OR([.H72]=&quot;&quot;;[.G72]=&quot;&quot;);&quot;&quot;;[.H72]-[.G72])">
            <text:p/>
          </table:table-cell>
          <table:table-cell table:formula="of:=IF(OR([.I72]=&quot;&quot;;[.A72]=&quot;&quot;);&quot;&quot;;[.I72]-[.A72])">
            <text:p/>
          </table:table-cell>
          <table:table-cell table:number-columns-repeated="3"/>
          <table:table-cell table:formula="of:=IF(OR([.M72]=&quot;&quot;;[.L72]=&quot;&quot;);&quot;&quot;;[.M72]-[.L72])">
            <text:p/>
          </table:table-cell>
          <table:table-cell table:formula="of:=IF(OR([.N72]=&quot;&quot;;[.A72]=&quot;&quot;);&quot;&quot;;[.N72]-[.A72])">
            <text:p/>
          </table:table-cell>
          <table:table-cell table:number-columns-repeated="3"/>
          <table:table-cell table:formula="of:=IF(OR([.R72]=&quot;&quot;;[.Q72]=&quot;&quot;);&quot;&quot;;[.R72]-[.Q72])">
            <text:p/>
          </table:table-cell>
          <table:table-cell table:formula="of:=IF(OR([.S72]=&quot;&quot;;[.A72]=&quot;&quot;);&quot;&quot;;[.S72]-[.A72])">
            <text:p/>
          </table:table-cell>
          <table:table-cell table:number-columns-repeated="3"/>
          <table:table-cell table:formula="of:=IF(OR([.W72]=&quot;&quot;;[.V72]=&quot;&quot;);&quot;&quot;;[.W72]-[.V72])">
            <text:p/>
          </table:table-cell>
          <table:table-cell table:formula="of:=IF(OR([.X72]=&quot;&quot;;[.A72]=&quot;&quot;);&quot;&quot;;[.X72]-[.A72])">
            <text:p/>
          </table:table-cell>
          <table:table-cell table:number-columns-repeated="3"/>
          <table:table-cell table:formula="of:=IF(OR([.AB72]=&quot;&quot;;[.AA72]=&quot;&quot;);&quot;&quot;;[.AB72]-[.AA72])">
            <text:p/>
          </table:table-cell>
          <table:table-cell table:formula="of:=IF(OR([.AC72]=&quot;&quot;;[.A72]=&quot;&quot;);&quot;&quot;;[.AC72]-[.A72])">
            <text:p/>
          </table:table-cell>
        </table:table-row>
        <table:table-row table:style-name="ro2">
          <table:table-cell table:number-columns-repeated="4"/>
          <table:table-cell table:formula="of:=IF(OR([.C73]=&quot;&quot;;[.B73]=&quot;&quot;);&quot;&quot;;[.C73]-[.B73])">
            <text:p/>
          </table:table-cell>
          <table:table-cell table:formula="of:=IF(OR([.D73]=&quot;&quot;;[.A73]=&quot;&quot;);&quot;&quot;;[.D73]-[.A73])">
            <text:p/>
          </table:table-cell>
          <table:table-cell table:number-columns-repeated="3"/>
          <table:table-cell table:formula="of:=IF(OR([.H73]=&quot;&quot;;[.G73]=&quot;&quot;);&quot;&quot;;[.H73]-[.G73])">
            <text:p/>
          </table:table-cell>
          <table:table-cell table:formula="of:=IF(OR([.I73]=&quot;&quot;;[.A73]=&quot;&quot;);&quot;&quot;;[.I73]-[.A73])">
            <text:p/>
          </table:table-cell>
          <table:table-cell table:number-columns-repeated="3"/>
          <table:table-cell table:formula="of:=IF(OR([.M73]=&quot;&quot;;[.L73]=&quot;&quot;);&quot;&quot;;[.M73]-[.L73])">
            <text:p/>
          </table:table-cell>
          <table:table-cell table:formula="of:=IF(OR([.N73]=&quot;&quot;;[.A73]=&quot;&quot;);&quot;&quot;;[.N73]-[.A73])">
            <text:p/>
          </table:table-cell>
          <table:table-cell table:number-columns-repeated="3"/>
          <table:table-cell table:formula="of:=IF(OR([.R73]=&quot;&quot;;[.Q73]=&quot;&quot;);&quot;&quot;;[.R73]-[.Q73])">
            <text:p/>
          </table:table-cell>
          <table:table-cell table:formula="of:=IF(OR([.S73]=&quot;&quot;;[.A73]=&quot;&quot;);&quot;&quot;;[.S73]-[.A73])">
            <text:p/>
          </table:table-cell>
          <table:table-cell table:number-columns-repeated="3"/>
          <table:table-cell table:formula="of:=IF(OR([.W73]=&quot;&quot;;[.V73]=&quot;&quot;);&quot;&quot;;[.W73]-[.V73])">
            <text:p/>
          </table:table-cell>
          <table:table-cell table:formula="of:=IF(OR([.X73]=&quot;&quot;;[.A73]=&quot;&quot;);&quot;&quot;;[.X73]-[.A73])">
            <text:p/>
          </table:table-cell>
          <table:table-cell table:number-columns-repeated="3"/>
          <table:table-cell table:formula="of:=IF(OR([.AB73]=&quot;&quot;;[.AA73]=&quot;&quot;);&quot;&quot;;[.AB73]-[.AA73])">
            <text:p/>
          </table:table-cell>
          <table:table-cell table:formula="of:=IF(OR([.AC73]=&quot;&quot;;[.A73]=&quot;&quot;);&quot;&quot;;[.AC73]-[.A73])">
            <text:p/>
          </table:table-cell>
        </table:table-row>
        <table:table-row table:style-name="ro2">
          <table:table-cell table:number-columns-repeated="4"/>
          <table:table-cell table:formula="of:=IF(OR([.C74]=&quot;&quot;;[.B74]=&quot;&quot;);&quot;&quot;;[.C74]-[.B74])">
            <text:p/>
          </table:table-cell>
          <table:table-cell table:formula="of:=IF(OR([.D74]=&quot;&quot;;[.A74]=&quot;&quot;);&quot;&quot;;[.D74]-[.A74])">
            <text:p/>
          </table:table-cell>
          <table:table-cell table:number-columns-repeated="3"/>
          <table:table-cell table:formula="of:=IF(OR([.H74]=&quot;&quot;;[.G74]=&quot;&quot;);&quot;&quot;;[.H74]-[.G74])">
            <text:p/>
          </table:table-cell>
          <table:table-cell table:formula="of:=IF(OR([.I74]=&quot;&quot;;[.A74]=&quot;&quot;);&quot;&quot;;[.I74]-[.A74])">
            <text:p/>
          </table:table-cell>
          <table:table-cell table:number-columns-repeated="3"/>
          <table:table-cell table:formula="of:=IF(OR([.M74]=&quot;&quot;;[.L74]=&quot;&quot;);&quot;&quot;;[.M74]-[.L74])">
            <text:p/>
          </table:table-cell>
          <table:table-cell table:formula="of:=IF(OR([.N74]=&quot;&quot;;[.A74]=&quot;&quot;);&quot;&quot;;[.N74]-[.A74])">
            <text:p/>
          </table:table-cell>
          <table:table-cell table:number-columns-repeated="3"/>
          <table:table-cell table:formula="of:=IF(OR([.R74]=&quot;&quot;;[.Q74]=&quot;&quot;);&quot;&quot;;[.R74]-[.Q74])">
            <text:p/>
          </table:table-cell>
          <table:table-cell table:formula="of:=IF(OR([.S74]=&quot;&quot;;[.A74]=&quot;&quot;);&quot;&quot;;[.S74]-[.A74])">
            <text:p/>
          </table:table-cell>
          <table:table-cell table:number-columns-repeated="3"/>
          <table:table-cell table:formula="of:=IF(OR([.W74]=&quot;&quot;;[.V74]=&quot;&quot;);&quot;&quot;;[.W74]-[.V74])">
            <text:p/>
          </table:table-cell>
          <table:table-cell table:formula="of:=IF(OR([.X74]=&quot;&quot;;[.A74]=&quot;&quot;);&quot;&quot;;[.X74]-[.A74])">
            <text:p/>
          </table:table-cell>
          <table:table-cell table:number-columns-repeated="3"/>
          <table:table-cell table:formula="of:=IF(OR([.AB74]=&quot;&quot;;[.AA74]=&quot;&quot;);&quot;&quot;;[.AB74]-[.AA74])">
            <text:p/>
          </table:table-cell>
          <table:table-cell table:formula="of:=IF(OR([.AC74]=&quot;&quot;;[.A74]=&quot;&quot;);&quot;&quot;;[.AC74]-[.A74])">
            <text:p/>
          </table:table-cell>
        </table:table-row>
        <table:table-row table:style-name="ro2">
          <table:table-cell table:number-columns-repeated="4"/>
          <table:table-cell table:formula="of:=IF(OR([.C75]=&quot;&quot;;[.B75]=&quot;&quot;);&quot;&quot;;[.C75]-[.B75])">
            <text:p/>
          </table:table-cell>
          <table:table-cell table:formula="of:=IF(OR([.D75]=&quot;&quot;;[.A75]=&quot;&quot;);&quot;&quot;;[.D75]-[.A75])">
            <text:p/>
          </table:table-cell>
          <table:table-cell table:number-columns-repeated="3"/>
          <table:table-cell table:formula="of:=IF(OR([.H75]=&quot;&quot;;[.G75]=&quot;&quot;);&quot;&quot;;[.H75]-[.G75])">
            <text:p/>
          </table:table-cell>
          <table:table-cell table:formula="of:=IF(OR([.I75]=&quot;&quot;;[.A75]=&quot;&quot;);&quot;&quot;;[.I75]-[.A75])">
            <text:p/>
          </table:table-cell>
          <table:table-cell table:number-columns-repeated="3"/>
          <table:table-cell table:formula="of:=IF(OR([.M75]=&quot;&quot;;[.L75]=&quot;&quot;);&quot;&quot;;[.M75]-[.L75])">
            <text:p/>
          </table:table-cell>
          <table:table-cell table:formula="of:=IF(OR([.N75]=&quot;&quot;;[.A75]=&quot;&quot;);&quot;&quot;;[.N75]-[.A75])">
            <text:p/>
          </table:table-cell>
          <table:table-cell table:number-columns-repeated="3"/>
          <table:table-cell table:formula="of:=IF(OR([.R75]=&quot;&quot;;[.Q75]=&quot;&quot;);&quot;&quot;;[.R75]-[.Q75])">
            <text:p/>
          </table:table-cell>
          <table:table-cell table:formula="of:=IF(OR([.S75]=&quot;&quot;;[.A75]=&quot;&quot;);&quot;&quot;;[.S75]-[.A75])">
            <text:p/>
          </table:table-cell>
          <table:table-cell table:number-columns-repeated="3"/>
          <table:table-cell table:formula="of:=IF(OR([.W75]=&quot;&quot;;[.V75]=&quot;&quot;);&quot;&quot;;[.W75]-[.V75])">
            <text:p/>
          </table:table-cell>
          <table:table-cell table:formula="of:=IF(OR([.X75]=&quot;&quot;;[.A75]=&quot;&quot;);&quot;&quot;;[.X75]-[.A75])">
            <text:p/>
          </table:table-cell>
          <table:table-cell table:number-columns-repeated="3"/>
          <table:table-cell table:formula="of:=IF(OR([.AB75]=&quot;&quot;;[.AA75]=&quot;&quot;);&quot;&quot;;[.AB75]-[.AA75])">
            <text:p/>
          </table:table-cell>
          <table:table-cell table:formula="of:=IF(OR([.AC75]=&quot;&quot;;[.A75]=&quot;&quot;);&quot;&quot;;[.AC75]-[.A75])">
            <text:p/>
          </table:table-cell>
        </table:table-row>
        <table:table-row table:style-name="ro2">
          <table:table-cell table:number-columns-repeated="4"/>
          <table:table-cell table:formula="of:=IF(OR([.C76]=&quot;&quot;;[.B76]=&quot;&quot;);&quot;&quot;;[.C76]-[.B76])">
            <text:p/>
          </table:table-cell>
          <table:table-cell table:formula="of:=IF(OR([.D76]=&quot;&quot;;[.A76]=&quot;&quot;);&quot;&quot;;[.D76]-[.A76])">
            <text:p/>
          </table:table-cell>
          <table:table-cell table:number-columns-repeated="3"/>
          <table:table-cell table:formula="of:=IF(OR([.H76]=&quot;&quot;;[.G76]=&quot;&quot;);&quot;&quot;;[.H76]-[.G76])">
            <text:p/>
          </table:table-cell>
          <table:table-cell table:formula="of:=IF(OR([.I76]=&quot;&quot;;[.A76]=&quot;&quot;);&quot;&quot;;[.I76]-[.A76])">
            <text:p/>
          </table:table-cell>
          <table:table-cell table:number-columns-repeated="3"/>
          <table:table-cell table:formula="of:=IF(OR([.M76]=&quot;&quot;;[.L76]=&quot;&quot;);&quot;&quot;;[.M76]-[.L76])">
            <text:p/>
          </table:table-cell>
          <table:table-cell table:formula="of:=IF(OR([.N76]=&quot;&quot;;[.A76]=&quot;&quot;);&quot;&quot;;[.N76]-[.A76])">
            <text:p/>
          </table:table-cell>
          <table:table-cell table:number-columns-repeated="3"/>
          <table:table-cell table:formula="of:=IF(OR([.R76]=&quot;&quot;;[.Q76]=&quot;&quot;);&quot;&quot;;[.R76]-[.Q76])">
            <text:p/>
          </table:table-cell>
          <table:table-cell table:formula="of:=IF(OR([.S76]=&quot;&quot;;[.A76]=&quot;&quot;);&quot;&quot;;[.S76]-[.A76])">
            <text:p/>
          </table:table-cell>
          <table:table-cell table:number-columns-repeated="3"/>
          <table:table-cell table:formula="of:=IF(OR([.W76]=&quot;&quot;;[.V76]=&quot;&quot;);&quot;&quot;;[.W76]-[.V76])">
            <text:p/>
          </table:table-cell>
          <table:table-cell table:formula="of:=IF(OR([.X76]=&quot;&quot;;[.A76]=&quot;&quot;);&quot;&quot;;[.X76]-[.A76])">
            <text:p/>
          </table:table-cell>
          <table:table-cell table:number-columns-repeated="3"/>
          <table:table-cell table:formula="of:=IF(OR([.AB76]=&quot;&quot;;[.AA76]=&quot;&quot;);&quot;&quot;;[.AB76]-[.AA76])">
            <text:p/>
          </table:table-cell>
          <table:table-cell table:formula="of:=IF(OR([.AC76]=&quot;&quot;;[.A76]=&quot;&quot;);&quot;&quot;;[.AC76]-[.A76])">
            <text:p/>
          </table:table-cell>
        </table:table-row>
        <table:table-row table:style-name="ro2">
          <table:table-cell table:number-columns-repeated="4"/>
          <table:table-cell table:formula="of:=IF(OR([.C77]=&quot;&quot;;[.B77]=&quot;&quot;);&quot;&quot;;[.C77]-[.B77])">
            <text:p/>
          </table:table-cell>
          <table:table-cell table:formula="of:=IF(OR([.D77]=&quot;&quot;;[.A77]=&quot;&quot;);&quot;&quot;;[.D77]-[.A77])">
            <text:p/>
          </table:table-cell>
          <table:table-cell table:number-columns-repeated="3"/>
          <table:table-cell table:formula="of:=IF(OR([.H77]=&quot;&quot;;[.G77]=&quot;&quot;);&quot;&quot;;[.H77]-[.G77])">
            <text:p/>
          </table:table-cell>
          <table:table-cell table:formula="of:=IF(OR([.I77]=&quot;&quot;;[.A77]=&quot;&quot;);&quot;&quot;;[.I77]-[.A77])">
            <text:p/>
          </table:table-cell>
          <table:table-cell table:number-columns-repeated="3"/>
          <table:table-cell table:formula="of:=IF(OR([.M77]=&quot;&quot;;[.L77]=&quot;&quot;);&quot;&quot;;[.M77]-[.L77])">
            <text:p/>
          </table:table-cell>
          <table:table-cell table:formula="of:=IF(OR([.N77]=&quot;&quot;;[.A77]=&quot;&quot;);&quot;&quot;;[.N77]-[.A77])">
            <text:p/>
          </table:table-cell>
          <table:table-cell table:number-columns-repeated="3"/>
          <table:table-cell table:formula="of:=IF(OR([.R77]=&quot;&quot;;[.Q77]=&quot;&quot;);&quot;&quot;;[.R77]-[.Q77])">
            <text:p/>
          </table:table-cell>
          <table:table-cell table:formula="of:=IF(OR([.S77]=&quot;&quot;;[.A77]=&quot;&quot;);&quot;&quot;;[.S77]-[.A77])">
            <text:p/>
          </table:table-cell>
          <table:table-cell table:number-columns-repeated="3"/>
          <table:table-cell table:formula="of:=IF(OR([.W77]=&quot;&quot;;[.V77]=&quot;&quot;);&quot;&quot;;[.W77]-[.V77])">
            <text:p/>
          </table:table-cell>
          <table:table-cell table:formula="of:=IF(OR([.X77]=&quot;&quot;;[.A77]=&quot;&quot;);&quot;&quot;;[.X77]-[.A77])">
            <text:p/>
          </table:table-cell>
          <table:table-cell table:number-columns-repeated="3"/>
          <table:table-cell table:formula="of:=IF(OR([.AB77]=&quot;&quot;;[.AA77]=&quot;&quot;);&quot;&quot;;[.AB77]-[.AA77])">
            <text:p/>
          </table:table-cell>
          <table:table-cell table:formula="of:=IF(OR([.AC77]=&quot;&quot;;[.A77]=&quot;&quot;);&quot;&quot;;[.AC77]-[.A77])">
            <text:p/>
          </table:table-cell>
        </table:table-row>
        <table:table-row table:style-name="ro2">
          <table:table-cell table:number-columns-repeated="4"/>
          <table:table-cell table:formula="of:=IF(OR([.C78]=&quot;&quot;;[.B78]=&quot;&quot;);&quot;&quot;;[.C78]-[.B78])">
            <text:p/>
          </table:table-cell>
          <table:table-cell table:formula="of:=IF(OR([.D78]=&quot;&quot;;[.A78]=&quot;&quot;);&quot;&quot;;[.D78]-[.A78])">
            <text:p/>
          </table:table-cell>
          <table:table-cell table:number-columns-repeated="3"/>
          <table:table-cell table:formula="of:=IF(OR([.H78]=&quot;&quot;;[.G78]=&quot;&quot;);&quot;&quot;;[.H78]-[.G78])">
            <text:p/>
          </table:table-cell>
          <table:table-cell table:formula="of:=IF(OR([.I78]=&quot;&quot;;[.A78]=&quot;&quot;);&quot;&quot;;[.I78]-[.A78])">
            <text:p/>
          </table:table-cell>
          <table:table-cell table:number-columns-repeated="3"/>
          <table:table-cell table:formula="of:=IF(OR([.M78]=&quot;&quot;;[.L78]=&quot;&quot;);&quot;&quot;;[.M78]-[.L78])">
            <text:p/>
          </table:table-cell>
          <table:table-cell table:formula="of:=IF(OR([.N78]=&quot;&quot;;[.A78]=&quot;&quot;);&quot;&quot;;[.N78]-[.A78])">
            <text:p/>
          </table:table-cell>
          <table:table-cell table:number-columns-repeated="3"/>
          <table:table-cell table:formula="of:=IF(OR([.R78]=&quot;&quot;;[.Q78]=&quot;&quot;);&quot;&quot;;[.R78]-[.Q78])">
            <text:p/>
          </table:table-cell>
          <table:table-cell table:formula="of:=IF(OR([.S78]=&quot;&quot;;[.A78]=&quot;&quot;);&quot;&quot;;[.S78]-[.A78])">
            <text:p/>
          </table:table-cell>
          <table:table-cell table:number-columns-repeated="3"/>
          <table:table-cell table:formula="of:=IF(OR([.W78]=&quot;&quot;;[.V78]=&quot;&quot;);&quot;&quot;;[.W78]-[.V78])">
            <text:p/>
          </table:table-cell>
          <table:table-cell table:formula="of:=IF(OR([.X78]=&quot;&quot;;[.A78]=&quot;&quot;);&quot;&quot;;[.X78]-[.A78])">
            <text:p/>
          </table:table-cell>
          <table:table-cell table:number-columns-repeated="3"/>
          <table:table-cell table:formula="of:=IF(OR([.AB78]=&quot;&quot;;[.AA78]=&quot;&quot;);&quot;&quot;;[.AB78]-[.AA78])">
            <text:p/>
          </table:table-cell>
          <table:table-cell table:formula="of:=IF(OR([.AC78]=&quot;&quot;;[.A78]=&quot;&quot;);&quot;&quot;;[.AC78]-[.A78])">
            <text:p/>
          </table:table-cell>
        </table:table-row>
        <table:table-row table:style-name="ro2">
          <table:table-cell table:number-columns-repeated="4"/>
          <table:table-cell table:formula="of:=IF(OR([.C79]=&quot;&quot;;[.B79]=&quot;&quot;);&quot;&quot;;[.C79]-[.B79])">
            <text:p/>
          </table:table-cell>
          <table:table-cell table:formula="of:=IF(OR([.D79]=&quot;&quot;;[.A79]=&quot;&quot;);&quot;&quot;;[.D79]-[.A79])">
            <text:p/>
          </table:table-cell>
          <table:table-cell table:number-columns-repeated="3"/>
          <table:table-cell table:formula="of:=IF(OR([.H79]=&quot;&quot;;[.G79]=&quot;&quot;);&quot;&quot;;[.H79]-[.G79])">
            <text:p/>
          </table:table-cell>
          <table:table-cell table:formula="of:=IF(OR([.I79]=&quot;&quot;;[.A79]=&quot;&quot;);&quot;&quot;;[.I79]-[.A79])">
            <text:p/>
          </table:table-cell>
          <table:table-cell table:number-columns-repeated="3"/>
          <table:table-cell table:formula="of:=IF(OR([.M79]=&quot;&quot;;[.L79]=&quot;&quot;);&quot;&quot;;[.M79]-[.L79])">
            <text:p/>
          </table:table-cell>
          <table:table-cell table:formula="of:=IF(OR([.N79]=&quot;&quot;;[.A79]=&quot;&quot;);&quot;&quot;;[.N79]-[.A79])">
            <text:p/>
          </table:table-cell>
          <table:table-cell table:number-columns-repeated="3"/>
          <table:table-cell table:formula="of:=IF(OR([.R79]=&quot;&quot;;[.Q79]=&quot;&quot;);&quot;&quot;;[.R79]-[.Q79])">
            <text:p/>
          </table:table-cell>
          <table:table-cell table:formula="of:=IF(OR([.S79]=&quot;&quot;;[.A79]=&quot;&quot;);&quot;&quot;;[.S79]-[.A79])">
            <text:p/>
          </table:table-cell>
          <table:table-cell table:number-columns-repeated="3"/>
          <table:table-cell table:formula="of:=IF(OR([.W79]=&quot;&quot;;[.V79]=&quot;&quot;);&quot;&quot;;[.W79]-[.V79])">
            <text:p/>
          </table:table-cell>
          <table:table-cell table:formula="of:=IF(OR([.X79]=&quot;&quot;;[.A79]=&quot;&quot;);&quot;&quot;;[.X79]-[.A79])">
            <text:p/>
          </table:table-cell>
          <table:table-cell table:number-columns-repeated="3"/>
          <table:table-cell table:formula="of:=IF(OR([.AB79]=&quot;&quot;;[.AA79]=&quot;&quot;);&quot;&quot;;[.AB79]-[.AA79])">
            <text:p/>
          </table:table-cell>
          <table:table-cell table:formula="of:=IF(OR([.AC79]=&quot;&quot;;[.A79]=&quot;&quot;);&quot;&quot;;[.AC79]-[.A79])">
            <text:p/>
          </table:table-cell>
        </table:table-row>
        <table:table-row table:style-name="ro2">
          <table:table-cell table:number-columns-repeated="4"/>
          <table:table-cell table:formula="of:=IF(OR([.C80]=&quot;&quot;;[.B80]=&quot;&quot;);&quot;&quot;;[.C80]-[.B80])">
            <text:p/>
          </table:table-cell>
          <table:table-cell table:formula="of:=IF(OR([.D80]=&quot;&quot;;[.A80]=&quot;&quot;);&quot;&quot;;[.D80]-[.A80])">
            <text:p/>
          </table:table-cell>
          <table:table-cell table:number-columns-repeated="3"/>
          <table:table-cell table:formula="of:=IF(OR([.H80]=&quot;&quot;;[.G80]=&quot;&quot;);&quot;&quot;;[.H80]-[.G80])">
            <text:p/>
          </table:table-cell>
          <table:table-cell table:formula="of:=IF(OR([.I80]=&quot;&quot;;[.A80]=&quot;&quot;);&quot;&quot;;[.I80]-[.A80])">
            <text:p/>
          </table:table-cell>
          <table:table-cell table:number-columns-repeated="3"/>
          <table:table-cell table:formula="of:=IF(OR([.M80]=&quot;&quot;;[.L80]=&quot;&quot;);&quot;&quot;;[.M80]-[.L80])">
            <text:p/>
          </table:table-cell>
          <table:table-cell table:formula="of:=IF(OR([.N80]=&quot;&quot;;[.A80]=&quot;&quot;);&quot;&quot;;[.N80]-[.A80])">
            <text:p/>
          </table:table-cell>
          <table:table-cell table:number-columns-repeated="3"/>
          <table:table-cell table:formula="of:=IF(OR([.R80]=&quot;&quot;;[.Q80]=&quot;&quot;);&quot;&quot;;[.R80]-[.Q80])">
            <text:p/>
          </table:table-cell>
          <table:table-cell table:formula="of:=IF(OR([.S80]=&quot;&quot;;[.A80]=&quot;&quot;);&quot;&quot;;[.S80]-[.A80])">
            <text:p/>
          </table:table-cell>
          <table:table-cell table:number-columns-repeated="3"/>
          <table:table-cell table:formula="of:=IF(OR([.W80]=&quot;&quot;;[.V80]=&quot;&quot;);&quot;&quot;;[.W80]-[.V80])">
            <text:p/>
          </table:table-cell>
          <table:table-cell table:formula="of:=IF(OR([.X80]=&quot;&quot;;[.A80]=&quot;&quot;);&quot;&quot;;[.X80]-[.A80])">
            <text:p/>
          </table:table-cell>
          <table:table-cell table:number-columns-repeated="3"/>
          <table:table-cell table:formula="of:=IF(OR([.AB80]=&quot;&quot;;[.AA80]=&quot;&quot;);&quot;&quot;;[.AB80]-[.AA80])">
            <text:p/>
          </table:table-cell>
          <table:table-cell table:formula="of:=IF(OR([.AC80]=&quot;&quot;;[.A80]=&quot;&quot;);&quot;&quot;;[.AC80]-[.A80])">
            <text:p/>
          </table:table-cell>
        </table:table-row>
        <table:table-row table:style-name="ro2">
          <table:table-cell table:number-columns-repeated="4"/>
          <table:table-cell table:formula="of:=IF(OR([.C81]=&quot;&quot;;[.B81]=&quot;&quot;);&quot;&quot;;[.C81]-[.B81])">
            <text:p/>
          </table:table-cell>
          <table:table-cell table:formula="of:=IF(OR([.D81]=&quot;&quot;;[.A81]=&quot;&quot;);&quot;&quot;;[.D81]-[.A81])">
            <text:p/>
          </table:table-cell>
          <table:table-cell table:number-columns-repeated="3"/>
          <table:table-cell table:formula="of:=IF(OR([.H81]=&quot;&quot;;[.G81]=&quot;&quot;);&quot;&quot;;[.H81]-[.G81])">
            <text:p/>
          </table:table-cell>
          <table:table-cell table:formula="of:=IF(OR([.I81]=&quot;&quot;;[.A81]=&quot;&quot;);&quot;&quot;;[.I81]-[.A81])">
            <text:p/>
          </table:table-cell>
          <table:table-cell table:number-columns-repeated="3"/>
          <table:table-cell table:formula="of:=IF(OR([.M81]=&quot;&quot;;[.L81]=&quot;&quot;);&quot;&quot;;[.M81]-[.L81])">
            <text:p/>
          </table:table-cell>
          <table:table-cell table:formula="of:=IF(OR([.N81]=&quot;&quot;;[.A81]=&quot;&quot;);&quot;&quot;;[.N81]-[.A81])">
            <text:p/>
          </table:table-cell>
          <table:table-cell table:number-columns-repeated="3"/>
          <table:table-cell table:formula="of:=IF(OR([.R81]=&quot;&quot;;[.Q81]=&quot;&quot;);&quot;&quot;;[.R81]-[.Q81])">
            <text:p/>
          </table:table-cell>
          <table:table-cell table:formula="of:=IF(OR([.S81]=&quot;&quot;;[.A81]=&quot;&quot;);&quot;&quot;;[.S81]-[.A81])">
            <text:p/>
          </table:table-cell>
          <table:table-cell table:number-columns-repeated="3"/>
          <table:table-cell table:formula="of:=IF(OR([.W81]=&quot;&quot;;[.V81]=&quot;&quot;);&quot;&quot;;[.W81]-[.V81])">
            <text:p/>
          </table:table-cell>
          <table:table-cell table:formula="of:=IF(OR([.X81]=&quot;&quot;;[.A81]=&quot;&quot;);&quot;&quot;;[.X81]-[.A81])">
            <text:p/>
          </table:table-cell>
          <table:table-cell table:number-columns-repeated="3"/>
          <table:table-cell table:formula="of:=IF(OR([.AB81]=&quot;&quot;;[.AA81]=&quot;&quot;);&quot;&quot;;[.AB81]-[.AA81])">
            <text:p/>
          </table:table-cell>
          <table:table-cell table:formula="of:=IF(OR([.AC81]=&quot;&quot;;[.A81]=&quot;&quot;);&quot;&quot;;[.AC81]-[.A81])">
            <text:p/>
          </table:table-cell>
        </table:table-row>
        <table:table-row table:style-name="ro2">
          <table:table-cell table:number-columns-repeated="4"/>
          <table:table-cell table:formula="of:=IF(OR([.C82]=&quot;&quot;;[.B82]=&quot;&quot;);&quot;&quot;;[.C82]-[.B82])">
            <text:p/>
          </table:table-cell>
          <table:table-cell table:formula="of:=IF(OR([.D82]=&quot;&quot;;[.A82]=&quot;&quot;);&quot;&quot;;[.D82]-[.A82])">
            <text:p/>
          </table:table-cell>
          <table:table-cell table:number-columns-repeated="3"/>
          <table:table-cell table:formula="of:=IF(OR([.H82]=&quot;&quot;;[.G82]=&quot;&quot;);&quot;&quot;;[.H82]-[.G82])">
            <text:p/>
          </table:table-cell>
          <table:table-cell table:formula="of:=IF(OR([.I82]=&quot;&quot;;[.A82]=&quot;&quot;);&quot;&quot;;[.I82]-[.A82])">
            <text:p/>
          </table:table-cell>
          <table:table-cell table:number-columns-repeated="3"/>
          <table:table-cell table:formula="of:=IF(OR([.M82]=&quot;&quot;;[.L82]=&quot;&quot;);&quot;&quot;;[.M82]-[.L82])">
            <text:p/>
          </table:table-cell>
          <table:table-cell table:formula="of:=IF(OR([.N82]=&quot;&quot;;[.A82]=&quot;&quot;);&quot;&quot;;[.N82]-[.A82])">
            <text:p/>
          </table:table-cell>
          <table:table-cell table:number-columns-repeated="3"/>
          <table:table-cell table:formula="of:=IF(OR([.R82]=&quot;&quot;;[.Q82]=&quot;&quot;);&quot;&quot;;[.R82]-[.Q82])">
            <text:p/>
          </table:table-cell>
          <table:table-cell table:formula="of:=IF(OR([.S82]=&quot;&quot;;[.A82]=&quot;&quot;);&quot;&quot;;[.S82]-[.A82])">
            <text:p/>
          </table:table-cell>
          <table:table-cell table:number-columns-repeated="3"/>
          <table:table-cell table:formula="of:=IF(OR([.W82]=&quot;&quot;;[.V82]=&quot;&quot;);&quot;&quot;;[.W82]-[.V82])">
            <text:p/>
          </table:table-cell>
          <table:table-cell table:formula="of:=IF(OR([.X82]=&quot;&quot;;[.A82]=&quot;&quot;);&quot;&quot;;[.X82]-[.A82])">
            <text:p/>
          </table:table-cell>
          <table:table-cell table:number-columns-repeated="3"/>
          <table:table-cell table:formula="of:=IF(OR([.AB82]=&quot;&quot;;[.AA82]=&quot;&quot;);&quot;&quot;;[.AB82]-[.AA82])">
            <text:p/>
          </table:table-cell>
          <table:table-cell table:formula="of:=IF(OR([.AC82]=&quot;&quot;;[.A82]=&quot;&quot;);&quot;&quot;;[.AC82]-[.A82])">
            <text:p/>
          </table:table-cell>
        </table:table-row>
        <table:table-row table:style-name="ro2">
          <table:table-cell table:number-columns-repeated="4"/>
          <table:table-cell table:formula="of:=IF(OR([.C83]=&quot;&quot;;[.B83]=&quot;&quot;);&quot;&quot;;[.C83]-[.B83])">
            <text:p/>
          </table:table-cell>
          <table:table-cell table:formula="of:=IF(OR([.D83]=&quot;&quot;;[.A83]=&quot;&quot;);&quot;&quot;;[.D83]-[.A83])">
            <text:p/>
          </table:table-cell>
          <table:table-cell table:number-columns-repeated="3"/>
          <table:table-cell table:formula="of:=IF(OR([.H83]=&quot;&quot;;[.G83]=&quot;&quot;);&quot;&quot;;[.H83]-[.G83])">
            <text:p/>
          </table:table-cell>
          <table:table-cell table:formula="of:=IF(OR([.I83]=&quot;&quot;;[.A83]=&quot;&quot;);&quot;&quot;;[.I83]-[.A83])">
            <text:p/>
          </table:table-cell>
          <table:table-cell table:number-columns-repeated="3"/>
          <table:table-cell table:formula="of:=IF(OR([.M83]=&quot;&quot;;[.L83]=&quot;&quot;);&quot;&quot;;[.M83]-[.L83])">
            <text:p/>
          </table:table-cell>
          <table:table-cell table:formula="of:=IF(OR([.N83]=&quot;&quot;;[.A83]=&quot;&quot;);&quot;&quot;;[.N83]-[.A83])">
            <text:p/>
          </table:table-cell>
          <table:table-cell table:number-columns-repeated="3"/>
          <table:table-cell table:formula="of:=IF(OR([.R83]=&quot;&quot;;[.Q83]=&quot;&quot;);&quot;&quot;;[.R83]-[.Q83])">
            <text:p/>
          </table:table-cell>
          <table:table-cell table:formula="of:=IF(OR([.S83]=&quot;&quot;;[.A83]=&quot;&quot;);&quot;&quot;;[.S83]-[.A83])">
            <text:p/>
          </table:table-cell>
          <table:table-cell table:number-columns-repeated="3"/>
          <table:table-cell table:formula="of:=IF(OR([.W83]=&quot;&quot;;[.V83]=&quot;&quot;);&quot;&quot;;[.W83]-[.V83])">
            <text:p/>
          </table:table-cell>
          <table:table-cell table:formula="of:=IF(OR([.X83]=&quot;&quot;;[.A83]=&quot;&quot;);&quot;&quot;;[.X83]-[.A83])">
            <text:p/>
          </table:table-cell>
          <table:table-cell table:number-columns-repeated="3"/>
          <table:table-cell table:formula="of:=IF(OR([.AB83]=&quot;&quot;;[.AA83]=&quot;&quot;);&quot;&quot;;[.AB83]-[.AA83])">
            <text:p/>
          </table:table-cell>
          <table:table-cell table:formula="of:=IF(OR([.AC83]=&quot;&quot;;[.A83]=&quot;&quot;);&quot;&quot;;[.AC83]-[.A83])">
            <text:p/>
          </table:table-cell>
        </table:table-row>
        <table:table-row table:style-name="ro2">
          <table:table-cell table:number-columns-repeated="4"/>
          <table:table-cell table:formula="of:=IF(OR([.C84]=&quot;&quot;;[.B84]=&quot;&quot;);&quot;&quot;;[.C84]-[.B84])">
            <text:p/>
          </table:table-cell>
          <table:table-cell table:formula="of:=IF(OR([.D84]=&quot;&quot;;[.A84]=&quot;&quot;);&quot;&quot;;[.D84]-[.A84])">
            <text:p/>
          </table:table-cell>
          <table:table-cell table:number-columns-repeated="3"/>
          <table:table-cell table:formula="of:=IF(OR([.H84]=&quot;&quot;;[.G84]=&quot;&quot;);&quot;&quot;;[.H84]-[.G84])">
            <text:p/>
          </table:table-cell>
          <table:table-cell table:formula="of:=IF(OR([.I84]=&quot;&quot;;[.A84]=&quot;&quot;);&quot;&quot;;[.I84]-[.A84])">
            <text:p/>
          </table:table-cell>
          <table:table-cell table:number-columns-repeated="3"/>
          <table:table-cell table:formula="of:=IF(OR([.M84]=&quot;&quot;;[.L84]=&quot;&quot;);&quot;&quot;;[.M84]-[.L84])">
            <text:p/>
          </table:table-cell>
          <table:table-cell table:formula="of:=IF(OR([.N84]=&quot;&quot;;[.A84]=&quot;&quot;);&quot;&quot;;[.N84]-[.A84])">
            <text:p/>
          </table:table-cell>
          <table:table-cell table:number-columns-repeated="3"/>
          <table:table-cell table:formula="of:=IF(OR([.R84]=&quot;&quot;;[.Q84]=&quot;&quot;);&quot;&quot;;[.R84]-[.Q84])">
            <text:p/>
          </table:table-cell>
          <table:table-cell table:formula="of:=IF(OR([.S84]=&quot;&quot;;[.A84]=&quot;&quot;);&quot;&quot;;[.S84]-[.A84])">
            <text:p/>
          </table:table-cell>
          <table:table-cell table:number-columns-repeated="3"/>
          <table:table-cell table:formula="of:=IF(OR([.W84]=&quot;&quot;;[.V84]=&quot;&quot;);&quot;&quot;;[.W84]-[.V84])">
            <text:p/>
          </table:table-cell>
          <table:table-cell table:formula="of:=IF(OR([.X84]=&quot;&quot;;[.A84]=&quot;&quot;);&quot;&quot;;[.X84]-[.A84])">
            <text:p/>
          </table:table-cell>
          <table:table-cell table:number-columns-repeated="3"/>
          <table:table-cell table:formula="of:=IF(OR([.AB84]=&quot;&quot;;[.AA84]=&quot;&quot;);&quot;&quot;;[.AB84]-[.AA84])">
            <text:p/>
          </table:table-cell>
          <table:table-cell table:formula="of:=IF(OR([.AC84]=&quot;&quot;;[.A84]=&quot;&quot;);&quot;&quot;;[.AC84]-[.A84])">
            <text:p/>
          </table:table-cell>
        </table:table-row>
        <table:table-row table:style-name="ro2">
          <table:table-cell table:number-columns-repeated="4"/>
          <table:table-cell table:formula="of:=IF(OR([.C85]=&quot;&quot;;[.B85]=&quot;&quot;);&quot;&quot;;[.C85]-[.B85])">
            <text:p/>
          </table:table-cell>
          <table:table-cell table:formula="of:=IF(OR([.D85]=&quot;&quot;;[.A85]=&quot;&quot;);&quot;&quot;;[.D85]-[.A85])">
            <text:p/>
          </table:table-cell>
          <table:table-cell table:number-columns-repeated="3"/>
          <table:table-cell table:formula="of:=IF(OR([.H85]=&quot;&quot;;[.G85]=&quot;&quot;);&quot;&quot;;[.H85]-[.G85])">
            <text:p/>
          </table:table-cell>
          <table:table-cell table:formula="of:=IF(OR([.I85]=&quot;&quot;;[.A85]=&quot;&quot;);&quot;&quot;;[.I85]-[.A85])">
            <text:p/>
          </table:table-cell>
          <table:table-cell table:number-columns-repeated="3"/>
          <table:table-cell table:formula="of:=IF(OR([.M85]=&quot;&quot;;[.L85]=&quot;&quot;);&quot;&quot;;[.M85]-[.L85])">
            <text:p/>
          </table:table-cell>
          <table:table-cell table:formula="of:=IF(OR([.N85]=&quot;&quot;;[.A85]=&quot;&quot;);&quot;&quot;;[.N85]-[.A85])">
            <text:p/>
          </table:table-cell>
          <table:table-cell table:number-columns-repeated="3"/>
          <table:table-cell table:formula="of:=IF(OR([.R85]=&quot;&quot;;[.Q85]=&quot;&quot;);&quot;&quot;;[.R85]-[.Q85])">
            <text:p/>
          </table:table-cell>
          <table:table-cell table:formula="of:=IF(OR([.S85]=&quot;&quot;;[.A85]=&quot;&quot;);&quot;&quot;;[.S85]-[.A85])">
            <text:p/>
          </table:table-cell>
          <table:table-cell table:number-columns-repeated="3"/>
          <table:table-cell table:formula="of:=IF(OR([.W85]=&quot;&quot;;[.V85]=&quot;&quot;);&quot;&quot;;[.W85]-[.V85])">
            <text:p/>
          </table:table-cell>
          <table:table-cell table:formula="of:=IF(OR([.X85]=&quot;&quot;;[.A85]=&quot;&quot;);&quot;&quot;;[.X85]-[.A85])">
            <text:p/>
          </table:table-cell>
          <table:table-cell table:number-columns-repeated="3"/>
          <table:table-cell table:formula="of:=IF(OR([.AB85]=&quot;&quot;;[.AA85]=&quot;&quot;);&quot;&quot;;[.AB85]-[.AA85])">
            <text:p/>
          </table:table-cell>
          <table:table-cell table:formula="of:=IF(OR([.AC85]=&quot;&quot;;[.A85]=&quot;&quot;);&quot;&quot;;[.AC85]-[.A85])">
            <text:p/>
          </table:table-cell>
        </table:table-row>
        <table:table-row table:style-name="ro2">
          <table:table-cell table:number-columns-repeated="4"/>
          <table:table-cell table:formula="of:=IF(OR([.C86]=&quot;&quot;;[.B86]=&quot;&quot;);&quot;&quot;;[.C86]-[.B86])">
            <text:p/>
          </table:table-cell>
          <table:table-cell table:formula="of:=IF(OR([.D86]=&quot;&quot;;[.A86]=&quot;&quot;);&quot;&quot;;[.D86]-[.A86])">
            <text:p/>
          </table:table-cell>
          <table:table-cell table:number-columns-repeated="3"/>
          <table:table-cell table:formula="of:=IF(OR([.H86]=&quot;&quot;;[.G86]=&quot;&quot;);&quot;&quot;;[.H86]-[.G86])">
            <text:p/>
          </table:table-cell>
          <table:table-cell table:formula="of:=IF(OR([.I86]=&quot;&quot;;[.A86]=&quot;&quot;);&quot;&quot;;[.I86]-[.A86])">
            <text:p/>
          </table:table-cell>
          <table:table-cell table:number-columns-repeated="3"/>
          <table:table-cell table:formula="of:=IF(OR([.M86]=&quot;&quot;;[.L86]=&quot;&quot;);&quot;&quot;;[.M86]-[.L86])">
            <text:p/>
          </table:table-cell>
          <table:table-cell table:formula="of:=IF(OR([.N86]=&quot;&quot;;[.A86]=&quot;&quot;);&quot;&quot;;[.N86]-[.A86])">
            <text:p/>
          </table:table-cell>
          <table:table-cell table:number-columns-repeated="3"/>
          <table:table-cell table:formula="of:=IF(OR([.R86]=&quot;&quot;;[.Q86]=&quot;&quot;);&quot;&quot;;[.R86]-[.Q86])">
            <text:p/>
          </table:table-cell>
          <table:table-cell table:formula="of:=IF(OR([.S86]=&quot;&quot;;[.A86]=&quot;&quot;);&quot;&quot;;[.S86]-[.A86])">
            <text:p/>
          </table:table-cell>
          <table:table-cell table:number-columns-repeated="3"/>
          <table:table-cell table:formula="of:=IF(OR([.W86]=&quot;&quot;;[.V86]=&quot;&quot;);&quot;&quot;;[.W86]-[.V86])">
            <text:p/>
          </table:table-cell>
          <table:table-cell table:formula="of:=IF(OR([.X86]=&quot;&quot;;[.A86]=&quot;&quot;);&quot;&quot;;[.X86]-[.A86])">
            <text:p/>
          </table:table-cell>
          <table:table-cell table:number-columns-repeated="3"/>
          <table:table-cell table:formula="of:=IF(OR([.AB86]=&quot;&quot;;[.AA86]=&quot;&quot;);&quot;&quot;;[.AB86]-[.AA86])">
            <text:p/>
          </table:table-cell>
          <table:table-cell table:formula="of:=IF(OR([.AC86]=&quot;&quot;;[.A86]=&quot;&quot;);&quot;&quot;;[.AC86]-[.A86])">
            <text:p/>
          </table:table-cell>
        </table:table-row>
        <table:table-row table:style-name="ro2">
          <table:table-cell table:number-columns-repeated="4"/>
          <table:table-cell table:formula="of:=IF(OR([.C87]=&quot;&quot;;[.B87]=&quot;&quot;);&quot;&quot;;[.C87]-[.B87])">
            <text:p/>
          </table:table-cell>
          <table:table-cell table:formula="of:=IF(OR([.D87]=&quot;&quot;;[.A87]=&quot;&quot;);&quot;&quot;;[.D87]-[.A87])">
            <text:p/>
          </table:table-cell>
          <table:table-cell table:number-columns-repeated="3"/>
          <table:table-cell table:formula="of:=IF(OR([.H87]=&quot;&quot;;[.G87]=&quot;&quot;);&quot;&quot;;[.H87]-[.G87])">
            <text:p/>
          </table:table-cell>
          <table:table-cell table:formula="of:=IF(OR([.I87]=&quot;&quot;;[.A87]=&quot;&quot;);&quot;&quot;;[.I87]-[.A87])">
            <text:p/>
          </table:table-cell>
          <table:table-cell table:number-columns-repeated="3"/>
          <table:table-cell table:formula="of:=IF(OR([.M87]=&quot;&quot;;[.L87]=&quot;&quot;);&quot;&quot;;[.M87]-[.L87])">
            <text:p/>
          </table:table-cell>
          <table:table-cell table:formula="of:=IF(OR([.N87]=&quot;&quot;;[.A87]=&quot;&quot;);&quot;&quot;;[.N87]-[.A87])">
            <text:p/>
          </table:table-cell>
          <table:table-cell table:number-columns-repeated="3"/>
          <table:table-cell table:formula="of:=IF(OR([.R87]=&quot;&quot;;[.Q87]=&quot;&quot;);&quot;&quot;;[.R87]-[.Q87])">
            <text:p/>
          </table:table-cell>
          <table:table-cell table:formula="of:=IF(OR([.S87]=&quot;&quot;;[.A87]=&quot;&quot;);&quot;&quot;;[.S87]-[.A87])">
            <text:p/>
          </table:table-cell>
          <table:table-cell table:number-columns-repeated="3"/>
          <table:table-cell table:formula="of:=IF(OR([.W87]=&quot;&quot;;[.V87]=&quot;&quot;);&quot;&quot;;[.W87]-[.V87])">
            <text:p/>
          </table:table-cell>
          <table:table-cell table:formula="of:=IF(OR([.X87]=&quot;&quot;;[.A87]=&quot;&quot;);&quot;&quot;;[.X87]-[.A87])">
            <text:p/>
          </table:table-cell>
          <table:table-cell table:number-columns-repeated="3"/>
          <table:table-cell table:formula="of:=IF(OR([.AB87]=&quot;&quot;;[.AA87]=&quot;&quot;);&quot;&quot;;[.AB87]-[.AA87])">
            <text:p/>
          </table:table-cell>
          <table:table-cell table:formula="of:=IF(OR([.AC87]=&quot;&quot;;[.A87]=&quot;&quot;);&quot;&quot;;[.AC87]-[.A87])">
            <text:p/>
          </table:table-cell>
        </table:table-row>
        <table:table-row table:style-name="ro2">
          <table:table-cell table:number-columns-repeated="4"/>
          <table:table-cell table:formula="of:=IF(OR([.C88]=&quot;&quot;;[.B88]=&quot;&quot;);&quot;&quot;;[.C88]-[.B88])">
            <text:p/>
          </table:table-cell>
          <table:table-cell table:formula="of:=IF(OR([.D88]=&quot;&quot;;[.A88]=&quot;&quot;);&quot;&quot;;[.D88]-[.A88])">
            <text:p/>
          </table:table-cell>
          <table:table-cell table:number-columns-repeated="3"/>
          <table:table-cell table:formula="of:=IF(OR([.H88]=&quot;&quot;;[.G88]=&quot;&quot;);&quot;&quot;;[.H88]-[.G88])">
            <text:p/>
          </table:table-cell>
          <table:table-cell table:formula="of:=IF(OR([.I88]=&quot;&quot;;[.A88]=&quot;&quot;);&quot;&quot;;[.I88]-[.A88])">
            <text:p/>
          </table:table-cell>
          <table:table-cell table:number-columns-repeated="3"/>
          <table:table-cell table:formula="of:=IF(OR([.M88]=&quot;&quot;;[.L88]=&quot;&quot;);&quot;&quot;;[.M88]-[.L88])">
            <text:p/>
          </table:table-cell>
          <table:table-cell table:formula="of:=IF(OR([.N88]=&quot;&quot;;[.A88]=&quot;&quot;);&quot;&quot;;[.N88]-[.A88])">
            <text:p/>
          </table:table-cell>
          <table:table-cell table:number-columns-repeated="3"/>
          <table:table-cell table:formula="of:=IF(OR([.R88]=&quot;&quot;;[.Q88]=&quot;&quot;);&quot;&quot;;[.R88]-[.Q88])">
            <text:p/>
          </table:table-cell>
          <table:table-cell table:formula="of:=IF(OR([.S88]=&quot;&quot;;[.A88]=&quot;&quot;);&quot;&quot;;[.S88]-[.A88])">
            <text:p/>
          </table:table-cell>
          <table:table-cell table:number-columns-repeated="3"/>
          <table:table-cell table:formula="of:=IF(OR([.W88]=&quot;&quot;;[.V88]=&quot;&quot;);&quot;&quot;;[.W88]-[.V88])">
            <text:p/>
          </table:table-cell>
          <table:table-cell table:formula="of:=IF(OR([.X88]=&quot;&quot;;[.A88]=&quot;&quot;);&quot;&quot;;[.X88]-[.A88])">
            <text:p/>
          </table:table-cell>
          <table:table-cell table:number-columns-repeated="3"/>
          <table:table-cell table:formula="of:=IF(OR([.AB88]=&quot;&quot;;[.AA88]=&quot;&quot;);&quot;&quot;;[.AB88]-[.AA88])">
            <text:p/>
          </table:table-cell>
          <table:table-cell table:formula="of:=IF(OR([.AC88]=&quot;&quot;;[.A88]=&quot;&quot;);&quot;&quot;;[.AC88]-[.A88])">
            <text:p/>
          </table:table-cell>
        </table:table-row>
        <table:table-row table:style-name="ro2">
          <table:table-cell table:number-columns-repeated="4"/>
          <table:table-cell table:formula="of:=IF(OR([.C89]=&quot;&quot;;[.B89]=&quot;&quot;);&quot;&quot;;[.C89]-[.B89])">
            <text:p/>
          </table:table-cell>
          <table:table-cell table:formula="of:=IF(OR([.D89]=&quot;&quot;;[.A89]=&quot;&quot;);&quot;&quot;;[.D89]-[.A89])">
            <text:p/>
          </table:table-cell>
          <table:table-cell table:number-columns-repeated="3"/>
          <table:table-cell table:formula="of:=IF(OR([.H89]=&quot;&quot;;[.G89]=&quot;&quot;);&quot;&quot;;[.H89]-[.G89])">
            <text:p/>
          </table:table-cell>
          <table:table-cell table:formula="of:=IF(OR([.I89]=&quot;&quot;;[.A89]=&quot;&quot;);&quot;&quot;;[.I89]-[.A89])">
            <text:p/>
          </table:table-cell>
          <table:table-cell table:number-columns-repeated="3"/>
          <table:table-cell table:formula="of:=IF(OR([.M89]=&quot;&quot;;[.L89]=&quot;&quot;);&quot;&quot;;[.M89]-[.L89])">
            <text:p/>
          </table:table-cell>
          <table:table-cell table:formula="of:=IF(OR([.N89]=&quot;&quot;;[.A89]=&quot;&quot;);&quot;&quot;;[.N89]-[.A89])">
            <text:p/>
          </table:table-cell>
          <table:table-cell table:number-columns-repeated="3"/>
          <table:table-cell table:formula="of:=IF(OR([.R89]=&quot;&quot;;[.Q89]=&quot;&quot;);&quot;&quot;;[.R89]-[.Q89])">
            <text:p/>
          </table:table-cell>
          <table:table-cell table:formula="of:=IF(OR([.S89]=&quot;&quot;;[.A89]=&quot;&quot;);&quot;&quot;;[.S89]-[.A89])">
            <text:p/>
          </table:table-cell>
          <table:table-cell table:number-columns-repeated="3"/>
          <table:table-cell table:formula="of:=IF(OR([.W89]=&quot;&quot;;[.V89]=&quot;&quot;);&quot;&quot;;[.W89]-[.V89])">
            <text:p/>
          </table:table-cell>
          <table:table-cell table:formula="of:=IF(OR([.X89]=&quot;&quot;;[.A89]=&quot;&quot;);&quot;&quot;;[.X89]-[.A89])">
            <text:p/>
          </table:table-cell>
          <table:table-cell table:number-columns-repeated="3"/>
          <table:table-cell table:formula="of:=IF(OR([.AB89]=&quot;&quot;;[.AA89]=&quot;&quot;);&quot;&quot;;[.AB89]-[.AA89])">
            <text:p/>
          </table:table-cell>
          <table:table-cell table:formula="of:=IF(OR([.AC89]=&quot;&quot;;[.A89]=&quot;&quot;);&quot;&quot;;[.AC89]-[.A89])">
            <text:p/>
          </table:table-cell>
        </table:table-row>
        <table:table-row table:style-name="ro2">
          <table:table-cell table:number-columns-repeated="4"/>
          <table:table-cell table:formula="of:=IF(OR([.C90]=&quot;&quot;;[.B90]=&quot;&quot;);&quot;&quot;;[.C90]-[.B90])">
            <text:p/>
          </table:table-cell>
          <table:table-cell table:formula="of:=IF(OR([.D90]=&quot;&quot;;[.A90]=&quot;&quot;);&quot;&quot;;[.D90]-[.A90])">
            <text:p/>
          </table:table-cell>
          <table:table-cell table:number-columns-repeated="3"/>
          <table:table-cell table:formula="of:=IF(OR([.H90]=&quot;&quot;;[.G90]=&quot;&quot;);&quot;&quot;;[.H90]-[.G90])">
            <text:p/>
          </table:table-cell>
          <table:table-cell table:formula="of:=IF(OR([.I90]=&quot;&quot;;[.A90]=&quot;&quot;);&quot;&quot;;[.I90]-[.A90])">
            <text:p/>
          </table:table-cell>
          <table:table-cell table:number-columns-repeated="3"/>
          <table:table-cell table:formula="of:=IF(OR([.M90]=&quot;&quot;;[.L90]=&quot;&quot;);&quot;&quot;;[.M90]-[.L90])">
            <text:p/>
          </table:table-cell>
          <table:table-cell table:formula="of:=IF(OR([.N90]=&quot;&quot;;[.A90]=&quot;&quot;);&quot;&quot;;[.N90]-[.A90])">
            <text:p/>
          </table:table-cell>
          <table:table-cell table:number-columns-repeated="3"/>
          <table:table-cell table:formula="of:=IF(OR([.R90]=&quot;&quot;;[.Q90]=&quot;&quot;);&quot;&quot;;[.R90]-[.Q90])">
            <text:p/>
          </table:table-cell>
          <table:table-cell table:formula="of:=IF(OR([.S90]=&quot;&quot;;[.A90]=&quot;&quot;);&quot;&quot;;[.S90]-[.A90])">
            <text:p/>
          </table:table-cell>
          <table:table-cell table:number-columns-repeated="3"/>
          <table:table-cell table:formula="of:=IF(OR([.W90]=&quot;&quot;;[.V90]=&quot;&quot;);&quot;&quot;;[.W90]-[.V90])">
            <text:p/>
          </table:table-cell>
          <table:table-cell table:formula="of:=IF(OR([.X90]=&quot;&quot;;[.A90]=&quot;&quot;);&quot;&quot;;[.X90]-[.A90])">
            <text:p/>
          </table:table-cell>
          <table:table-cell table:number-columns-repeated="3"/>
          <table:table-cell table:formula="of:=IF(OR([.AB90]=&quot;&quot;;[.AA90]=&quot;&quot;);&quot;&quot;;[.AB90]-[.AA90])">
            <text:p/>
          </table:table-cell>
          <table:table-cell table:formula="of:=IF(OR([.AC90]=&quot;&quot;;[.A90]=&quot;&quot;);&quot;&quot;;[.AC90]-[.A90])">
            <text:p/>
          </table:table-cell>
        </table:table-row>
        <table:table-row table:style-name="ro2">
          <table:table-cell table:number-columns-repeated="4"/>
          <table:table-cell table:formula="of:=IF(OR([.C91]=&quot;&quot;;[.B91]=&quot;&quot;);&quot;&quot;;[.C91]-[.B91])">
            <text:p/>
          </table:table-cell>
          <table:table-cell table:formula="of:=IF(OR([.D91]=&quot;&quot;;[.A91]=&quot;&quot;);&quot;&quot;;[.D91]-[.A91])">
            <text:p/>
          </table:table-cell>
          <table:table-cell table:number-columns-repeated="3"/>
          <table:table-cell table:formula="of:=IF(OR([.H91]=&quot;&quot;;[.G91]=&quot;&quot;);&quot;&quot;;[.H91]-[.G91])">
            <text:p/>
          </table:table-cell>
          <table:table-cell table:formula="of:=IF(OR([.I91]=&quot;&quot;;[.A91]=&quot;&quot;);&quot;&quot;;[.I91]-[.A91])">
            <text:p/>
          </table:table-cell>
          <table:table-cell table:number-columns-repeated="3"/>
          <table:table-cell table:formula="of:=IF(OR([.M91]=&quot;&quot;;[.L91]=&quot;&quot;);&quot;&quot;;[.M91]-[.L91])">
            <text:p/>
          </table:table-cell>
          <table:table-cell table:formula="of:=IF(OR([.N91]=&quot;&quot;;[.A91]=&quot;&quot;);&quot;&quot;;[.N91]-[.A91])">
            <text:p/>
          </table:table-cell>
          <table:table-cell table:number-columns-repeated="3"/>
          <table:table-cell table:formula="of:=IF(OR([.R91]=&quot;&quot;;[.Q91]=&quot;&quot;);&quot;&quot;;[.R91]-[.Q91])">
            <text:p/>
          </table:table-cell>
          <table:table-cell table:formula="of:=IF(OR([.S91]=&quot;&quot;;[.A91]=&quot;&quot;);&quot;&quot;;[.S91]-[.A91])">
            <text:p/>
          </table:table-cell>
          <table:table-cell table:number-columns-repeated="3"/>
          <table:table-cell table:formula="of:=IF(OR([.W91]=&quot;&quot;;[.V91]=&quot;&quot;);&quot;&quot;;[.W91]-[.V91])">
            <text:p/>
          </table:table-cell>
          <table:table-cell table:formula="of:=IF(OR([.X91]=&quot;&quot;;[.A91]=&quot;&quot;);&quot;&quot;;[.X91]-[.A91])">
            <text:p/>
          </table:table-cell>
          <table:table-cell table:number-columns-repeated="3"/>
          <table:table-cell table:formula="of:=IF(OR([.AB91]=&quot;&quot;;[.AA91]=&quot;&quot;);&quot;&quot;;[.AB91]-[.AA91])">
            <text:p/>
          </table:table-cell>
          <table:table-cell table:formula="of:=IF(OR([.AC91]=&quot;&quot;;[.A91]=&quot;&quot;);&quot;&quot;;[.AC91]-[.A91])">
            <text:p/>
          </table:table-cell>
        </table:table-row>
        <table:table-row table:style-name="ro2">
          <table:table-cell table:number-columns-repeated="4"/>
          <table:table-cell table:formula="of:=IF(OR([.C92]=&quot;&quot;;[.B92]=&quot;&quot;);&quot;&quot;;[.C92]-[.B92])">
            <text:p/>
          </table:table-cell>
          <table:table-cell table:formula="of:=IF(OR([.D92]=&quot;&quot;;[.A92]=&quot;&quot;);&quot;&quot;;[.D92]-[.A92])">
            <text:p/>
          </table:table-cell>
          <table:table-cell table:number-columns-repeated="3"/>
          <table:table-cell table:formula="of:=IF(OR([.H92]=&quot;&quot;;[.G92]=&quot;&quot;);&quot;&quot;;[.H92]-[.G92])">
            <text:p/>
          </table:table-cell>
          <table:table-cell table:formula="of:=IF(OR([.I92]=&quot;&quot;;[.A92]=&quot;&quot;);&quot;&quot;;[.I92]-[.A92])">
            <text:p/>
          </table:table-cell>
          <table:table-cell table:number-columns-repeated="3"/>
          <table:table-cell table:formula="of:=IF(OR([.M92]=&quot;&quot;;[.L92]=&quot;&quot;);&quot;&quot;;[.M92]-[.L92])">
            <text:p/>
          </table:table-cell>
          <table:table-cell table:formula="of:=IF(OR([.N92]=&quot;&quot;;[.A92]=&quot;&quot;);&quot;&quot;;[.N92]-[.A92])">
            <text:p/>
          </table:table-cell>
          <table:table-cell table:number-columns-repeated="3"/>
          <table:table-cell table:formula="of:=IF(OR([.R92]=&quot;&quot;;[.Q92]=&quot;&quot;);&quot;&quot;;[.R92]-[.Q92])">
            <text:p/>
          </table:table-cell>
          <table:table-cell table:formula="of:=IF(OR([.S92]=&quot;&quot;;[.A92]=&quot;&quot;);&quot;&quot;;[.S92]-[.A92])">
            <text:p/>
          </table:table-cell>
          <table:table-cell table:number-columns-repeated="3"/>
          <table:table-cell table:formula="of:=IF(OR([.W92]=&quot;&quot;;[.V92]=&quot;&quot;);&quot;&quot;;[.W92]-[.V92])">
            <text:p/>
          </table:table-cell>
          <table:table-cell table:formula="of:=IF(OR([.X92]=&quot;&quot;;[.A92]=&quot;&quot;);&quot;&quot;;[.X92]-[.A92])">
            <text:p/>
          </table:table-cell>
          <table:table-cell table:number-columns-repeated="3"/>
          <table:table-cell table:formula="of:=IF(OR([.AB92]=&quot;&quot;;[.AA92]=&quot;&quot;);&quot;&quot;;[.AB92]-[.AA92])">
            <text:p/>
          </table:table-cell>
          <table:table-cell table:formula="of:=IF(OR([.AC92]=&quot;&quot;;[.A92]=&quot;&quot;);&quot;&quot;;[.AC92]-[.A92])">
            <text:p/>
          </table:table-cell>
        </table:table-row>
        <table:table-row table:style-name="ro2">
          <table:table-cell table:number-columns-repeated="4"/>
          <table:table-cell table:formula="of:=IF(OR([.C93]=&quot;&quot;;[.B93]=&quot;&quot;);&quot;&quot;;[.C93]-[.B93])">
            <text:p/>
          </table:table-cell>
          <table:table-cell table:formula="of:=IF(OR([.D93]=&quot;&quot;;[.A93]=&quot;&quot;);&quot;&quot;;[.D93]-[.A93])">
            <text:p/>
          </table:table-cell>
          <table:table-cell table:number-columns-repeated="3"/>
          <table:table-cell table:formula="of:=IF(OR([.H93]=&quot;&quot;;[.G93]=&quot;&quot;);&quot;&quot;;[.H93]-[.G93])">
            <text:p/>
          </table:table-cell>
          <table:table-cell table:formula="of:=IF(OR([.I93]=&quot;&quot;;[.A93]=&quot;&quot;);&quot;&quot;;[.I93]-[.A93])">
            <text:p/>
          </table:table-cell>
          <table:table-cell table:number-columns-repeated="3"/>
          <table:table-cell table:formula="of:=IF(OR([.M93]=&quot;&quot;;[.L93]=&quot;&quot;);&quot;&quot;;[.M93]-[.L93])">
            <text:p/>
          </table:table-cell>
          <table:table-cell table:formula="of:=IF(OR([.N93]=&quot;&quot;;[.A93]=&quot;&quot;);&quot;&quot;;[.N93]-[.A93])">
            <text:p/>
          </table:table-cell>
          <table:table-cell table:number-columns-repeated="3"/>
          <table:table-cell table:formula="of:=IF(OR([.R93]=&quot;&quot;;[.Q93]=&quot;&quot;);&quot;&quot;;[.R93]-[.Q93])">
            <text:p/>
          </table:table-cell>
          <table:table-cell table:formula="of:=IF(OR([.S93]=&quot;&quot;;[.A93]=&quot;&quot;);&quot;&quot;;[.S93]-[.A93])">
            <text:p/>
          </table:table-cell>
          <table:table-cell table:number-columns-repeated="3"/>
          <table:table-cell table:formula="of:=IF(OR([.W93]=&quot;&quot;;[.V93]=&quot;&quot;);&quot;&quot;;[.W93]-[.V93])">
            <text:p/>
          </table:table-cell>
          <table:table-cell table:formula="of:=IF(OR([.X93]=&quot;&quot;;[.A93]=&quot;&quot;);&quot;&quot;;[.X93]-[.A93])">
            <text:p/>
          </table:table-cell>
          <table:table-cell table:number-columns-repeated="3"/>
          <table:table-cell table:formula="of:=IF(OR([.AB93]=&quot;&quot;;[.AA93]=&quot;&quot;);&quot;&quot;;[.AB93]-[.AA93])">
            <text:p/>
          </table:table-cell>
          <table:table-cell table:formula="of:=IF(OR([.AC93]=&quot;&quot;;[.A93]=&quot;&quot;);&quot;&quot;;[.AC93]-[.A93])">
            <text:p/>
          </table:table-cell>
        </table:table-row>
        <table:table-row table:style-name="ro2">
          <table:table-cell table:number-columns-repeated="4"/>
          <table:table-cell table:formula="of:=IF(OR([.C94]=&quot;&quot;;[.B94]=&quot;&quot;);&quot;&quot;;[.C94]-[.B94])">
            <text:p/>
          </table:table-cell>
          <table:table-cell table:formula="of:=IF(OR([.D94]=&quot;&quot;;[.A94]=&quot;&quot;);&quot;&quot;;[.D94]-[.A94])">
            <text:p/>
          </table:table-cell>
          <table:table-cell table:number-columns-repeated="3"/>
          <table:table-cell table:formula="of:=IF(OR([.H94]=&quot;&quot;;[.G94]=&quot;&quot;);&quot;&quot;;[.H94]-[.G94])">
            <text:p/>
          </table:table-cell>
          <table:table-cell table:formula="of:=IF(OR([.I94]=&quot;&quot;;[.A94]=&quot;&quot;);&quot;&quot;;[.I94]-[.A94])">
            <text:p/>
          </table:table-cell>
          <table:table-cell table:number-columns-repeated="3"/>
          <table:table-cell table:formula="of:=IF(OR([.M94]=&quot;&quot;;[.L94]=&quot;&quot;);&quot;&quot;;[.M94]-[.L94])">
            <text:p/>
          </table:table-cell>
          <table:table-cell table:formula="of:=IF(OR([.N94]=&quot;&quot;;[.A94]=&quot;&quot;);&quot;&quot;;[.N94]-[.A94])">
            <text:p/>
          </table:table-cell>
          <table:table-cell table:number-columns-repeated="3"/>
          <table:table-cell table:formula="of:=IF(OR([.R94]=&quot;&quot;;[.Q94]=&quot;&quot;);&quot;&quot;;[.R94]-[.Q94])">
            <text:p/>
          </table:table-cell>
          <table:table-cell table:formula="of:=IF(OR([.S94]=&quot;&quot;;[.A94]=&quot;&quot;);&quot;&quot;;[.S94]-[.A94])">
            <text:p/>
          </table:table-cell>
          <table:table-cell table:number-columns-repeated="3"/>
          <table:table-cell table:formula="of:=IF(OR([.W94]=&quot;&quot;;[.V94]=&quot;&quot;);&quot;&quot;;[.W94]-[.V94])">
            <text:p/>
          </table:table-cell>
          <table:table-cell table:formula="of:=IF(OR([.X94]=&quot;&quot;;[.A94]=&quot;&quot;);&quot;&quot;;[.X94]-[.A94])">
            <text:p/>
          </table:table-cell>
          <table:table-cell table:number-columns-repeated="3"/>
          <table:table-cell table:formula="of:=IF(OR([.AB94]=&quot;&quot;;[.AA94]=&quot;&quot;);&quot;&quot;;[.AB94]-[.AA94])">
            <text:p/>
          </table:table-cell>
          <table:table-cell table:formula="of:=IF(OR([.AC94]=&quot;&quot;;[.A94]=&quot;&quot;);&quot;&quot;;[.AC94]-[.A94])">
            <text:p/>
          </table:table-cell>
        </table:table-row>
        <table:table-row table:style-name="ro2">
          <table:table-cell table:number-columns-repeated="4"/>
          <table:table-cell table:formula="of:=IF(OR([.C95]=&quot;&quot;;[.B95]=&quot;&quot;);&quot;&quot;;[.C95]-[.B95])">
            <text:p/>
          </table:table-cell>
          <table:table-cell table:formula="of:=IF(OR([.D95]=&quot;&quot;;[.A95]=&quot;&quot;);&quot;&quot;;[.D95]-[.A95])">
            <text:p/>
          </table:table-cell>
          <table:table-cell table:number-columns-repeated="3"/>
          <table:table-cell table:formula="of:=IF(OR([.H95]=&quot;&quot;;[.G95]=&quot;&quot;);&quot;&quot;;[.H95]-[.G95])">
            <text:p/>
          </table:table-cell>
          <table:table-cell table:formula="of:=IF(OR([.I95]=&quot;&quot;;[.A95]=&quot;&quot;);&quot;&quot;;[.I95]-[.A95])">
            <text:p/>
          </table:table-cell>
          <table:table-cell table:number-columns-repeated="3"/>
          <table:table-cell table:formula="of:=IF(OR([.M95]=&quot;&quot;;[.L95]=&quot;&quot;);&quot;&quot;;[.M95]-[.L95])">
            <text:p/>
          </table:table-cell>
          <table:table-cell table:formula="of:=IF(OR([.N95]=&quot;&quot;;[.A95]=&quot;&quot;);&quot;&quot;;[.N95]-[.A95])">
            <text:p/>
          </table:table-cell>
          <table:table-cell table:number-columns-repeated="3"/>
          <table:table-cell table:formula="of:=IF(OR([.R95]=&quot;&quot;;[.Q95]=&quot;&quot;);&quot;&quot;;[.R95]-[.Q95])">
            <text:p/>
          </table:table-cell>
          <table:table-cell table:formula="of:=IF(OR([.S95]=&quot;&quot;;[.A95]=&quot;&quot;);&quot;&quot;;[.S95]-[.A95])">
            <text:p/>
          </table:table-cell>
          <table:table-cell table:number-columns-repeated="3"/>
          <table:table-cell table:formula="of:=IF(OR([.W95]=&quot;&quot;;[.V95]=&quot;&quot;);&quot;&quot;;[.W95]-[.V95])">
            <text:p/>
          </table:table-cell>
          <table:table-cell table:formula="of:=IF(OR([.X95]=&quot;&quot;;[.A95]=&quot;&quot;);&quot;&quot;;[.X95]-[.A95])">
            <text:p/>
          </table:table-cell>
          <table:table-cell table:number-columns-repeated="3"/>
          <table:table-cell table:formula="of:=IF(OR([.AB95]=&quot;&quot;;[.AA95]=&quot;&quot;);&quot;&quot;;[.AB95]-[.AA95])">
            <text:p/>
          </table:table-cell>
          <table:table-cell table:formula="of:=IF(OR([.AC95]=&quot;&quot;;[.A95]=&quot;&quot;);&quot;&quot;;[.AC95]-[.A95])">
            <text:p/>
          </table:table-cell>
        </table:table-row>
        <table:table-row table:style-name="ro2">
          <table:table-cell table:number-columns-repeated="4"/>
          <table:table-cell table:formula="of:=IF(OR([.C96]=&quot;&quot;;[.B96]=&quot;&quot;);&quot;&quot;;[.C96]-[.B96])">
            <text:p/>
          </table:table-cell>
          <table:table-cell table:formula="of:=IF(OR([.D96]=&quot;&quot;;[.A96]=&quot;&quot;);&quot;&quot;;[.D96]-[.A96])">
            <text:p/>
          </table:table-cell>
          <table:table-cell table:number-columns-repeated="3"/>
          <table:table-cell table:formula="of:=IF(OR([.H96]=&quot;&quot;;[.G96]=&quot;&quot;);&quot;&quot;;[.H96]-[.G96])">
            <text:p/>
          </table:table-cell>
          <table:table-cell table:formula="of:=IF(OR([.I96]=&quot;&quot;;[.A96]=&quot;&quot;);&quot;&quot;;[.I96]-[.A96])">
            <text:p/>
          </table:table-cell>
          <table:table-cell table:number-columns-repeated="3"/>
          <table:table-cell table:formula="of:=IF(OR([.M96]=&quot;&quot;;[.L96]=&quot;&quot;);&quot;&quot;;[.M96]-[.L96])">
            <text:p/>
          </table:table-cell>
          <table:table-cell table:formula="of:=IF(OR([.N96]=&quot;&quot;;[.A96]=&quot;&quot;);&quot;&quot;;[.N96]-[.A96])">
            <text:p/>
          </table:table-cell>
          <table:table-cell table:number-columns-repeated="3"/>
          <table:table-cell table:formula="of:=IF(OR([.R96]=&quot;&quot;;[.Q96]=&quot;&quot;);&quot;&quot;;[.R96]-[.Q96])">
            <text:p/>
          </table:table-cell>
          <table:table-cell table:formula="of:=IF(OR([.S96]=&quot;&quot;;[.A96]=&quot;&quot;);&quot;&quot;;[.S96]-[.A96])">
            <text:p/>
          </table:table-cell>
          <table:table-cell table:number-columns-repeated="3"/>
          <table:table-cell table:formula="of:=IF(OR([.W96]=&quot;&quot;;[.V96]=&quot;&quot;);&quot;&quot;;[.W96]-[.V96])">
            <text:p/>
          </table:table-cell>
          <table:table-cell table:formula="of:=IF(OR([.X96]=&quot;&quot;;[.A96]=&quot;&quot;);&quot;&quot;;[.X96]-[.A96])">
            <text:p/>
          </table:table-cell>
          <table:table-cell table:number-columns-repeated="3"/>
          <table:table-cell table:formula="of:=IF(OR([.AB96]=&quot;&quot;;[.AA96]=&quot;&quot;);&quot;&quot;;[.AB96]-[.AA96])">
            <text:p/>
          </table:table-cell>
          <table:table-cell table:formula="of:=IF(OR([.AC96]=&quot;&quot;;[.A96]=&quot;&quot;);&quot;&quot;;[.AC96]-[.A96])">
            <text:p/>
          </table:table-cell>
        </table:table-row>
        <table:table-row table:style-name="ro2">
          <table:table-cell table:number-columns-repeated="4"/>
          <table:table-cell table:formula="of:=IF(OR([.C97]=&quot;&quot;;[.B97]=&quot;&quot;);&quot;&quot;;[.C97]-[.B97])">
            <text:p/>
          </table:table-cell>
          <table:table-cell table:formula="of:=IF(OR([.D97]=&quot;&quot;;[.A97]=&quot;&quot;);&quot;&quot;;[.D97]-[.A97])">
            <text:p/>
          </table:table-cell>
          <table:table-cell table:number-columns-repeated="3"/>
          <table:table-cell table:formula="of:=IF(OR([.H97]=&quot;&quot;;[.G97]=&quot;&quot;);&quot;&quot;;[.H97]-[.G97])">
            <text:p/>
          </table:table-cell>
          <table:table-cell table:formula="of:=IF(OR([.I97]=&quot;&quot;;[.A97]=&quot;&quot;);&quot;&quot;;[.I97]-[.A97])">
            <text:p/>
          </table:table-cell>
          <table:table-cell table:number-columns-repeated="3"/>
          <table:table-cell table:formula="of:=IF(OR([.M97]=&quot;&quot;;[.L97]=&quot;&quot;);&quot;&quot;;[.M97]-[.L97])">
            <text:p/>
          </table:table-cell>
          <table:table-cell table:formula="of:=IF(OR([.N97]=&quot;&quot;;[.A97]=&quot;&quot;);&quot;&quot;;[.N97]-[.A97])">
            <text:p/>
          </table:table-cell>
          <table:table-cell table:number-columns-repeated="3"/>
          <table:table-cell table:formula="of:=IF(OR([.R97]=&quot;&quot;;[.Q97]=&quot;&quot;);&quot;&quot;;[.R97]-[.Q97])">
            <text:p/>
          </table:table-cell>
          <table:table-cell table:formula="of:=IF(OR([.S97]=&quot;&quot;;[.A97]=&quot;&quot;);&quot;&quot;;[.S97]-[.A97])">
            <text:p/>
          </table:table-cell>
          <table:table-cell table:number-columns-repeated="3"/>
          <table:table-cell table:formula="of:=IF(OR([.W97]=&quot;&quot;;[.V97]=&quot;&quot;);&quot;&quot;;[.W97]-[.V97])">
            <text:p/>
          </table:table-cell>
          <table:table-cell table:formula="of:=IF(OR([.X97]=&quot;&quot;;[.A97]=&quot;&quot;);&quot;&quot;;[.X97]-[.A97])">
            <text:p/>
          </table:table-cell>
          <table:table-cell table:number-columns-repeated="3"/>
          <table:table-cell table:formula="of:=IF(OR([.AB97]=&quot;&quot;;[.AA97]=&quot;&quot;);&quot;&quot;;[.AB97]-[.AA97])">
            <text:p/>
          </table:table-cell>
          <table:table-cell table:formula="of:=IF(OR([.AC97]=&quot;&quot;;[.A97]=&quot;&quot;);&quot;&quot;;[.AC97]-[.A97])">
            <text:p/>
          </table:table-cell>
        </table:table-row>
        <table:table-row table:style-name="ro2">
          <table:table-cell table:number-columns-repeated="4"/>
          <table:table-cell table:formula="of:=IF(OR([.C98]=&quot;&quot;;[.B98]=&quot;&quot;);&quot;&quot;;[.C98]-[.B98])">
            <text:p/>
          </table:table-cell>
          <table:table-cell table:formula="of:=IF(OR([.D98]=&quot;&quot;;[.A98]=&quot;&quot;);&quot;&quot;;[.D98]-[.A98])">
            <text:p/>
          </table:table-cell>
          <table:table-cell table:number-columns-repeated="3"/>
          <table:table-cell table:formula="of:=IF(OR([.H98]=&quot;&quot;;[.G98]=&quot;&quot;);&quot;&quot;;[.H98]-[.G98])">
            <text:p/>
          </table:table-cell>
          <table:table-cell table:formula="of:=IF(OR([.I98]=&quot;&quot;;[.A98]=&quot;&quot;);&quot;&quot;;[.I98]-[.A98])">
            <text:p/>
          </table:table-cell>
          <table:table-cell table:number-columns-repeated="3"/>
          <table:table-cell table:formula="of:=IF(OR([.M98]=&quot;&quot;;[.L98]=&quot;&quot;);&quot;&quot;;[.M98]-[.L98])">
            <text:p/>
          </table:table-cell>
          <table:table-cell table:formula="of:=IF(OR([.N98]=&quot;&quot;;[.A98]=&quot;&quot;);&quot;&quot;;[.N98]-[.A98])">
            <text:p/>
          </table:table-cell>
          <table:table-cell table:number-columns-repeated="3"/>
          <table:table-cell table:formula="of:=IF(OR([.R98]=&quot;&quot;;[.Q98]=&quot;&quot;);&quot;&quot;;[.R98]-[.Q98])">
            <text:p/>
          </table:table-cell>
          <table:table-cell table:formula="of:=IF(OR([.S98]=&quot;&quot;;[.A98]=&quot;&quot;);&quot;&quot;;[.S98]-[.A98])">
            <text:p/>
          </table:table-cell>
          <table:table-cell table:number-columns-repeated="3"/>
          <table:table-cell table:formula="of:=IF(OR([.W98]=&quot;&quot;;[.V98]=&quot;&quot;);&quot;&quot;;[.W98]-[.V98])">
            <text:p/>
          </table:table-cell>
          <table:table-cell table:formula="of:=IF(OR([.X98]=&quot;&quot;;[.A98]=&quot;&quot;);&quot;&quot;;[.X98]-[.A98])">
            <text:p/>
          </table:table-cell>
          <table:table-cell table:number-columns-repeated="3"/>
          <table:table-cell table:formula="of:=IF(OR([.AB98]=&quot;&quot;;[.AA98]=&quot;&quot;);&quot;&quot;;[.AB98]-[.AA98])">
            <text:p/>
          </table:table-cell>
          <table:table-cell table:formula="of:=IF(OR([.AC98]=&quot;&quot;;[.A98]=&quot;&quot;);&quot;&quot;;[.AC98]-[.A98])">
            <text:p/>
          </table:table-cell>
        </table:table-row>
        <table:table-row table:style-name="ro2">
          <table:table-cell table:number-columns-repeated="4"/>
          <table:table-cell table:formula="of:=IF(OR([.C99]=&quot;&quot;;[.B99]=&quot;&quot;);&quot;&quot;;[.C99]-[.B99])">
            <text:p/>
          </table:table-cell>
          <table:table-cell table:formula="of:=IF(OR([.D99]=&quot;&quot;;[.A99]=&quot;&quot;);&quot;&quot;;[.D99]-[.A99])">
            <text:p/>
          </table:table-cell>
          <table:table-cell table:number-columns-repeated="3"/>
          <table:table-cell table:formula="of:=IF(OR([.H99]=&quot;&quot;;[.G99]=&quot;&quot;);&quot;&quot;;[.H99]-[.G99])">
            <text:p/>
          </table:table-cell>
          <table:table-cell table:formula="of:=IF(OR([.I99]=&quot;&quot;;[.A99]=&quot;&quot;);&quot;&quot;;[.I99]-[.A99])">
            <text:p/>
          </table:table-cell>
          <table:table-cell table:number-columns-repeated="3"/>
          <table:table-cell table:formula="of:=IF(OR([.M99]=&quot;&quot;;[.L99]=&quot;&quot;);&quot;&quot;;[.M99]-[.L99])">
            <text:p/>
          </table:table-cell>
          <table:table-cell table:formula="of:=IF(OR([.N99]=&quot;&quot;;[.A99]=&quot;&quot;);&quot;&quot;;[.N99]-[.A99])">
            <text:p/>
          </table:table-cell>
          <table:table-cell table:number-columns-repeated="3"/>
          <table:table-cell table:formula="of:=IF(OR([.R99]=&quot;&quot;;[.Q99]=&quot;&quot;);&quot;&quot;;[.R99]-[.Q99])">
            <text:p/>
          </table:table-cell>
          <table:table-cell table:formula="of:=IF(OR([.S99]=&quot;&quot;;[.A99]=&quot;&quot;);&quot;&quot;;[.S99]-[.A99])">
            <text:p/>
          </table:table-cell>
          <table:table-cell table:number-columns-repeated="3"/>
          <table:table-cell table:formula="of:=IF(OR([.W99]=&quot;&quot;;[.V99]=&quot;&quot;);&quot;&quot;;[.W99]-[.V99])">
            <text:p/>
          </table:table-cell>
          <table:table-cell table:formula="of:=IF(OR([.X99]=&quot;&quot;;[.A99]=&quot;&quot;);&quot;&quot;;[.X99]-[.A99])">
            <text:p/>
          </table:table-cell>
          <table:table-cell table:number-columns-repeated="3"/>
          <table:table-cell table:formula="of:=IF(OR([.AB99]=&quot;&quot;;[.AA99]=&quot;&quot;);&quot;&quot;;[.AB99]-[.AA99])">
            <text:p/>
          </table:table-cell>
          <table:table-cell table:formula="of:=IF(OR([.AC99]=&quot;&quot;;[.A99]=&quot;&quot;);&quot;&quot;;[.AC99]-[.A99])">
            <text:p/>
          </table:table-cell>
        </table:table-row>
        <table:table-row table:style-name="ro2">
          <table:table-cell table:number-columns-repeated="4"/>
          <table:table-cell table:formula="of:=IF(OR([.C100]=&quot;&quot;;[.B100]=&quot;&quot;);&quot;&quot;;[.C100]-[.B100])">
            <text:p/>
          </table:table-cell>
          <table:table-cell table:formula="of:=IF(OR([.D100]=&quot;&quot;;[.A100]=&quot;&quot;);&quot;&quot;;[.D100]-[.A100])">
            <text:p/>
          </table:table-cell>
          <table:table-cell table:number-columns-repeated="3"/>
          <table:table-cell table:formula="of:=IF(OR([.H100]=&quot;&quot;;[.G100]=&quot;&quot;);&quot;&quot;;[.H100]-[.G100])">
            <text:p/>
          </table:table-cell>
          <table:table-cell table:formula="of:=IF(OR([.I100]=&quot;&quot;;[.A100]=&quot;&quot;);&quot;&quot;;[.I100]-[.A100])">
            <text:p/>
          </table:table-cell>
          <table:table-cell table:number-columns-repeated="3"/>
          <table:table-cell table:formula="of:=IF(OR([.M100]=&quot;&quot;;[.L100]=&quot;&quot;);&quot;&quot;;[.M100]-[.L100])">
            <text:p/>
          </table:table-cell>
          <table:table-cell table:formula="of:=IF(OR([.N100]=&quot;&quot;;[.A100]=&quot;&quot;);&quot;&quot;;[.N100]-[.A100])">
            <text:p/>
          </table:table-cell>
          <table:table-cell table:number-columns-repeated="3"/>
          <table:table-cell table:formula="of:=IF(OR([.R100]=&quot;&quot;;[.Q100]=&quot;&quot;);&quot;&quot;;[.R100]-[.Q100])">
            <text:p/>
          </table:table-cell>
          <table:table-cell table:formula="of:=IF(OR([.S100]=&quot;&quot;;[.A100]=&quot;&quot;);&quot;&quot;;[.S100]-[.A100])">
            <text:p/>
          </table:table-cell>
          <table:table-cell table:number-columns-repeated="3"/>
          <table:table-cell table:formula="of:=IF(OR([.W100]=&quot;&quot;;[.V100]=&quot;&quot;);&quot;&quot;;[.W100]-[.V100])">
            <text:p/>
          </table:table-cell>
          <table:table-cell table:formula="of:=IF(OR([.X100]=&quot;&quot;;[.A100]=&quot;&quot;);&quot;&quot;;[.X100]-[.A100])">
            <text:p/>
          </table:table-cell>
          <table:table-cell table:number-columns-repeated="3"/>
          <table:table-cell table:formula="of:=IF(OR([.AB100]=&quot;&quot;;[.AA100]=&quot;&quot;);&quot;&quot;;[.AB100]-[.AA100])">
            <text:p/>
          </table:table-cell>
          <table:table-cell table:formula="of:=IF(OR([.AC100]=&quot;&quot;;[.A100]=&quot;&quot;);&quot;&quot;;[.AC100]-[.A100])">
            <text:p/>
          </table:table-cell>
        </table:table-row>
        <table:table-row table:style-name="ro2">
          <table:table-cell table:number-columns-repeated="4"/>
          <table:table-cell table:formula="of:=IF(OR([.C101]=&quot;&quot;;[.B101]=&quot;&quot;);&quot;&quot;;[.C101]-[.B101])">
            <text:p/>
          </table:table-cell>
          <table:table-cell table:formula="of:=IF(OR([.D101]=&quot;&quot;;[.A101]=&quot;&quot;);&quot;&quot;;[.D101]-[.A101])">
            <text:p/>
          </table:table-cell>
          <table:table-cell table:number-columns-repeated="3"/>
          <table:table-cell table:formula="of:=IF(OR([.H101]=&quot;&quot;;[.G101]=&quot;&quot;);&quot;&quot;;[.H101]-[.G101])">
            <text:p/>
          </table:table-cell>
          <table:table-cell table:formula="of:=IF(OR([.I101]=&quot;&quot;;[.A101]=&quot;&quot;);&quot;&quot;;[.I101]-[.A101])">
            <text:p/>
          </table:table-cell>
          <table:table-cell table:number-columns-repeated="3"/>
          <table:table-cell table:formula="of:=IF(OR([.M101]=&quot;&quot;;[.L101]=&quot;&quot;);&quot;&quot;;[.M101]-[.L101])">
            <text:p/>
          </table:table-cell>
          <table:table-cell table:formula="of:=IF(OR([.N101]=&quot;&quot;;[.A101]=&quot;&quot;);&quot;&quot;;[.N101]-[.A101])">
            <text:p/>
          </table:table-cell>
          <table:table-cell table:number-columns-repeated="3"/>
          <table:table-cell table:formula="of:=IF(OR([.R101]=&quot;&quot;;[.Q101]=&quot;&quot;);&quot;&quot;;[.R101]-[.Q101])">
            <text:p/>
          </table:table-cell>
          <table:table-cell table:formula="of:=IF(OR([.S101]=&quot;&quot;;[.A101]=&quot;&quot;);&quot;&quot;;[.S101]-[.A101])">
            <text:p/>
          </table:table-cell>
          <table:table-cell table:number-columns-repeated="3"/>
          <table:table-cell table:formula="of:=IF(OR([.W101]=&quot;&quot;;[.V101]=&quot;&quot;);&quot;&quot;;[.W101]-[.V101])">
            <text:p/>
          </table:table-cell>
          <table:table-cell table:formula="of:=IF(OR([.X101]=&quot;&quot;;[.A101]=&quot;&quot;);&quot;&quot;;[.X101]-[.A101])">
            <text:p/>
          </table:table-cell>
          <table:table-cell table:number-columns-repeated="3"/>
          <table:table-cell table:formula="of:=IF(OR([.AB101]=&quot;&quot;;[.AA101]=&quot;&quot;);&quot;&quot;;[.AB101]-[.AA101])">
            <text:p/>
          </table:table-cell>
          <table:table-cell table:formula="of:=IF(OR([.AC101]=&quot;&quot;;[.A101]=&quot;&quot;);&quot;&quot;;[.AC101]-[.A101])">
            <text:p/>
          </table:table-cell>
        </table:table-row>
      </table:table>
      <table:table table:name="说明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字段</text:p>
          </table:table-cell>
          <table:table-cell office:value-type="string" calcext:value-type="string">
            <text:p>说明</text:p>
          </table:table-cell>
        </table:table-row>
        <table:table-row table:style-name="ro1">
          <table:table-cell office:value-type="string" calcext:value-type="string">
            <text:p>本表单位</text:p>
          </table:table-cell>
          <table:table-cell office:value-type="string" calcext:value-type="string">
            <text:p>厘米（cm）</text:p>
          </table:table-cell>
        </table:table-row>
        <table:table-row table:style-name="ro1">
          <table:table-cell office:value-type="string" calcext:value-type="string">
            <text:p>R后缀</text:p>
          </table:table-cell>
          <table:table-cell office:value-type="string" calcext:value-type="string">
            <text:p>真实人工测量坐标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六个目标共用的真实Y坐标；目标在-Y方向，因此填写负数</text:p>
          </table:table-cell>
        </table:table-row>
        <table:table-row table:style-name="ro1">
          <table:table-cell office:value-type="string" calcext:value-type="string">
            <text:p>X1R、X2R、X3R</text:p>
          </table:table-cell>
          <table:table-cell office:value-type="string" calcext:value-type="string">
            <text:p>红色-X方向，填写负数</text:p>
          </table:table-cell>
        </table:table-row>
        <table:table-row table:style-name="ro1">
          <table:table-cell office:value-type="string" calcext:value-type="string">
            <text:p>X4R、X5R、X6R</text:p>
          </table:table-cell>
          <table:table-cell office:value-type="string" calcext:value-type="string">
            <text:p>红色+X方向，填写正数</text:p>
          </table:table-cell>
        </table:table-row>
        <table:table-row table:style-name="ro1">
          <table:table-cell office:value-type="string" calcext:value-type="string">
            <text:p>识别编号对应</text:p>
          </table:table-cell>
          <table:table-cell office:value-type="string" calcext:value-type="string">
            <text:p>X1=ID2，X2=ID1，X3=ID0，X4=ID3，X5=ID4，X6=ID5</text:p>
          </table:table-cell>
        </table:table-row>
        <table:table-row table:style-name="ro1">
          <table:table-cell office:value-type="string" calcext:value-type="string">
            <text:p>误差定义</text:p>
          </table:table-cell>
          <table:table-cell office:value-type="string" calcext:value-type="string">
            <text:p>识别值减真实值；X误差=Xi-XiR，Y误差=Yi-YR</text:p>
          </table:table-cell>
        </table:table-row>
        <table:table-row table:style-name="ro2">
          <table:table-cell office:value-type="string" calcext:value-type="string">
            <text:p>数据包</text:p>
          </table:table-cell>
          <table:table-cell office:value-type="string" calcext:value-type="string">
            <text:p>six_targets_0mm_r1_20260619_171750</text:p>
          </table:table-cell>
        </table:table-row>
      </table:table>
      <table:named-expressions/>
      <table:database-ranges>
        <table:database-range table:name="__Anonymous_Sheet_DB__0" table:target-range-address="数据.A1:数据.C1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5:35:24.579911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9T16:15:56.617413293</meta:creation-date>
    <dc:date>2026-06-20T15:35:31.341356471</dc:date>
    <meta:editing-duration>PT2H10M31S</meta:editing-duration>
    <meta:editing-cycles>10</meta:editing-cycles>
    <meta:generator>LibreOffice/25.8.7.3$Linux_X86_64 LibreOffice_project/30742500f2d3eb4366ac312fa33d3dcabdb3eba5</meta:generator>
    <meta:document-statistic meta:table-count="2" meta:cell-count="1302" meta:object-count="0"/>
  </office:meta>
</office:document-meta>
</file>